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4.951cm"/>
    </style:style>
    <style:style style:name="co3" style:family="table-column">
      <style:table-column-properties fo:break-before="auto" style:column-width="0.55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PageStyle_5f_Tabel_20_2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justify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true" fo:wrap-option="wrap" fo:border="none" style:direction="ltr" fo:padding="0.071cm" style:rotation-angle="0" style:rotation-align="none" style:shrink-to-fit="false" style:vertical-align="justify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" table:default-cell-style-name="ce9"/>
        <table:table-column table:style-name="co4" table:default-cell-style-name="ce9"/>
        <table:table-column table:style-name="co5" table:number-columns-repeated="5" table:default-cell-style-name="ce9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3cm" svg:height="1.377cm" svg:x="3.973cm" svg:y="0.052cm" draw:caption-point-x="-0.431cm" draw:caption-point-y="-0.042cm">
              <dc:creator>CDM</dc:creator>
              <dc:date>2014-12-12T00:00:00</dc:date>
              <text:p text:style-name="P1"><text:span text:style-name="T1">Noot 1) excl. Niet-werkenden en beroep onbekend</text:span></text:p>
              <text:p text:style-name="P1"><text:span text:style-name="T1"/></text:p>
            </office:annotation>
            <text:p>Tabel 21. Beroepsbevolking naar beroepsgroep, nationaliteit en geslacht</text:p>
          </table:table-cell>
          <table:table-cell table:style-name="ce10" table:number-columns-repeated="13"/>
          <table:table-cell table:style-name="ce34"/>
          <table:table-cell table:style-name="ce2" table:number-columns-repeated="1009"/>
        </table:table-row>
        <table:table-row table:style-name="ro1">
          <table:table-cell table:style-name="ce2" table:number-columns-repeated="7"/>
          <table:table-cell table:style-name="ce30"/>
          <table:table-cell table:style-name="ce2"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3">
            <text:p>Beroepsgroepen-combinatie</text:p>
          </table:table-cell>
          <table:covered-table-cell table:style-name="ce11"/>
          <table:table-cell table:style-name="ce19"/>
          <table:table-cell table:style-name="ce20" office:value-type="string" calcext:value-type="string" table:number-columns-spanned="6" table:number-rows-spanned="1">
            <text:p>Mannen</text:p>
          </table:table-cell>
          <table:covered-table-cell table:number-columns-repeated="5" table:style-name="ce26"/>
          <table:table-cell table:style-name="ce31" office:value-type="string" calcext:value-type="string" table:number-columns-spanned="6" table:number-rows-spanned="1">
            <text:p>Vrouwen</text:p>
          </table:table-cell>
          <table:covered-table-cell table:number-columns-repeated="4" table:style-name="ce26"/>
          <table:covered-table-cell table:style-name="ce31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19"/>
          <table:table-cell table:style-name="ce21" office:value-type="string" calcext:value-type="string" table:number-columns-spanned="1" table:number-rows-spanned="2">
            <text:p>Nederl., Ned.onderd.</text:p>
          </table:table-cell>
          <table:table-cell table:style-name="ce27" office:value-type="string" calcext:value-type="string" table:number-columns-spanned="1" table:number-rows-spanned="2">
            <text:p>Duitsers</text:p>
          </table:table-cell>
          <table:table-cell table:style-name="ce27" office:value-type="string" calcext:value-type="string" table:number-columns-spanned="1" table:number-rows-spanned="2">
            <text:p>Belgen</text:p>
          </table:table-cell>
          <table:table-cell table:style-name="ce27" office:value-type="string" calcext:value-type="string" table:number-columns-spanned="1" table:number-rows-spanned="2">
            <text:p>Overige nation.</text:p>
          </table:table-cell>
          <table:table-cell table:style-name="ce27" office:value-type="string" calcext:value-type="string" table:number-columns-spanned="1" table:number-rows-spanned="2">
            <text:p>Zonder nation.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7" office:value-type="string" calcext:value-type="string" table:number-columns-spanned="1" table:number-rows-spanned="2">
            <text:p>Nederl., Ned.onderd.</text:p>
          </table:table-cell>
          <table:table-cell table:style-name="ce27" office:value-type="string" calcext:value-type="string" table:number-columns-spanned="1" table:number-rows-spanned="2">
            <text:p>Duitsers</text:p>
          </table:table-cell>
          <table:table-cell table:style-name="ce27" office:value-type="string" calcext:value-type="string" table:number-columns-spanned="1" table:number-rows-spanned="2">
            <text:p>Belgen</text:p>
          </table:table-cell>
          <table:table-cell table:style-name="ce27" office:value-type="string" calcext:value-type="string" table:number-columns-spanned="1" table:number-rows-spanned="2">
            <text:p>Overige nation.</text:p>
          </table:table-cell>
          <table:table-cell table:style-name="ce27" office:value-type="string" calcext:value-type="string" table:number-columns-spanned="1" table:number-rows-spanned="2">
            <text:p>Zonder nation.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" table:number-columns-repeated="1009"/>
        </table:table-row>
        <table:table-row table:style-name="ro3">
          <table:covered-table-cell table:style-name="ce5"/>
          <table:covered-table-cell table:style-name="ce13"/>
          <table:table-cell table:style-name="ce19"/>
          <table:covered-table-cell table:style-name="ce21"/>
          <table:covered-table-cell table:number-columns-repeated="10" table:style-name="ce27"/>
          <table:covered-table-cell table:style-name="ce35"/>
          <table:table-cell table:style-name="ce2" table:number-columns-repeated="1009"/>
        </table:table-row>
        <table:table-row table:style-name="ro1">
          <table:table-cell table:style-name="Default" table:number-columns-repeated="3"/>
          <table:table-cell table:style-name="ce22" table:number-columns-repeated="6"/>
          <table:table-cell table:style-name="ce32"/>
          <table:table-cell table:style-name="ce22" table:number-columns-repeated="5"/>
          <table:table-cell table:number-columns-repeated="1009"/>
        </table:table-row>
        <table:table-row table:style-name="ro2">
          <table:table-cell table:style-name="ce6" office:value-type="string" calcext:value-type="string">
            <text:p>GRONINGEN</text:p>
          </table:table-cell>
          <table:table-cell table:style-name="ce14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9784" calcext:value-type="float">
            <text:p>978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826" calcext:value-type="float">
            <text:p>9826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674" calcext:value-type="float">
            <text:p>67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11824" calcext:value-type="float">
            <text:p>1182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1836" calcext:value-type="float">
            <text:p>11836</text:p>
          </table:table-cell>
          <table:table-cell table:style-name="ce28" office:value-type="float" office:value="499" calcext:value-type="float">
            <text:p>499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500" calcext:value-type="float">
            <text:p>500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3769" calcext:value-type="float">
            <text:p>376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775" calcext:value-type="float">
            <text:p>3775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595" calcext:value-type="float">
            <text:p>59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8338" calcext:value-type="float">
            <text:p>833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361" calcext:value-type="float">
            <text:p>8361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6" office:value-type="float" office:value="508" calcext:value-type="float">
            <text:p>508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6634" calcext:value-type="float">
            <text:p>663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646" calcext:value-type="float">
            <text:p>6646</text:p>
          </table:table-cell>
          <table:table-cell table:style-name="ce28" office:value-type="float" office:value="10466" calcext:value-type="float">
            <text:p>1046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0482" calcext:value-type="float">
            <text:p>10482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1286" calcext:value-type="float">
            <text:p>128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298" calcext:value-type="float">
            <text:p>1298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87" calcext:value-type="float">
            <text:p>8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20034" calcext:value-type="float">
            <text:p>2003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0091" calcext:value-type="float">
            <text:p>20091</text:p>
          </table:table-cell>
          <table:table-cell table:style-name="ce28" office:value-type="float" office:value="9926" calcext:value-type="float">
            <text:p>992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9975" calcext:value-type="float">
            <text:p>997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21265" calcext:value-type="float">
            <text:p>2126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323" calcext:value-type="float">
            <text:p>21323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43" calcext:value-type="float">
            <text:p>643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44728" calcext:value-type="float">
            <text:p>4472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4913" calcext:value-type="float">
            <text:p>44913</text:p>
          </table:table-cell>
          <table:table-cell table:style-name="ce29" office:value-type="float" office:value="16810" calcext:value-type="float">
            <text:p>1681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7" calcext:value-type="float">
            <text:p>37</text:p>
          </table:table-cell>
          <table:table-cell table:style-name="ce37" office:value-type="float" office:value="16921" calcext:value-type="float">
            <text:p>1692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127662" calcext:value-type="float">
            <text:p>127662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28069" calcext:value-type="float">
            <text:p>128069</text:p>
          </table:table-cell>
          <table:table-cell table:style-name="ce28" office:value-type="float" office:value="40189" calcext:value-type="float">
            <text:p>4018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40385" calcext:value-type="float">
            <text:p>4038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8868" calcext:value-type="float">
            <text:p>8868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891" calcext:value-type="float">
            <text:p>8891</text:p>
          </table:table-cell>
          <table:table-cell table:style-name="ce28" office:value-type="float" office:value="453" calcext:value-type="float">
            <text:p>45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455" calcext:value-type="float">
            <text:p>45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20629" calcext:value-type="float">
            <text:p>2062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636" calcext:value-type="float">
            <text:p>20636</text:p>
          </table:table-cell>
          <table:table-cell table:style-name="ce28" office:value-type="float" office:value="727" calcext:value-type="float">
            <text:p>72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727" calcext:value-type="float">
            <text:p>72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4200" calcext:value-type="float">
            <text:p>420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207" calcext:value-type="float">
            <text:p>4207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736" calcext:value-type="float">
            <text:p>73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9006" calcext:value-type="float">
            <text:p>9006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013" calcext:value-type="float">
            <text:p>9013</text:p>
          </table:table-cell>
          <table:table-cell table:style-name="ce28" office:value-type="float" office:value="415" calcext:value-type="float">
            <text:p>41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415" calcext:value-type="float">
            <text:p>41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9915" calcext:value-type="float">
            <text:p>99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921" calcext:value-type="float">
            <text:p>9921</text:p>
          </table:table-cell>
          <table:table-cell table:style-name="ce28" office:value-type="float" office:value="13659" calcext:value-type="float">
            <text:p>1365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3671" calcext:value-type="float">
            <text:p>1367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996" calcext:value-type="float">
            <text:p>996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66" calcext:value-type="float">
            <text:p>6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16658" calcext:value-type="float">
            <text:p>1665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6691" calcext:value-type="float">
            <text:p>16691</text:p>
          </table:table-cell>
          <table:table-cell table:style-name="ce28" office:value-type="float" office:value="7152" calcext:value-type="float">
            <text:p>715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7197" calcext:value-type="float">
            <text:p>719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20690" calcext:value-type="float">
            <text:p>2069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0703" calcext:value-type="float">
            <text:p>20703</text:p>
          </table:table-cell>
          <table:table-cell table:style-name="ce28" office:value-type="float" office:value="1135" calcext:value-type="float">
            <text:p>113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36" calcext:value-type="float">
            <text:p>1136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37395" calcext:value-type="float">
            <text:p>3739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37445" calcext:value-type="float">
            <text:p>37445</text:p>
          </table:table-cell>
          <table:table-cell table:style-name="ce29" office:value-type="float" office:value="14495" calcext:value-type="float">
            <text:p>1449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float" office:value="14563" calcext:value-type="float">
            <text:p>1456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128357" calcext:value-type="float">
            <text:p>12835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28504" calcext:value-type="float">
            <text:p>128504</text:p>
          </table:table-cell>
          <table:table-cell table:style-name="ce28" office:value-type="float" office:value="38836" calcext:value-type="float">
            <text:p>3883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38966" calcext:value-type="float">
            <text:p>3896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4630" calcext:value-type="float">
            <text:p>463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657" calcext:value-type="float">
            <text:p>4657</text:p>
          </table:table-cell>
          <table:table-cell table:style-name="ce28" office:value-type="float" office:value="242" calcext:value-type="float">
            <text:p>24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43" calcext:value-type="float">
            <text:p>24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15976" calcext:value-type="float">
            <text:p>1597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013" calcext:value-type="float">
            <text:p>16013</text:p>
          </table:table-cell>
          <table:table-cell table:style-name="ce28" office:value-type="float" office:value="762" calcext:value-type="float">
            <text:p>76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763" calcext:value-type="float">
            <text:p>76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1706" calcext:value-type="float">
            <text:p>1706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08" calcext:value-type="float">
            <text:p>1708</text:p>
          </table:table-cell>
          <table:table-cell table:style-name="ce28" office:value-type="float" office:value="233" calcext:value-type="float">
            <text:p>233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233" calcext:value-type="float">
            <text:p>23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3206" calcext:value-type="float">
            <text:p>3206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17" calcext:value-type="float">
            <text:p>3217</text:p>
          </table:table-cell>
          <table:table-cell table:style-name="ce28" office:value-type="float" office:value="158" calcext:value-type="float">
            <text:p>158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9" calcext:value-type="float">
            <text:p>15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8879" calcext:value-type="float">
            <text:p>8879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886" calcext:value-type="float">
            <text:p>8886</text:p>
          </table:table-cell>
          <table:table-cell table:style-name="ce28" office:value-type="float" office:value="15609" calcext:value-type="float">
            <text:p>15609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5632" calcext:value-type="float">
            <text:p>15632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456" calcext:value-type="float">
            <text:p>456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6" office:value-type="float" office:value="28" calcext:value-type="float">
            <text:p>28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8921" calcext:value-type="float">
            <text:p>892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38" calcext:value-type="float">
            <text:p>8938</text:p>
          </table:table-cell>
          <table:table-cell table:style-name="ce28" office:value-type="float" office:value="3833" calcext:value-type="float">
            <text:p>383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848" calcext:value-type="float">
            <text:p>3848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11499" calcext:value-type="float">
            <text:p>1149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522" calcext:value-type="float">
            <text:p>11522</text:p>
          </table:table-cell>
          <table:table-cell table:style-name="ce28" office:value-type="float" office:value="1059" calcext:value-type="float">
            <text:p>1059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061" calcext:value-type="float">
            <text:p>1061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24662" calcext:value-type="float">
            <text:p>2466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4776" calcext:value-type="float">
            <text:p>24776</text:p>
          </table:table-cell>
          <table:table-cell table:style-name="ce29" office:value-type="float" office:value="7669" calcext:value-type="float">
            <text:p>766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37" office:value-type="float" office:value="7721" calcext:value-type="float">
            <text:p>772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79935" calcext:value-type="float">
            <text:p>7993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80175" calcext:value-type="float">
            <text:p>80175</text:p>
          </table:table-cell>
          <table:table-cell table:style-name="ce28" office:value-type="float" office:value="29592" calcext:value-type="float">
            <text:p>2959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9688" calcext:value-type="float">
            <text:p>29688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11949" calcext:value-type="float">
            <text:p>1194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2091" calcext:value-type="float">
            <text:p>12091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859" calcext:value-type="float">
            <text:p>85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23762" calcext:value-type="float">
            <text:p>2376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3850" calcext:value-type="float">
            <text:p>23850</text:p>
          </table:table-cell>
          <table:table-cell table:style-name="ce28" office:value-type="float" office:value="1840" calcext:value-type="float">
            <text:p>184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844" calcext:value-type="float">
            <text:p>184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4721" calcext:value-type="float">
            <text:p>472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740" calcext:value-type="float">
            <text:p>4740</text:p>
          </table:table-cell>
          <table:table-cell table:style-name="ce28" office:value-type="float" office:value="937" calcext:value-type="float">
            <text:p>937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940" calcext:value-type="float">
            <text:p>940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7314" calcext:value-type="float">
            <text:p>731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7389" calcext:value-type="float">
            <text:p>7389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530" calcext:value-type="float">
            <text:p>530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15196" calcext:value-type="float">
            <text:p>1519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243" calcext:value-type="float">
            <text:p>15243</text:p>
          </table:table-cell>
          <table:table-cell table:style-name="ce28" office:value-type="float" office:value="27329" calcext:value-type="float">
            <text:p>2732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27438" calcext:value-type="float">
            <text:p>27438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1395" calcext:value-type="float">
            <text:p>139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413" calcext:value-type="float">
            <text:p>141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93" calcext:value-type="float">
            <text:p>9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27527" calcext:value-type="float">
            <text:p>2752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7696" calcext:value-type="float">
            <text:p>27696</text:p>
          </table:table-cell>
          <table:table-cell table:style-name="ce28" office:value-type="float" office:value="12658" calcext:value-type="float">
            <text:p>1265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2814" calcext:value-type="float">
            <text:p>1281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11975" calcext:value-type="float">
            <text:p>1197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011" calcext:value-type="float">
            <text:p>12011</text:p>
          </table:table-cell>
          <table:table-cell table:style-name="ce28" office:value-type="float" office:value="2502" calcext:value-type="float">
            <text:p>2502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518" calcext:value-type="float">
            <text:p>2518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81722" calcext:value-type="float">
            <text:p>81722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82333" calcext:value-type="float">
            <text:p>82333</text:p>
          </table:table-cell>
          <table:table-cell table:style-name="ce29" office:value-type="float" office:value="29149" calcext:value-type="float">
            <text:p>29149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0" calcext:value-type="float">
            <text:p>60</text:p>
          </table:table-cell>
          <table:table-cell table:style-name="ce37" office:value-type="float" office:value="29460" calcext:value-type="float">
            <text:p>29460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185561" calcext:value-type="float">
            <text:p>185561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186766" calcext:value-type="float">
            <text:p>186766</text:p>
          </table:table-cell>
          <table:table-cell table:style-name="ce28" office:value-type="float" office:value="75869" calcext:value-type="float">
            <text:p>75869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76496" calcext:value-type="float">
            <text:p>7649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20818" calcext:value-type="float">
            <text:p>2081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0972" calcext:value-type="float">
            <text:p>20972</text:p>
          </table:table-cell>
          <table:table-cell table:style-name="ce28" office:value-type="float" office:value="1445" calcext:value-type="float">
            <text:p>144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470" calcext:value-type="float">
            <text:p>1470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40621" calcext:value-type="float">
            <text:p>4062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0709" calcext:value-type="float">
            <text:p>40709</text:p>
          </table:table-cell>
          <table:table-cell table:style-name="ce28" office:value-type="float" office:value="2859" calcext:value-type="float">
            <text:p>2859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866" calcext:value-type="float">
            <text:p>286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6939" calcext:value-type="float">
            <text:p>6939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974" calcext:value-type="float">
            <text:p>6974</text:p>
          </table:table-cell>
          <table:table-cell table:style-name="ce28" office:value-type="float" office:value="1247" calcext:value-type="float">
            <text:p>1247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1255" calcext:value-type="float">
            <text:p>125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12609" calcext:value-type="float">
            <text:p>1260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2705" calcext:value-type="float">
            <text:p>12705</text:p>
          </table:table-cell>
          <table:table-cell table:style-name="ce28" office:value-type="float" office:value="1279" calcext:value-type="float">
            <text:p>127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287" calcext:value-type="float">
            <text:p>128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24875" calcext:value-type="float">
            <text:p>2487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4924" calcext:value-type="float">
            <text:p>24924</text:p>
          </table:table-cell>
          <table:table-cell table:style-name="ce28" office:value-type="float" office:value="39708" calcext:value-type="float">
            <text:p>3970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9822" calcext:value-type="float">
            <text:p>39822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2758" calcext:value-type="float">
            <text:p>275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2785" calcext:value-type="float">
            <text:p>278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224" calcext:value-type="float">
            <text:p>22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43886" calcext:value-type="float">
            <text:p>4388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4082" calcext:value-type="float">
            <text:p>44082</text:p>
          </table:table-cell>
          <table:table-cell table:style-name="ce28" office:value-type="float" office:value="21710" calcext:value-type="float">
            <text:p>2171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1993" calcext:value-type="float">
            <text:p>2199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21346" calcext:value-type="float">
            <text:p>2134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1392" calcext:value-type="float">
            <text:p>21392</text:p>
          </table:table-cell>
          <table:table-cell table:style-name="ce28" office:value-type="float" office:value="2322" calcext:value-type="float">
            <text:p>232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327" calcext:value-type="float">
            <text:p>2327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115139" calcext:value-type="float">
            <text:p>115139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15748" calcext:value-type="float">
            <text:p>115748</text:p>
          </table:table-cell>
          <table:table-cell table:style-name="ce29" office:value-type="float" office:value="37069" calcext:value-type="float">
            <text:p>37069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2" calcext:value-type="float">
            <text:p>52</text:p>
          </table:table-cell>
          <table:table-cell table:style-name="ce37" office:value-type="float" office:value="37501" calcext:value-type="float">
            <text:p>3750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288991" calcext:value-type="float">
            <text:p>288991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290291" calcext:value-type="float">
            <text:p>290291</text:p>
          </table:table-cell>
          <table:table-cell table:style-name="ce28" office:value-type="float" office:value="107857" calcext:value-type="float">
            <text:p>107857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08745" calcext:value-type="float">
            <text:p>10874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10130" calcext:value-type="float">
            <text:p>1013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0221" calcext:value-type="float">
            <text:p>10221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786" calcext:value-type="float">
            <text:p>78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7855" calcext:value-type="float">
            <text:p>785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865" calcext:value-type="float">
            <text:p>7865</text:p>
          </table:table-cell>
          <table:table-cell table:style-name="ce28" office:value-type="float" office:value="505" calcext:value-type="float">
            <text:p>50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505" calcext:value-type="float">
            <text:p>50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4619" calcext:value-type="float">
            <text:p>461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640" calcext:value-type="float">
            <text:p>4640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6" office:value-type="float" office:value="748" calcext:value-type="float">
            <text:p>748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8375" calcext:value-type="float">
            <text:p>837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8515" calcext:value-type="float">
            <text:p>8515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36" office:value-type="float" office:value="863" calcext:value-type="float">
            <text:p>86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6717" calcext:value-type="float">
            <text:p>671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730" calcext:value-type="float">
            <text:p>6730</text:p>
          </table:table-cell>
          <table:table-cell table:style-name="ce28" office:value-type="float" office:value="10566" calcext:value-type="float">
            <text:p>1056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0601" calcext:value-type="float">
            <text:p>1060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2287" calcext:value-type="float">
            <text:p>228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326" calcext:value-type="float">
            <text:p>2326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64" calcext:value-type="float">
            <text:p>26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32062" calcext:value-type="float">
            <text:p>3206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32268" calcext:value-type="float">
            <text:p>32268</text:p>
          </table:table-cell>
          <table:table-cell table:style-name="ce28" office:value-type="float" office:value="16976" calcext:value-type="float">
            <text:p>1697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7131" calcext:value-type="float">
            <text:p>1713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6917" calcext:value-type="float">
            <text:p>6917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933" calcext:value-type="float">
            <text:p>6933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453" calcext:value-type="float">
            <text:p>453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62186" calcext:value-type="float">
            <text:p>62186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62794" calcext:value-type="float">
            <text:p>62794</text:p>
          </table:table-cell>
          <table:table-cell table:style-name="ce29" office:value-type="float" office:value="20712" calcext:value-type="float">
            <text:p>20712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2" calcext:value-type="float">
            <text:p>42</text:p>
          </table:table-cell>
          <table:table-cell table:style-name="ce37" office:value-type="float" office:value="20984" calcext:value-type="float">
            <text:p>2098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141148" calcext:value-type="float">
            <text:p>141148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142292" calcext:value-type="float">
            <text:p>142292</text:p>
          </table:table-cell>
          <table:table-cell table:style-name="ce28" office:value-type="float" office:value="51822" calcext:value-type="float">
            <text:p>51822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52335" calcext:value-type="float">
            <text:p>5233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33598" calcext:value-type="float">
            <text:p>3359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4491" calcext:value-type="float">
            <text:p>34491</text:p>
          </table:table-cell>
          <table:table-cell table:style-name="ce28" office:value-type="float" office:value="2898" calcext:value-type="float">
            <text:p>289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3088" calcext:value-type="float">
            <text:p>3088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22941" calcext:value-type="float">
            <text:p>2294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2970" calcext:value-type="float">
            <text:p>22970</text:p>
          </table:table-cell>
          <table:table-cell table:style-name="ce28" office:value-type="float" office:value="757" calcext:value-type="float">
            <text:p>75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757" calcext:value-type="float">
            <text:p>75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15511" calcext:value-type="float">
            <text:p>155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5656" calcext:value-type="float">
            <text:p>15656</text:p>
          </table:table-cell>
          <table:table-cell table:style-name="ce28" office:value-type="float" office:value="2498" calcext:value-type="float">
            <text:p>249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540" calcext:value-type="float">
            <text:p>2540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32610" calcext:value-type="float">
            <text:p>3261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3423" calcext:value-type="float">
            <text:p>33423</text:p>
          </table:table-cell>
          <table:table-cell table:style-name="ce28" office:value-type="float" office:value="2943" calcext:value-type="float">
            <text:p>294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3056" calcext:value-type="float">
            <text:p>305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17305" calcext:value-type="float">
            <text:p>1730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403" calcext:value-type="float">
            <text:p>17403</text:p>
          </table:table-cell>
          <table:table-cell table:style-name="ce28" office:value-type="float" office:value="21206" calcext:value-type="float">
            <text:p>21206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21455" calcext:value-type="float">
            <text:p>2145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9588" calcext:value-type="float">
            <text:p>958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9940" calcext:value-type="float">
            <text:p>9940</text:p>
          </table:table-cell>
          <table:table-cell table:style-name="ce28" office:value-type="float" office:value="1560" calcext:value-type="float">
            <text:p>156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642" calcext:value-type="float">
            <text:p>1642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119602" calcext:value-type="float">
            <text:p>119602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21024" calcext:value-type="float">
            <text:p>121024</text:p>
          </table:table-cell>
          <table:table-cell table:style-name="ce28" office:value-type="float" office:value="61017" calcext:value-type="float">
            <text:p>61017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76" calcext:value-type="float">
            <text:p>276</text:p>
          </table:table-cell>
          <table:table-cell table:style-name="ce36" office:value-type="float" office:value="62014" calcext:value-type="float">
            <text:p>6201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21982" calcext:value-type="float">
            <text:p>2198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2149" calcext:value-type="float">
            <text:p>22149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18" calcext:value-type="float">
            <text:p>218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214737" calcext:value-type="float">
            <text:p>214737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216831" calcext:value-type="float">
            <text:p>216831</text:p>
          </table:table-cell>
          <table:table-cell table:style-name="ce29" office:value-type="float" office:value="72906" calcext:value-type="float">
            <text:p>72906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15" calcext:value-type="float">
            <text:p>315</text:p>
          </table:table-cell>
          <table:table-cell table:style-name="ce37" office:value-type="float" office:value="74595" calcext:value-type="float">
            <text:p>7459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487874" calcext:value-type="float">
            <text:p>487874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1995" calcext:value-type="float">
            <text:p>1995</text:p>
          </table:table-cell>
          <table:table-cell table:style-name="ce28" office:value-type="float" office:value="2522" calcext:value-type="float">
            <text:p>2522</text:p>
          </table:table-cell>
          <table:table-cell table:style-name="ce28" office:value-type="float" office:value="493887" calcext:value-type="float">
            <text:p>493887</text:p>
          </table:table-cell>
          <table:table-cell table:style-name="ce28" office:value-type="float" office:value="165992" calcext:value-type="float">
            <text:p>165992</text:p>
          </table:table-cell>
          <table:table-cell table:style-name="ce28" office:value-type="float" office:value="1347" calcext:value-type="float">
            <text:p>1347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169365" calcext:value-type="float">
            <text:p>16936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38063" calcext:value-type="float">
            <text:p>38063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38585" calcext:value-type="float">
            <text:p>38585</text:p>
          </table:table-cell>
          <table:table-cell table:style-name="ce28" office:value-type="float" office:value="3645" calcext:value-type="float">
            <text:p>364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3727" calcext:value-type="float">
            <text:p>372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27570" calcext:value-type="float">
            <text:p>2757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7588" calcext:value-type="float">
            <text:p>27588</text:p>
          </table:table-cell>
          <table:table-cell table:style-name="ce28" office:value-type="float" office:value="1076" calcext:value-type="float">
            <text:p>107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6" office:value-type="float" office:value="1078" calcext:value-type="float">
            <text:p>1078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18059" calcext:value-type="float">
            <text:p>1805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8213" calcext:value-type="float">
            <text:p>18213</text:p>
          </table:table-cell>
          <table:table-cell table:style-name="ce28" office:value-type="float" office:value="3045" calcext:value-type="float">
            <text:p>304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3079" calcext:value-type="float">
            <text:p>307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37224" calcext:value-type="float">
            <text:p>3722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37748" calcext:value-type="float">
            <text:p>37748</text:p>
          </table:table-cell>
          <table:table-cell table:style-name="ce28" office:value-type="float" office:value="3139" calcext:value-type="float">
            <text:p>313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25" calcext:value-type="float">
            <text:p>25</text:p>
          </table:table-cell>
          <table:table-cell table:style-name="ce36" office:value-type="float" office:value="3256" calcext:value-type="float">
            <text:p>325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21380" calcext:value-type="float">
            <text:p>213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1445" calcext:value-type="float">
            <text:p>21445</text:p>
          </table:table-cell>
          <table:table-cell table:style-name="ce28" office:value-type="float" office:value="26595" calcext:value-type="float">
            <text:p>2659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26800" calcext:value-type="float">
            <text:p>26800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9053" calcext:value-type="float">
            <text:p>905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282" calcext:value-type="float">
            <text:p>9282</text:p>
          </table:table-cell>
          <table:table-cell table:style-name="ce28" office:value-type="float" office:value="1077" calcext:value-type="float">
            <text:p>107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131" calcext:value-type="float">
            <text:p>113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148783" calcext:value-type="float">
            <text:p>14878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149886" calcext:value-type="float">
            <text:p>149886</text:p>
          </table:table-cell>
          <table:table-cell table:style-name="ce28" office:value-type="float" office:value="79340" calcext:value-type="float">
            <text:p>7934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155" calcext:value-type="float">
            <text:p>155</text:p>
          </table:table-cell>
          <table:table-cell table:style-name="ce36" office:value-type="float" office:value="80154" calcext:value-type="float">
            <text:p>8015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38600" calcext:value-type="float">
            <text:p>3860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8683" calcext:value-type="float">
            <text:p>38683</text:p>
          </table:table-cell>
          <table:table-cell table:style-name="ce28" office:value-type="float" office:value="747" calcext:value-type="float">
            <text:p>747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748" calcext:value-type="float">
            <text:p>748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291169" calcext:value-type="float">
            <text:p>291169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1071" calcext:value-type="float">
            <text:p>1071</text:p>
          </table:table-cell>
          <table:table-cell table:style-name="ce29" office:value-type="float" office:value="293714" calcext:value-type="float">
            <text:p>293714</text:p>
          </table:table-cell>
          <table:table-cell table:style-name="ce29" office:value-type="float" office:value="81092" calcext:value-type="float">
            <text:p>81092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174" calcext:value-type="float">
            <text:p>174</text:p>
          </table:table-cell>
          <table:table-cell table:style-name="ce37" office:value-type="float" office:value="82423" calcext:value-type="float">
            <text:p>8242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629901" calcext:value-type="float">
            <text:p>629901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1894" calcext:value-type="float">
            <text:p>1894</text:p>
          </table:table-cell>
          <table:table-cell table:style-name="ce28" office:value-type="float" office:value="1869" calcext:value-type="float">
            <text:p>1869</text:p>
          </table:table-cell>
          <table:table-cell table:style-name="ce28" office:value-type="float" office:value="635144" calcext:value-type="float">
            <text:p>635144</text:p>
          </table:table-cell>
          <table:table-cell table:style-name="ce28" office:value-type="float" office:value="199756" calcext:value-type="float">
            <text:p>199756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452" calcext:value-type="float">
            <text:p>452</text:p>
          </table:table-cell>
          <table:table-cell table:style-name="ce36" office:value-type="float" office:value="202396" calcext:value-type="float">
            <text:p>20239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5375" calcext:value-type="float">
            <text:p>537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666" calcext:value-type="float">
            <text:p>5666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84" calcext:value-type="float">
            <text:p>28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9991" calcext:value-type="float">
            <text:p>999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247" calcext:value-type="float">
            <text:p>10247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564" calcext:value-type="float">
            <text:p>56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1840" calcext:value-type="float">
            <text:p>184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872" calcext:value-type="float">
            <text:p>1872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703" calcext:value-type="float">
            <text:p>70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4862" calcext:value-type="float">
            <text:p>486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971" calcext:value-type="float">
            <text:p>4971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6" office:value-type="float" office:value="389" calcext:value-type="float">
            <text:p>38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5820" calcext:value-type="float">
            <text:p>582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023" calcext:value-type="float">
            <text:p>6023</text:p>
          </table:table-cell>
          <table:table-cell table:style-name="ce28" office:value-type="float" office:value="8689" calcext:value-type="float">
            <text:p>86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8980" calcext:value-type="float">
            <text:p>8980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465" calcext:value-type="float">
            <text:p>46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51" calcext:value-type="float">
            <text:p>5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11007" calcext:value-type="float">
            <text:p>1100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137" calcext:value-type="float">
            <text:p>11137</text:p>
          </table:table-cell>
          <table:table-cell table:style-name="ce28" office:value-type="float" office:value="4005" calcext:value-type="float">
            <text:p>400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4084" calcext:value-type="float">
            <text:p>408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14488" calcext:value-type="float">
            <text:p>1448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922" calcext:value-type="float">
            <text:p>14922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929" calcext:value-type="float">
            <text:p>929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22894" calcext:value-type="float">
            <text:p>2289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3792" calcext:value-type="float">
            <text:p>23792</text:p>
          </table:table-cell>
          <table:table-cell table:style-name="ce29" office:value-type="float" office:value="6795" calcext:value-type="float">
            <text:p>679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37" office:value-type="float" office:value="7011" calcext:value-type="float">
            <text:p>701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76742" calcext:value-type="float">
            <text:p>7674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992" calcext:value-type="float">
            <text:p>1992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9111" calcext:value-type="float">
            <text:p>79111</text:p>
          </table:table-cell>
          <table:table-cell table:style-name="ce28" office:value-type="float" office:value="22320" calcext:value-type="float">
            <text:p>2232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2995" calcext:value-type="float">
            <text:p>2299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20447" calcext:value-type="float">
            <text:p>2044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0739" calcext:value-type="float">
            <text:p>20739</text:p>
          </table:table-cell>
          <table:table-cell table:style-name="ce28" office:value-type="float" office:value="1772" calcext:value-type="float">
            <text:p>177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36" office:value-type="float" office:value="1806" calcext:value-type="float">
            <text:p>180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33717" calcext:value-type="float">
            <text:p>3371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4000" calcext:value-type="float">
            <text:p>34000</text:p>
          </table:table-cell>
          <table:table-cell table:style-name="ce28" office:value-type="float" office:value="2417" calcext:value-type="float">
            <text:p>241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430" calcext:value-type="float">
            <text:p>2430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6572" calcext:value-type="float">
            <text:p>657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643" calcext:value-type="float">
            <text:p>6643</text:p>
          </table:table-cell>
          <table:table-cell table:style-name="ce28" office:value-type="float" office:value="1842" calcext:value-type="float">
            <text:p>184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6" office:value-type="float" office:value="1856" calcext:value-type="float">
            <text:p>185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12881" calcext:value-type="float">
            <text:p>1288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3034" calcext:value-type="float">
            <text:p>13034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991" calcext:value-type="float">
            <text:p>99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30832" calcext:value-type="float">
            <text:p>3083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1098" calcext:value-type="float">
            <text:p>31098</text:p>
          </table:table-cell>
          <table:table-cell table:style-name="ce28" office:value-type="float" office:value="37270" calcext:value-type="float">
            <text:p>3727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87" calcext:value-type="float">
            <text:p>287</text:p>
          </table:table-cell>
          <table:table-cell table:number-columns-repeated="2" table:style-name="ce28" office:value-type="float" office:value="26" calcext:value-type="float">
            <text:p>26</text:p>
          </table:table-cell>
          <table:table-cell table:style-name="ce36" office:value-type="float" office:value="37642" calcext:value-type="float">
            <text:p>37642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2417" calcext:value-type="float">
            <text:p>241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461" calcext:value-type="float">
            <text:p>246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131" calcext:value-type="float">
            <text:p>13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50517" calcext:value-type="float">
            <text:p>5051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0999" calcext:value-type="float">
            <text:p>50999</text:p>
          </table:table-cell>
          <table:table-cell table:style-name="ce28" office:value-type="float" office:value="23712" calcext:value-type="float">
            <text:p>23712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4165" calcext:value-type="float">
            <text:p>2416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18249" calcext:value-type="float">
            <text:p>1824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397" calcext:value-type="float">
            <text:p>18397</text:p>
          </table:table-cell>
          <table:table-cell table:style-name="ce28" office:value-type="float" office:value="1368" calcext:value-type="float">
            <text:p>136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6" office:value-type="float" office:value="1378" calcext:value-type="float">
            <text:p>1378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138072" calcext:value-type="float">
            <text:p>138072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256" calcext:value-type="float">
            <text:p>1256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40193" calcext:value-type="float">
            <text:p>140193</text:p>
          </table:table-cell>
          <table:table-cell table:style-name="ce29" office:value-type="float" office:value="45017" calcext:value-type="float">
            <text:p>45017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44" calcext:value-type="float">
            <text:p>44</text:p>
          </table:table-cell>
          <table:table-cell table:style-name="ce37" office:value-type="float" office:value="45750" calcext:value-type="float">
            <text:p>45750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313704" calcext:value-type="float">
            <text:p>313704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346" calcext:value-type="float">
            <text:p>2346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17564" calcext:value-type="float">
            <text:p>317564</text:p>
          </table:table-cell>
          <table:table-cell table:style-name="ce28" office:value-type="float" office:value="114497" calcext:value-type="float">
            <text:p>114497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116149" calcext:value-type="float">
            <text:p>11614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10668" calcext:value-type="float">
            <text:p>10668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2" table:style-name="ce28" office:value-type="float" office:value="76" calcext:value-type="float">
            <text:p>76</text:p>
          </table:table-cell>
          <table:table-cell table:style-name="ce28" office:value-type="float" office:value="11063" calcext:value-type="float">
            <text:p>11063</text:p>
          </table:table-cell>
          <table:table-cell table:style-name="ce28" office:value-type="float" office:value="1501" calcext:value-type="float">
            <text:p>150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565" calcext:value-type="float">
            <text:p>156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17531" calcext:value-type="float">
            <text:p>1753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7825" calcext:value-type="float">
            <text:p>17825</text:p>
          </table:table-cell>
          <table:table-cell table:style-name="ce28" office:value-type="float" office:value="1745" calcext:value-type="float">
            <text:p>174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1767" calcext:value-type="float">
            <text:p>176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3585" calcext:value-type="float">
            <text:p>358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729" calcext:value-type="float">
            <text:p>3729</text:p>
          </table:table-cell>
          <table:table-cell table:style-name="ce28" office:value-type="float" office:value="1174" calcext:value-type="float">
            <text:p>117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1217" calcext:value-type="float">
            <text:p>121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6649" calcext:value-type="float">
            <text:p>664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895" calcext:value-type="float">
            <text:p>6895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618" calcext:value-type="float">
            <text:p>618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14930" calcext:value-type="float">
            <text:p>1493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5221" calcext:value-type="float">
            <text:p>15221</text:p>
          </table:table-cell>
          <table:table-cell table:style-name="ce28" office:value-type="float" office:value="23942" calcext:value-type="float">
            <text:p>23942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24422" calcext:value-type="float">
            <text:p>24422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1475" calcext:value-type="float">
            <text:p>147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31" calcext:value-type="float">
            <text:p>153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71" calcext:value-type="float">
            <text:p>7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29203" calcext:value-type="float">
            <text:p>2920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29671" calcext:value-type="float">
            <text:p>29671</text:p>
          </table:table-cell>
          <table:table-cell table:style-name="ce28" office:value-type="float" office:value="11872" calcext:value-type="float">
            <text:p>11872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12549" calcext:value-type="float">
            <text:p>1254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7077" calcext:value-type="float">
            <text:p>707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34" calcext:value-type="float">
            <text:p>34</text:p>
          </table:table-cell>
          <table:table-cell table:style-name="ce28" office:value-type="float" office:value="7259" calcext:value-type="float">
            <text:p>7259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952" calcext:value-type="float">
            <text:p>952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89336" calcext:value-type="float">
            <text:p>89336</text:p>
          </table:table-cell>
          <table:table-cell table:style-name="ce29" office:value-type="float" office:value="1019" calcext:value-type="float">
            <text:p>1019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1639" calcext:value-type="float">
            <text:p>1639</text:p>
          </table:table-cell>
          <table:table-cell table:style-name="ce29" office:value-type="float" office:value="1018" calcext:value-type="float">
            <text:p>1018</text:p>
          </table:table-cell>
          <table:table-cell table:style-name="ce29" office:value-type="float" office:value="93972" calcext:value-type="float">
            <text:p>93972</text:p>
          </table:table-cell>
          <table:table-cell table:style-name="ce29" office:value-type="float" office:value="20968" calcext:value-type="float">
            <text:p>20968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39" calcext:value-type="float">
            <text:p>139</text:p>
          </table:table-cell>
          <table:table-cell table:style-name="ce37" office:value-type="float" office:value="22712" calcext:value-type="float">
            <text:p>22712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180454" calcext:value-type="float">
            <text:p>180454</text:p>
          </table:table-cell>
          <table:table-cell table:style-name="ce28" office:value-type="float" office:value="1564" calcext:value-type="float">
            <text:p>1564</text:p>
          </table:table-cell>
          <table:table-cell table:style-name="ce28" office:value-type="float" office:value="1745" calcext:value-type="float">
            <text:p>1745</text:p>
          </table:table-cell>
          <table:table-cell table:style-name="ce28" office:value-type="float" office:value="1938" calcext:value-type="float">
            <text:p>1938</text:p>
          </table:table-cell>
          <table:table-cell table:style-name="ce28" office:value-type="float" office:value="1465" calcext:value-type="float">
            <text:p>1465</text:p>
          </table:table-cell>
          <table:table-cell table:style-name="ce28" office:value-type="float" office:value="187166" calcext:value-type="float">
            <text:p>187166</text:p>
          </table:table-cell>
          <table:table-cell table:style-name="ce28" office:value-type="float" office:value="62764" calcext:value-type="float">
            <text:p>62764</text:p>
          </table:table-cell>
          <table:table-cell table:style-name="ce28" office:value-type="float" office:value="1620" calcext:value-type="float">
            <text:p>1620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305" calcext:value-type="float">
            <text:p>305</text:p>
          </table:table-cell>
          <table:table-cell table:style-name="ce36" office:value-type="float" office:value="65873" calcext:value-type="float">
            <text:p>6587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14248" calcext:value-type="float">
            <text:p>14248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14930" calcext:value-type="float">
            <text:p>14930</text:p>
          </table:table-cell>
          <table:table-cell table:style-name="ce28" office:value-type="float" office:value="1527" calcext:value-type="float">
            <text:p>152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1686" calcext:value-type="float">
            <text:p>1686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899" calcext:value-type="float">
            <text:p>899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34" calcext:value-type="float">
            <text:p>3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7047" calcext:value-type="float">
            <text:p>704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151" calcext:value-type="float">
            <text:p>7151</text:p>
          </table:table-cell>
          <table:table-cell table:style-name="ce28" office:value-type="float" office:value="1004" calcext:value-type="float">
            <text:p>100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035" calcext:value-type="float">
            <text:p>103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14535" calcext:value-type="float">
            <text:p>1453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5186" calcext:value-type="float">
            <text:p>15186</text:p>
          </table:table-cell>
          <table:table-cell table:style-name="ce28" office:value-type="float" office:value="1734" calcext:value-type="float">
            <text:p>173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837" calcext:value-type="float">
            <text:p>183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2657" calcext:value-type="float">
            <text:p>265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708" calcext:value-type="float">
            <text:p>2708</text:p>
          </table:table-cell>
          <table:table-cell table:style-name="ce28" office:value-type="float" office:value="6366" calcext:value-type="float">
            <text:p>636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6534" calcext:value-type="float">
            <text:p>653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5347" calcext:value-type="float">
            <text:p>534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5607" calcext:value-type="float">
            <text:p>5607</text:p>
          </table:table-cell>
          <table:table-cell table:style-name="ce28" office:value-type="float" office:value="1049" calcext:value-type="float">
            <text:p>104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109" calcext:value-type="float">
            <text:p>110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63058" calcext:value-type="float">
            <text:p>63058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64133" calcext:value-type="float">
            <text:p>64133</text:p>
          </table:table-cell>
          <table:table-cell table:style-name="ce28" office:value-type="float" office:value="34230" calcext:value-type="float">
            <text:p>34230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34893" calcext:value-type="float">
            <text:p>3489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1835" calcext:value-type="float">
            <text:p>183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866" calcext:value-type="float">
            <text:p>1866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113571" calcext:value-type="float">
            <text:p>113571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115178" calcext:value-type="float">
            <text:p>115178</text:p>
          </table:table-cell>
          <table:table-cell table:style-name="ce29" office:value-type="float" office:value="38123" calcext:value-type="float">
            <text:p>38123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35" calcext:value-type="float">
            <text:p>235</text:p>
          </table:table-cell>
          <table:table-cell table:style-name="ce37" office:value-type="float" office:value="39194" calcext:value-type="float">
            <text:p>3919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223197" calcext:value-type="float">
            <text:p>223197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486" calcext:value-type="float">
            <text:p>1486</text:p>
          </table:table-cell>
          <table:table-cell table:style-name="ce28" office:value-type="float" office:value="2052" calcext:value-type="float">
            <text:p>2052</text:p>
          </table:table-cell>
          <table:table-cell table:style-name="ce28" office:value-type="float" office:value="227660" calcext:value-type="float">
            <text:p>227660</text:p>
          </table:table-cell>
          <table:table-cell table:style-name="ce28" office:value-type="float" office:value="84087" calcext:value-type="float">
            <text:p>84087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676" calcext:value-type="float">
            <text:p>676</text:p>
          </table:table-cell>
          <table:table-cell table:style-name="ce36" office:value-type="float" office:value="86342" calcext:value-type="float">
            <text:p>86342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9194" calcext:value-type="float">
            <text:p>919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9347" calcext:value-type="float">
            <text:p>9347</text:p>
          </table:table-cell>
          <table:table-cell table:style-name="ce28" office:value-type="float" office:value="1093" calcext:value-type="float">
            <text:p>109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9" calcext:value-type="float">
            <text:p>110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1083" calcext:value-type="float">
            <text:p>108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4656" calcext:value-type="float">
            <text:p>465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4696" calcext:value-type="float">
            <text:p>4696</text:p>
          </table:table-cell>
          <table:table-cell table:style-name="ce28" office:value-type="float" office:value="671" calcext:value-type="float">
            <text:p>671</text:p>
          </table:table-cell>
          <table:table-cell table:style-name="ce33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679" calcext:value-type="float">
            <text:p>67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11015" calcext:value-type="float">
            <text:p>1101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1209" calcext:value-type="float">
            <text:p>11209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783" calcext:value-type="float">
            <text:p>78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2245" calcext:value-type="float">
            <text:p>224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262" calcext:value-type="float">
            <text:p>2262</text:p>
          </table:table-cell>
          <table:table-cell table:style-name="ce28" office:value-type="float" office:value="4437" calcext:value-type="float">
            <text:p>443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4504" calcext:value-type="float">
            <text:p>450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2562" calcext:value-type="float">
            <text:p>256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610" calcext:value-type="float">
            <text:p>2610</text:p>
          </table:table-cell>
          <table:table-cell table:style-name="ce28" office:value-type="float" office:value="193" calcext:value-type="float">
            <text:p>19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97" calcext:value-type="float">
            <text:p>19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45865" calcext:value-type="float">
            <text:p>4586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46288" calcext:value-type="float">
            <text:p>46288</text:p>
          </table:table-cell>
          <table:table-cell table:style-name="ce28" office:value-type="float" office:value="23066" calcext:value-type="float">
            <text:p>2306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23269" calcext:value-type="float">
            <text:p>2326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2113" calcext:value-type="float">
            <text:p>211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125" calcext:value-type="float">
            <text:p>2125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103558" calcext:value-type="float">
            <text:p>10355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104646" calcext:value-type="float">
            <text:p>104646</text:p>
          </table:table-cell>
          <table:table-cell table:style-name="ce29" office:value-type="float" office:value="22173" calcext:value-type="float">
            <text:p>2217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1" calcext:value-type="float">
            <text:p>61</text:p>
          </table:table-cell>
          <table:table-cell table:style-name="ce37" office:value-type="float" office:value="22458" calcext:value-type="float">
            <text:p>22458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182291" calcext:value-type="float">
            <text:p>182291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184268" calcext:value-type="float">
            <text:p>184268</text:p>
          </table:table-cell>
          <table:table-cell table:style-name="ce28" office:value-type="float" office:value="52436" calcext:value-type="float">
            <text:p>5243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53053" calcext:value-type="float">
            <text:p>53053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9324" calcext:value-type="float">
            <text:p>9324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543" calcext:value-type="float">
            <text:p>9543</text:p>
          </table:table-cell>
          <table:table-cell table:style-name="ce28" office:value-type="float" office:value="1169" calcext:value-type="float">
            <text:p>116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217" calcext:value-type="float">
            <text:p>121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664" calcext:value-type="float">
            <text:p>66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4657" calcext:value-type="float">
            <text:p>465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738" calcext:value-type="float">
            <text:p>4738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790" calcext:value-type="float">
            <text:p>790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8184" calcext:value-type="float">
            <text:p>818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8408" calcext:value-type="float">
            <text:p>8408</text:p>
          </table:table-cell>
          <table:table-cell table:style-name="ce28" office:value-type="float" office:value="1292" calcext:value-type="float">
            <text:p>129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361" calcext:value-type="float">
            <text:p>136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1753" calcext:value-type="float">
            <text:p>175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68" calcext:value-type="float">
            <text:p>1768</text:p>
          </table:table-cell>
          <table:table-cell table:style-name="ce28" office:value-type="float" office:value="4057" calcext:value-type="float">
            <text:p>405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4145" calcext:value-type="float">
            <text:p>414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3475" calcext:value-type="float">
            <text:p>347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619" calcext:value-type="float">
            <text:p>3619</text:p>
          </table:table-cell>
          <table:table-cell table:style-name="ce28" office:value-type="float" office:value="611" calcext:value-type="float">
            <text:p>611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36" office:value-type="float" office:value="651" calcext:value-type="float">
            <text:p>65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49232" calcext:value-type="float">
            <text:p>4923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49678" calcext:value-type="float">
            <text:p>49678</text:p>
          </table:table-cell>
          <table:table-cell table:style-name="ce28" office:value-type="float" office:value="29192" calcext:value-type="float">
            <text:p>2919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29611" calcext:value-type="float">
            <text:p>2961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1943" calcext:value-type="float">
            <text:p>194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952" calcext:value-type="float">
            <text:p>195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57894" calcext:value-type="float">
            <text:p>57894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58600" calcext:value-type="float">
            <text:p>58600</text:p>
          </table:table-cell>
          <table:table-cell table:style-name="ce29" office:value-type="float" office:value="20263" calcext:value-type="float">
            <text:p>20263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68" calcext:value-type="float">
            <text:p>68</text:p>
          </table:table-cell>
          <table:table-cell table:style-name="ce37" office:value-type="float" office:value="20947" calcext:value-type="float">
            <text:p>20947</text:p>
          </table:table-cell>
          <table:table-cell table:style-name="ce25"/>
          <table:table-cell table:number-columns-repeated="1008"/>
        </table:table-row>
        <table:table-row table:style-name="ro4">
          <table:table-cell table:style-name="ce7" office:value-type="string" calcext:value-type="string">
            <text:p>s-GRAVENHAGE</text:p>
          </table:table-cell>
          <table:table-cell table:style-name="ce17" office:value-type="string" calcext:value-type="string">
            <text:p><text:s text:c="28"/>Totaal</text:p>
          </table:table-cell>
          <table:table-cell table:style-name="Default"/>
          <table:table-cell table:style-name="ce23" office:value-type="float" office:value="137126" calcext:value-type="float">
            <text:p>137126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138973" calcext:value-type="float">
            <text:p>138973</text:p>
          </table:table-cell>
          <table:table-cell table:style-name="ce28" office:value-type="float" office:value="57370" calcext:value-type="float">
            <text:p>57370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58739" calcext:value-type="float">
            <text:p>5873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3156" calcext:value-type="float">
            <text:p>315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200" calcext:value-type="float">
            <text:p>3200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97" calcext:value-type="float">
            <text:p>29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3" office:value-type="float" office:value="216" calcext:value-type="float">
            <text:p>216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3" office:value-type="float" office:value="1829" calcext:value-type="float">
            <text:p>182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842" calcext:value-type="float">
            <text:p>1842</text:p>
          </table:table-cell>
          <table:table-cell table:style-name="ce28" office:value-type="float" office:value="307" calcext:value-type="float">
            <text:p>30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307" calcext:value-type="float">
            <text:p>307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6" office:value-type="string" calcext:value-type="string">
            <text:p>Bedrijfshoofden Overige</text:p>
          </table:table-cell>
          <table:table-cell table:style-name="Default"/>
          <table:table-cell table:style-name="ce23" office:value-type="float" office:value="2346" calcext:value-type="float">
            <text:p>234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432" calcext:value-type="float">
            <text:p>2432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45" calcext:value-type="float">
            <text:p>345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3" office:value-type="float" office:value="765" calcext:value-type="float">
            <text:p>76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1916" calcext:value-type="float">
            <text:p>191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1929" calcext:value-type="float">
            <text:p>192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3" office:value-type="float" office:value="999" calcext:value-type="float">
            <text:p>99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18" calcext:value-type="float">
            <text:p>1018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21" calcext:value-type="float">
            <text:p>121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3" office:value-type="float" office:value="13551" calcext:value-type="float">
            <text:p>1355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35" calcext:value-type="float">
            <text:p>35</text:p>
          </table:table-cell>
          <table:table-cell table:style-name="ce28" office:value-type="float" office:value="13643" calcext:value-type="float">
            <text:p>13643</text:p>
          </table:table-cell>
          <table:table-cell table:style-name="ce28" office:value-type="float" office:value="8071" calcext:value-type="float">
            <text:p>807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8139" calcext:value-type="float">
            <text:p>8139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3" office:value-type="float" office:value="376" calcext:value-type="float">
            <text:p>376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4" office:value-type="float" office:value="24048" calcext:value-type="float">
            <text:p>24048</text:p>
          </table:table-cell>
          <table:table-cell table:number-columns-repeated="2" table:style-name="ce29" office:value-type="float" office:value="28" calcext:value-type="float">
            <text:p>28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24455" calcext:value-type="float">
            <text:p>24455</text:p>
          </table:table-cell>
          <table:table-cell table:style-name="ce29" office:value-type="float" office:value="7237" calcext:value-type="float">
            <text:p>723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37" office:value-type="float" office:value="7355" calcext:value-type="float">
            <text:p>7355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8" office:value-type="string" calcext:value-type="string">
            <text:p><text:s text:c="28"/>Totaal</text:p>
          </table:table-cell>
          <table:table-cell table:style-name="Default"/>
          <table:table-cell table:style-name="ce24" office:value-type="float" office:value="47286" calcext:value-type="float">
            <text:p>4728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47955" calcext:value-type="float">
            <text:p>47955</text:p>
          </table:table-cell>
          <table:table-cell table:style-name="ce29" office:value-type="float" office:value="18295" calcext:value-type="float">
            <text:p>1829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8" calcext:value-type="float">
            <text:p>58</text:p>
          </table:table-cell>
          <table:table-cell table:style-name="ce37" office:value-type="float" office:value="18521" calcext:value-type="float">
            <text:p>18521</text:p>
          </table:table-cell>
          <table:table-cell table:style-name="ce25"/>
          <table:table-cell table:number-columns-repeated="1008"/>
        </table:table-row>
        <table:table-row table:style-name="ro2" table:number-rows-repeated="26">
          <table:table-cell table:style-name="Default" table:number-columns-repeated="3"/>
          <table:table-cell table:style-name="ce25" table:number-columns-repeated="13"/>
          <table:table-cell table:number-columns-repeated="1008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55.041489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1" style:display-name="PageStyle_Tabel 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4:54:00.613000000</meta:creation-date>
    <dc:creator>Helpdesk</dc:creator>
    <dc:date>2004-12-16T14:34:45</dc:date>
    <meta:generator>LibreOffice/4.2.8.2$Linux_X86_64 LibreOffice_project/420m0$Build-2</meta:generator>
    <meta:document-statistic meta:table-count="1" meta:cell-count="2116" meta:object-count="0"/>
  </office:meta>
</office:document-meta>
</file>