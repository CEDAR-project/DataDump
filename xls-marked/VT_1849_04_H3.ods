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3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TL_20_Metadata">
      <style:table-cell-properties fo:padding="0.071cm"/>
    </style:style>
    <style:style style:name="ce12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3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6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number-columns-repeated="8" table:default-cell-style-name="Default"/>
        <table:table-column table:style-name="co5" table:default-cell-style-name="ce42"/>
        <table:table-column table:style-name="co6" table:number-columns-repeated="6" table:default-cell-style-name="ce52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ROVINCIE GRONINGEN - DERDE GEDEELTE - INDEELING DER BEVOLKING NAAR DEN OUDERDOM <text:s text:c="2"/></text:p>
          </table:table-cell>
          <table:table-cell table:style-name="ce10"/>
          <table:table-cell table:style-name="ce15"/>
          <table:table-cell table:style-name="ce17" table:number-columns-repeated="9"/>
          <table:table-cell table:style-name="ce47" table:number-columns-repeated="5"/>
          <table:table-cell table:style-name="ce58"/>
          <table:table-cell table:style-name="ce62" table:number-columns-repeated="1006"/>
        </table:table-row>
        <table:table-row table:style-name="ro1">
          <table:table-cell table:style-name="ce2" table:number-columns-repeated="12"/>
          <table:table-cell table:style-name="ce48" table:number-columns-repeated="6"/>
          <table:table-cell table:style-name="ce62"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4">
            <text:p>GEBOORTEJAAR</text:p>
          </table:table-cell>
          <table:table-cell table:style-name="ce3" office:value-type="string" calcext:value-type="string" table:number-columns-spanned="1" table:number-rows-spanned="4">
            <text:p>OUDERDOM.</text:p>
          </table:table-cell>
          <table:table-cell table:style-name="ce16"/>
          <table:table-cell table:style-name="ce18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26"/>
          <table:covered-table-cell table:style-name="ce35"/>
          <table:table-cell table:style-name="ce18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26"/>
          <table:covered-table-cell table:style-name="ce35"/>
          <table:table-cell table:style-name="ce39" office:value-type="string" calcext:value-type="string" table:number-columns-spanned="1" table:number-rows-spanned="4">
            <text:p>Algemeen Totaal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3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style-name="ce62" table:number-columns-repeated="1006"/>
        </table:table-row>
        <table:table-row table:style-name="ro2">
          <table:covered-table-cell table:number-columns-repeated="2" table:style-name="ce4"/>
          <table:table-cell table:style-name="ce16"/>
          <table:table-cell table:style-name="ce19" office:value-type="string" calcext:value-type="string" table:number-columns-spanned="1" table:number-rows-spanned="3">
            <text:p>Ongehuwd</text:p>
          </table:table-cell>
          <table:table-cell table:style-name="ce27" office:value-type="string" calcext:value-type="string" table:number-columns-spanned="1" table:number-rows-spanned="3">
            <text:p>Gehuwd</text:p>
          </table:table-cell>
          <table:table-cell table:style-name="ce27" office:value-type="string" calcext:value-type="string" table:number-columns-spanned="1" table:number-rows-spanned="3">
            <text:p>Weduwnaars</text:p>
          </table:table-cell>
          <table:table-cell table:style-name="ce36" office:value-type="string" calcext:value-type="string" table:number-columns-spanned="1" table:number-rows-spanned="3">
            <text:p>Totaal</text:p>
          </table:table-cell>
          <table:table-cell table:style-name="ce19" office:value-type="string" calcext:value-type="string" table:number-columns-spanned="1" table:number-rows-spanned="3">
            <text:p>Ongehuwd</text:p>
          </table:table-cell>
          <table:table-cell table:style-name="ce27" office:value-type="string" calcext:value-type="string" table:number-columns-spanned="1" table:number-rows-spanned="3">
            <text:p>Gehuwd</text:p>
          </table:table-cell>
          <table:table-cell table:style-name="ce27" office:value-type="string" calcext:value-type="string" table:number-columns-spanned="1" table:number-rows-spanned="3">
            <text:p>Weduwen</text:p>
          </table:table-cell>
          <table:table-cell table:style-name="ce36" office:value-type="string" calcext:value-type="string" table:number-columns-spanned="1" table:number-rows-spanned="3">
            <text:p>Totaal</text:p>
          </table:table-cell>
          <table:covered-table-cell table:style-name="ce40"/>
          <table:covered-table-cell table:style-name="ce50"/>
          <table:covered-table-cell table:style-name="ce54"/>
          <table:covered-table-cell table:number-columns-repeated="3" table:style-name="ce56"/>
          <table:covered-table-cell table:style-name="ce60"/>
          <table:table-cell table:style-name="ce62" table:number-columns-repeated="1006"/>
        </table:table-row>
        <table:table-row table:style-name="ro2">
          <table:covered-table-cell table:number-columns-repeated="2" table:style-name="ce4"/>
          <table:table-cell table:style-name="ce16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40"/>
          <table:covered-table-cell table:style-name="ce50"/>
          <table:covered-table-cell table:style-name="ce54"/>
          <table:covered-table-cell table:number-columns-repeated="3" table:style-name="ce56"/>
          <table:covered-table-cell table:style-name="ce60"/>
          <table:table-cell table:style-name="ce62" table:number-columns-repeated="1006"/>
        </table:table-row>
        <table:table-row table:style-name="ro2">
          <table:covered-table-cell table:number-columns-repeated="2" table:style-name="ce5"/>
          <table:table-cell table:style-name="ce16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41"/>
          <table:covered-table-cell table:style-name="ce51"/>
          <table:covered-table-cell table:style-name="ce55"/>
          <table:covered-table-cell table:number-columns-repeated="3" table:style-name="ce57"/>
          <table:covered-table-cell table:style-name="ce61"/>
          <table:table-cell table:style-name="ce62"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float" office:value="1849" calcext:value-type="float">
            <text:p>1849</text:p>
          </table:table-cell>
          <table:table-cell table:style-name="ce12" office:value-type="string" calcext:value-type="string">
            <text:p>Beneden het jaar.</text:p>
          </table:table-cell>
          <table:table-cell table:style-name="Default"/>
          <table:table-cell table:style-name="ce22" office:value-type="float" office:value="470" calcext:value-type="float">
            <text:p>470</text:p>
          </table:table-cell>
          <table:table-cell table:style-name="ce30" table:number-columns-repeated="2"/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table:number-columns-repeated="2"/>
          <table:table-cell table:style-name="ce30" office:value-type="float" office:value="428" calcext:value-type="float">
            <text:p>428</text:p>
          </table:table-cell>
          <table:table-cell table:style-name="ce43" office:value-type="float" office:value="898" calcext:value-type="float">
            <text:p>898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 table:style-name="Default"/>
          <table:table-cell table:style-name="ce23" office:value-type="float" office:value="346" calcext:value-type="float">
            <text:p>346</text:p>
          </table:table-cell>
          <table:table-cell table:style-name="ce31" table:number-columns-repeated="2"/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table:number-columns-repeated="2"/>
          <table:table-cell table:style-name="ce31" office:value-type="float" office:value="377" calcext:value-type="float">
            <text:p>377</text:p>
          </table:table-cell>
          <table:table-cell table:style-name="ce44" office:value-type="float" office:value="723" calcext:value-type="float">
            <text:p>723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 table:style-name="Default"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table:number-columns-repeated="2"/>
          <table:table-cell table:style-name="ce31" office:value-type="float" office:value="347" calcext:value-type="float">
            <text:p>347</text:p>
          </table:table-cell>
          <table:table-cell table:style-name="ce44" office:value-type="float" office:value="674" calcext:value-type="float">
            <text:p>674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 table:style-name="Default"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table:number-columns-repeated="2"/>
          <table:table-cell table:style-name="ce31" office:value-type="float" office:value="341" calcext:value-type="float">
            <text:p>341</text:p>
          </table:table-cell>
          <table:table-cell table:style-name="ce44" office:value-type="float" office:value="668" calcext:value-type="float">
            <text:p>668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 table:style-name="Default"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table:number-columns-repeated="2"/>
          <table:table-cell table:style-name="ce31" office:value-type="float" office:value="351" calcext:value-type="float">
            <text:p>351</text:p>
          </table:table-cell>
          <table:table-cell table:style-name="ce44" office:value-type="float" office:value="678" calcext:value-type="float">
            <text:p>678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 table:style-name="Default"/>
          <table:table-cell table:style-name="ce23" office:value-type="float" office:value="391" calcext:value-type="float">
            <text:p>391</text:p>
          </table:table-cell>
          <table:table-cell table:style-name="ce31" table:number-columns-repeated="2"/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table:number-columns-repeated="2"/>
          <table:table-cell table:style-name="ce31" office:value-type="float" office:value="427" calcext:value-type="float">
            <text:p>427</text:p>
          </table:table-cell>
          <table:table-cell table:style-name="ce44" office:value-type="float" office:value="818" calcext:value-type="float">
            <text:p>818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 table:style-name="Default"/>
          <table:table-cell table:style-name="ce23" office:value-type="float" office:value="333" calcext:value-type="float">
            <text:p>333</text:p>
          </table:table-cell>
          <table:table-cell table:style-name="ce31" table:number-columns-repeated="2"/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table:number-columns-repeated="2"/>
          <table:table-cell table:style-name="ce31" office:value-type="float" office:value="354" calcext:value-type="float">
            <text:p>354</text:p>
          </table:table-cell>
          <table:table-cell table:style-name="ce44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 table:style-name="Default"/>
          <table:table-cell table:style-name="ce23" office:value-type="float" office:value="359" calcext:value-type="float">
            <text:p>359</text:p>
          </table:table-cell>
          <table:table-cell table:style-name="ce31" table:number-columns-repeated="2"/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table:number-columns-repeated="2"/>
          <table:table-cell table:style-name="ce31" office:value-type="float" office:value="344" calcext:value-type="float">
            <text:p>344</text:p>
          </table:table-cell>
          <table:table-cell table:style-name="ce44" office:value-type="float" office:value="703" calcext:value-type="float">
            <text:p>703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 table:style-name="Default"/>
          <table:table-cell table:style-name="ce23" office:value-type="float" office:value="331" calcext:value-type="float">
            <text:p>331</text:p>
          </table:table-cell>
          <table:table-cell table:style-name="ce31" table:number-columns-repeated="2"/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table:number-columns-repeated="2"/>
          <table:table-cell table:style-name="ce31" office:value-type="float" office:value="360" calcext:value-type="float">
            <text:p>360</text:p>
          </table:table-cell>
          <table:table-cell table:style-name="ce44" office:value-type="float" office:value="691" calcext:value-type="float">
            <text:p>691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 table:style-name="Default"/>
          <table:table-cell table:style-name="ce23" office:value-type="float" office:value="322" calcext:value-type="float">
            <text:p>322</text:p>
          </table:table-cell>
          <table:table-cell table:style-name="ce31" table:number-columns-repeated="2"/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table:number-columns-repeated="2"/>
          <table:table-cell table:style-name="ce31" office:value-type="float" office:value="359" calcext:value-type="float">
            <text:p>359</text:p>
          </table:table-cell>
          <table:table-cell table:style-name="ce44" office:value-type="float" office:value="681" calcext:value-type="float">
            <text:p>681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 table:style-name="Default"/>
          <table:table-cell table:style-name="ce23" office:value-type="float" office:value="393" calcext:value-type="float">
            <text:p>393</text:p>
          </table:table-cell>
          <table:table-cell table:style-name="ce31" table:number-columns-repeated="2"/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table:number-columns-repeated="2"/>
          <table:table-cell table:style-name="ce31" office:value-type="float" office:value="349" calcext:value-type="float">
            <text:p>349</text:p>
          </table:table-cell>
          <table:table-cell table:style-name="ce44" office:value-type="float" office:value="742" calcext:value-type="float">
            <text:p>742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 table:style-name="Default"/>
          <table:table-cell table:style-name="ce23" office:value-type="float" office:value="317" calcext:value-type="float">
            <text:p>317</text:p>
          </table:table-cell>
          <table:table-cell table:style-name="ce31" table:number-columns-repeated="2"/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table:number-columns-repeated="2"/>
          <table:table-cell table:style-name="ce31" office:value-type="float" office:value="341" calcext:value-type="float">
            <text:p>341</text:p>
          </table:table-cell>
          <table:table-cell table:style-name="ce44" office:value-type="float" office:value="658" calcext:value-type="float">
            <text:p>658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 table:style-name="Default"/>
          <table:table-cell table:style-name="ce23" office:value-type="float" office:value="351" calcext:value-type="float">
            <text:p>351</text:p>
          </table:table-cell>
          <table:table-cell table:style-name="ce31" table:number-columns-repeated="2"/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table:number-columns-repeated="2"/>
          <table:table-cell table:style-name="ce31" office:value-type="float" office:value="348" calcext:value-type="float">
            <text:p>348</text:p>
          </table:table-cell>
          <table:table-cell table:style-name="ce44" office:value-type="float" office:value="699" calcext:value-type="float">
            <text:p>699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 table:style-name="Default"/>
          <table:table-cell table:style-name="ce23" office:value-type="float" office:value="347" calcext:value-type="float">
            <text:p>347</text:p>
          </table:table-cell>
          <table:table-cell table:style-name="ce31" table:number-columns-repeated="2"/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table:number-columns-repeated="2"/>
          <table:table-cell table:style-name="ce31" office:value-type="float" office:value="340" calcext:value-type="float">
            <text:p>340</text:p>
          </table:table-cell>
          <table:table-cell table:style-name="ce44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 table:style-name="Default"/>
          <table:table-cell table:style-name="ce23" office:value-type="float" office:value="340" calcext:value-type="float">
            <text:p>340</text:p>
          </table:table-cell>
          <table:table-cell table:style-name="ce31" table:number-columns-repeated="2"/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table:number-columns-repeated="2"/>
          <table:table-cell table:style-name="ce31" office:value-type="float" office:value="380" calcext:value-type="float">
            <text:p>380</text:p>
          </table:table-cell>
          <table:table-cell table:style-name="ce44" office:value-type="float" office:value="720" calcext:value-type="float">
            <text:p>720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 table:style-name="Default"/>
          <table:table-cell table:style-name="ce23" office:value-type="float" office:value="325" calcext:value-type="float">
            <text:p>325</text:p>
          </table:table-cell>
          <table:table-cell table:style-name="ce31" table:number-columns-repeated="2"/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table:number-columns-repeated="2"/>
          <table:table-cell table:style-name="ce31" office:value-type="float" office:value="345" calcext:value-type="float">
            <text:p>345</text:p>
          </table:table-cell>
          <table:table-cell table:style-name="ce44" office:value-type="float" office:value="670" calcext:value-type="float">
            <text:p>670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 table:style-name="Default"/>
          <table:table-cell table:style-name="ce23" office:value-type="float" office:value="334" calcext:value-type="float">
            <text:p>334</text:p>
          </table:table-cell>
          <table:table-cell table:style-name="ce31" table:number-columns-repeated="2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table:number-columns-repeated="2"/>
          <table:table-cell table:style-name="ce31" office:value-type="float" office:value="368" calcext:value-type="float">
            <text:p>368</text:p>
          </table:table-cell>
          <table:table-cell table:style-name="ce44" office:value-type="float" office:value="702" calcext:value-type="float">
            <text:p>702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 table:style-name="Default"/>
          <table:table-cell table:style-name="ce23" office:value-type="float" office:value="302" calcext:value-type="float">
            <text:p>302</text:p>
          </table:table-cell>
          <table:table-cell table:style-name="ce31" table:number-columns-repeated="2"/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23" calcext:value-type="float">
            <text:p>323</text:p>
          </table:table-cell>
          <table:table-cell table:style-name="ce44" office:value-type="float" office:value="625" calcext:value-type="float">
            <text:p>625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 table:style-name="Default"/>
          <table:table-cell table:style-name="ce23" office:value-type="float" office:value="282" calcext:value-type="float">
            <text:p>282</text:p>
          </table:table-cell>
          <table:table-cell table:style-name="ce31" table:number-columns-repeated="2"/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13" calcext:value-type="float">
            <text:p>313</text:p>
          </table:table-cell>
          <table:table-cell table:style-name="ce44" office:value-type="float" office:value="595" calcext:value-type="float">
            <text:p>595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 table:style-name="Default"/>
          <table:table-cell table:style-name="ce23" office:value-type="float" office:value="343" calcext:value-type="float">
            <text:p>343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30" calcext:value-type="float">
            <text:p>330</text:p>
          </table:table-cell>
          <table:table-cell table:style-name="ce44" office:value-type="float" office:value="676" calcext:value-type="float">
            <text:p>676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 table:style-name="Default"/>
          <table:table-cell table:style-name="ce23" office:value-type="float" office:value="358" calcext:value-type="float">
            <text:p>358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315" calcext:value-type="float">
            <text:p>315</text:p>
          </table:table-cell>
          <table:table-cell table:style-name="ce44" office:value-type="float" office:value="677" calcext:value-type="float">
            <text:p>677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 table:style-name="Default"/>
          <table:table-cell table:style-name="ce23" office:value-type="float" office:value="315" calcext:value-type="float">
            <text:p>31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300" calcext:value-type="float">
            <text:p>300</text:p>
          </table:table-cell>
          <table:table-cell table:style-name="ce44" office:value-type="float" office:value="621" calcext:value-type="float">
            <text:p>621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 table:style-name="Default"/>
          <table:table-cell table:style-name="ce23" office:value-type="float" office:value="213" calcext:value-type="float">
            <text:p>213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4" calcext:value-type="float">
            <text:p>234</text:p>
          </table:table-cell>
          <table:table-cell table:style-name="ce44" office:value-type="float" office:value="453" calcext:value-type="float">
            <text:p>453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 table:style-name="Default"/>
          <table:table-cell table:style-name="ce23" office:value-type="float" office:value="220" calcext:value-type="float">
            <text:p>220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298" calcext:value-type="float">
            <text:p>298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 table:style-name="Default"/>
          <table:table-cell table:style-name="ce23" office:value-type="float" office:value="210" calcext:value-type="float">
            <text:p>210</text:p>
          </table:table-cell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0" calcext:value-type="float">
            <text:p>30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 table:style-name="Default"/>
          <table:table-cell table:style-name="ce23" office:value-type="float" office:value="202" calcext:value-type="float">
            <text:p>20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2" calcext:value-type="float">
            <text:p>312</text:p>
          </table:table-cell>
          <table:table-cell table:style-name="ce44" office:value-type="float" office:value="575" calcext:value-type="float">
            <text:p>575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 table:style-name="Default"/>
          <table:table-cell table:style-name="ce23" office:value-type="float" office:value="165" calcext:value-type="float">
            <text:p>16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2" calcext:value-type="float">
            <text:p>332</text:p>
          </table:table-cell>
          <table:table-cell table:style-name="ce44" office:value-type="float" office:value="576" calcext:value-type="float">
            <text:p>576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 table:style-name="Default"/>
          <table:table-cell table:style-name="ce23" office:value-type="float" office:value="150" calcext:value-type="float">
            <text:p>15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7" calcext:value-type="float">
            <text:p>337</text:p>
          </table:table-cell>
          <table:table-cell table:style-name="ce44" office:value-type="float" office:value="598" calcext:value-type="float">
            <text:p>598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 table:style-name="Default"/>
          <table:table-cell table:style-name="ce23" office:value-type="float" office:value="117" calcext:value-type="float">
            <text:p>117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3" calcext:value-type="float">
            <text:p>313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09" calcext:value-type="float">
            <text:p>309</text:p>
          </table:table-cell>
          <table:table-cell table:style-name="ce44" office:value-type="float" office:value="515" calcext:value-type="float">
            <text:p>515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 table:style-name="Default"/>
          <table:table-cell table:style-name="ce23" office:value-type="float" office:value="77" calcext:value-type="float">
            <text:p>7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41" calcext:value-type="float">
            <text:p>341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 table:style-name="Default"/>
          <table:table-cell table:style-name="ce23" office:value-type="float" office:value="77" calcext:value-type="float">
            <text:p>77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1" calcext:value-type="float">
            <text:p>261</text:p>
          </table:table-cell>
          <table:table-cell table:style-name="ce44" office:value-type="float" office:value="462" calcext:value-type="float">
            <text:p>462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 table:style-name="Default"/>
          <table:table-cell table:style-name="ce23" office:value-type="float" office:value="75" calcext:value-type="float">
            <text:p>75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1" calcext:value-type="float">
            <text:p>281</text:p>
          </table:table-cell>
          <table:table-cell table:style-name="ce44" office:value-type="float" office:value="545" calcext:value-type="float">
            <text:p>545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1" calcext:value-type="float">
            <text:p>251</text:p>
          </table:table-cell>
          <table:table-cell table:style-name="ce44" office:value-type="float" office:value="476" calcext:value-type="float">
            <text:p>476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 table:style-name="Default"/>
          <table:table-cell table:style-name="ce23" office:value-type="float" office:value="52" calcext:value-type="float">
            <text:p>52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6" calcext:value-type="float">
            <text:p>276</text:p>
          </table:table-cell>
          <table:table-cell table:style-name="ce44" office:value-type="float" office:value="512" calcext:value-type="float">
            <text:p>512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 table:style-name="Default"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8" calcext:value-type="float">
            <text:p>278</text:p>
          </table:table-cell>
          <table:table-cell table:style-name="ce44" office:value-type="float" office:value="507" calcext:value-type="float">
            <text:p>507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46" calcext:value-type="float">
            <text:p>246</text:p>
          </table:table-cell>
          <table:table-cell table:style-name="ce44" office:value-type="float" office:value="485" calcext:value-type="float">
            <text:p>485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 table:style-name="Default"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2" calcext:value-type="float">
            <text:p>252</text:p>
          </table:table-cell>
          <table:table-cell table:style-name="ce44" office:value-type="float" office:value="438" calcext:value-type="float">
            <text:p>438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68" calcext:value-type="float">
            <text:p>268</text:p>
          </table:table-cell>
          <table:table-cell table:style-name="ce44" office:value-type="float" office:value="482" calcext:value-type="float">
            <text:p>482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1" calcext:value-type="float">
            <text:p>231</text:p>
          </table:table-cell>
          <table:table-cell table:style-name="ce44" office:value-type="float" office:value="434" calcext:value-type="float">
            <text:p>434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 table:style-name="Default"/>
          <table:table-cell table:style-name="ce23" office:value-type="float" office:value="33" calcext:value-type="float">
            <text:p>33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5" calcext:value-type="float">
            <text:p>205</text:p>
          </table:table-cell>
          <table:table-cell table:style-name="ce44" office:value-type="float" office:value="372" calcext:value-type="float">
            <text:p>372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 table:style-name="Default"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88" calcext:value-type="float">
            <text:p>188</text:p>
          </table:table-cell>
          <table:table-cell table:style-name="ce44" office:value-type="float" office:value="352" calcext:value-type="float">
            <text:p>352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 table:style-name="Default"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18" calcext:value-type="float">
            <text:p>218</text:p>
          </table:table-cell>
          <table:table-cell table:style-name="ce44" office:value-type="float" office:value="397" calcext:value-type="float">
            <text:p>397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7" calcext:value-type="float">
            <text:p>207</text:p>
          </table:table-cell>
          <table:table-cell table:style-name="ce44" office:value-type="float" office:value="366" calcext:value-type="float">
            <text:p>366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94" calcext:value-type="float">
            <text:p>194</text:p>
          </table:table-cell>
          <table:table-cell table:style-name="ce44" office:value-type="float" office:value="356" calcext:value-type="float">
            <text:p>356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05" calcext:value-type="float">
            <text:p>205</text:p>
          </table:table-cell>
          <table:table-cell table:style-name="ce44" office:value-type="float" office:value="376" calcext:value-type="float">
            <text:p>376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10" calcext:value-type="float">
            <text:p>210</text:p>
          </table:table-cell>
          <table:table-cell table:style-name="ce44" office:value-type="float" office:value="392" calcext:value-type="float">
            <text:p>392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33" calcext:value-type="float">
            <text:p>233</text:p>
          </table:table-cell>
          <table:table-cell table:style-name="ce44" office:value-type="float" office:value="396" calcext:value-type="float">
            <text:p>396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 table:style-name="Default"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76" calcext:value-type="float">
            <text:p>176</text:p>
          </table:table-cell>
          <table:table-cell table:style-name="ce44" office:value-type="float" office:value="317" calcext:value-type="float">
            <text:p>317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26" calcext:value-type="float">
            <text:p>226</text:p>
          </table:table-cell>
          <table:table-cell table:style-name="ce44" office:value-type="float" office:value="395" calcext:value-type="float">
            <text:p>395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66" calcext:value-type="float">
            <text:p>166</text:p>
          </table:table-cell>
          <table:table-cell table:style-name="ce44" office:value-type="float" office:value="325" calcext:value-type="float">
            <text:p>325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 table:style-name="Default"/>
          <table:table-cell table:style-name="ce24" office:value-type="float" office:value="9597" calcext:value-type="float">
            <text:p>9,597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1" office:value-type="float" office:value="221" calcext:value-type="float">
            <text:p>221</text:p>
          </table:table-cell>
          <table:table-cell table:style-name="ce32" office:value-type="float" office:value="13516" calcext:value-type="float">
            <text:p>13,516</text:p>
          </table:table-cell>
          <table:table-cell table:style-name="ce32" office:value-type="float" office:value="10631" calcext:value-type="float">
            <text:p>10,631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1" office:value-type="float" office:value="550" calcext:value-type="float">
            <text:p>550</text:p>
          </table:table-cell>
          <table:table-cell table:style-name="ce32" office:value-type="float" office:value="15088" calcext:value-type="float">
            <text:p>15,088</text:p>
          </table:table-cell>
          <table:table-cell table:style-name="ce45" office:value-type="float" office:value="28604" calcext:value-type="float">
            <text:p>28,604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86" calcext:value-type="float">
            <text:p>186</text:p>
          </table:table-cell>
          <table:table-cell table:style-name="ce44" office:value-type="float" office:value="335" calcext:value-type="float">
            <text:p>335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94" calcext:value-type="float">
            <text:p>194</text:p>
          </table:table-cell>
          <table:table-cell table:style-name="ce44" office:value-type="float" office:value="346" calcext:value-type="float">
            <text:p>346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72" calcext:value-type="float">
            <text:p>172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 table:style-name="Default"/>
          <table:table-cell table:style-name="ce23" office:value-type="float" office:value="6" calcext:value-type="float">
            <text:p>6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67" calcext:value-type="float">
            <text:p>167</text:p>
          </table:table-cell>
          <table:table-cell table:style-name="ce44" office:value-type="float" office:value="295" calcext:value-type="float">
            <text:p>295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 table:style-name="Default"/>
          <table:table-cell table:style-name="ce23" office:value-type="float" office:value="6" calcext:value-type="float">
            <text:p>6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41" calcext:value-type="float">
            <text:p>141</text:p>
          </table:table-cell>
          <table:table-cell table:style-name="ce44" office:value-type="float" office:value="236" calcext:value-type="float">
            <text:p>236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42" calcext:value-type="float">
            <text:p>142</text:p>
          </table:table-cell>
          <table:table-cell table:style-name="ce44" office:value-type="float" office:value="266" calcext:value-type="float">
            <text:p>266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55" calcext:value-type="float">
            <text:p>155</text:p>
          </table:table-cell>
          <table:table-cell table:style-name="ce44" office:value-type="float" office:value="247" calcext:value-type="float">
            <text:p>247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45" calcext:value-type="float">
            <text:p>145</text:p>
          </table:table-cell>
          <table:table-cell table:style-name="ce44" office:value-type="float" office:value="252" calcext:value-type="float">
            <text:p>252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31" calcext:value-type="float">
            <text:p>131</text:p>
          </table:table-cell>
          <table:table-cell table:style-name="ce44" office:value-type="float" office:value="215" calcext:value-type="float">
            <text:p>215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65" calcext:value-type="float">
            <text:p>165</text:p>
          </table:table-cell>
          <table:table-cell table:style-name="ce44" office:value-type="float" office:value="248" calcext:value-type="float">
            <text:p>248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 table:style-name="Default"/>
          <table:table-cell table:style-name="ce23" office:value-type="float" office:value="6" calcext:value-type="float">
            <text:p>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29" calcext:value-type="float">
            <text:p>129</text:p>
          </table:table-cell>
          <table:table-cell table:style-name="ce44" office:value-type="float" office:value="215" calcext:value-type="float">
            <text:p>215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24" calcext:value-type="float">
            <text:p>124</text:p>
          </table:table-cell>
          <table:table-cell table:style-name="ce44" office:value-type="float" office:value="196" calcext:value-type="float">
            <text:p>196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08" calcext:value-type="float">
            <text:p>108</text:p>
          </table:table-cell>
          <table:table-cell table:style-name="ce44" office:value-type="float" office:value="155" calcext:value-type="float">
            <text:p>155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09" calcext:value-type="float">
            <text:p>109</text:p>
          </table:table-cell>
          <table:table-cell table:style-name="ce44" office:value-type="float" office:value="166" calcext:value-type="float">
            <text:p>166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91" calcext:value-type="float">
            <text:p>91</text:p>
          </table:table-cell>
          <table:table-cell table:style-name="ce44" office:value-type="float" office:value="143" calcext:value-type="float">
            <text:p>143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83" calcext:value-type="float">
            <text:p>83</text:p>
          </table:table-cell>
          <table:table-cell table:style-name="ce44" office:value-type="float" office:value="138" calcext:value-type="float">
            <text:p>138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8" calcext:value-type="float">
            <text:p>58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3" calcext:value-type="float">
            <text:p>63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63" calcext:value-type="float">
            <text:p>63</text:p>
          </table:table-cell>
          <table:table-cell table:style-name="ce44" office:value-type="float" office:value="103" calcext:value-type="float">
            <text:p>103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2" calcext:value-type="float">
            <text:p>72</text:p>
          </table:table-cell>
          <table:table-cell table:style-name="ce44" office:value-type="float" office:value="122" calcext:value-type="float">
            <text:p>122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9" calcext:value-type="float">
            <text:p>69</text:p>
          </table:table-cell>
          <table:table-cell table:style-name="ce44" office:value-type="float" office:value="118" calcext:value-type="float">
            <text:p>118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2" calcext:value-type="float">
            <text:p>62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1" calcext:value-type="float">
            <text:p>51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8" calcext:value-type="float">
            <text:p>38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60" calcext:value-type="float">
            <text:p>60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8" calcext:value-type="float">
            <text:p>38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8" calcext:value-type="float">
            <text:p>38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 table:style-name="Default"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0" calcext:value-type="float">
            <text:p>30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 table:style-name="Default"/>
          <table:table-cell table:style-name="ce2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0" calcext:value-type="float">
            <text:p>20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2"/>
          <table:table-cell table:number-columns-repeated="2" table:style-name="ce31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 table:style-name="Default"/>
          <table:table-cell table:style-name="ce2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4" calcext:value-type="float">
            <text:p>24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 table:style-name="Default"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 table:style-name="Default"/>
          <table:table-cell table:style-name="ce2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9" calcext:value-type="float">
            <text:p>19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 table:style-name="Default"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 table:style-name="Default"/>
          <table:table-cell table:style-name="ce23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 table:style-name="Default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 table:style-name="Default"/>
          <table:table-cell table:style-name="ce23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 table:style-name="Default"/>
          <table:table-cell table:style-name="ce23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TOTAAL.</text:p>
          </table:table-cell>
          <table:table-cell table:style-name="Default"/>
          <table:table-cell table:style-name="ce24" office:value-type="float" office:value="9724" calcext:value-type="float">
            <text:p>9,724</text:p>
          </table:table-cell>
          <table:table-cell table:style-name="ce32" office:value-type="float" office:value="5152" calcext:value-type="float">
            <text:p>5,152</text:p>
          </table:table-cell>
          <table:table-cell table:style-name="ce31" office:value-type="float" office:value="618" calcext:value-type="float">
            <text:p>618</text:p>
          </table:table-cell>
          <table:table-cell table:style-name="ce32" office:value-type="float" office:value="15494" calcext:value-type="float">
            <text:p>15,494</text:p>
          </table:table-cell>
          <table:table-cell table:style-name="ce32" office:value-type="float" office:value="11061" calcext:value-type="float">
            <text:p>11,061</text:p>
          </table:table-cell>
          <table:table-cell table:style-name="ce32" office:value-type="float" office:value="5216" calcext:value-type="float">
            <text:p>5,216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8200" calcext:value-type="float">
            <text:p>18,200</text:p>
          </table:table-cell>
          <table:table-cell table:style-name="ce45" office:value-type="float" office:value="33694" calcext:value-type="float">
            <text:p>33,694</text:p>
          </table:table-cell>
          <table:table-cell table:number-columns-repeated="1012"/>
        </table:table-row>
        <table:table-row table:style-name="ro3">
          <table:table-cell table:style-name="ce8" office:value-type="float" office:value="1849" calcext:value-type="float">
            <text:p>1849</text:p>
          </table:table-cell>
          <table:table-cell table:style-name="ce13" office:value-type="string" calcext:value-type="string">
            <text:p>Beneden het jaar.</text:p>
          </table:table-cell>
          <table:table-cell table:style-name="Default"/>
          <table:table-cell table:style-name="ce24" office:value-type="float" office:value="2273" calcext:value-type="float">
            <text:p>2,273</text:p>
          </table:table-cell>
          <table:table-cell table:style-name="ce31" table:number-columns-repeated="2"/>
          <table:table-cell table:style-name="ce32" office:value-type="float" office:value="2273" calcext:value-type="float">
            <text:p>2,273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1" table:number-columns-repeated="2"/>
          <table:table-cell table:style-name="ce32" office:value-type="float" office:value="2172" calcext:value-type="float">
            <text:p>2,172</text:p>
          </table:table-cell>
          <table:table-cell table:style-name="ce45" office:value-type="float" office:value="4445" calcext:value-type="float">
            <text:p>4,445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 table:style-name="Default"/>
          <table:table-cell table:style-name="ce24" office:value-type="float" office:value="1739" calcext:value-type="float">
            <text:p>1,739</text:p>
          </table:table-cell>
          <table:table-cell table:style-name="ce31" table:number-columns-repeated="2"/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1" table:number-columns-repeated="2"/>
          <table:table-cell table:style-name="ce32" office:value-type="float" office:value="1641" calcext:value-type="float">
            <text:p>1,641</text:p>
          </table:table-cell>
          <table:table-cell table:style-name="ce45" office:value-type="float" office:value="3380" calcext:value-type="float">
            <text:p>3,380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 table:style-name="Default"/>
          <table:table-cell table:style-name="ce24" office:value-type="float" office:value="1637" calcext:value-type="float">
            <text:p>1,637</text:p>
          </table:table-cell>
          <table:table-cell table:style-name="ce31" table:number-columns-repeated="2"/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1634" calcext:value-type="float">
            <text:p>1,634</text:p>
          </table:table-cell>
          <table:table-cell table:style-name="ce31" table:number-columns-repeated="2"/>
          <table:table-cell table:style-name="ce32" office:value-type="float" office:value="1634" calcext:value-type="float">
            <text:p>1,634</text:p>
          </table:table-cell>
          <table:table-cell table:style-name="ce45" office:value-type="float" office:value="3271" calcext:value-type="float">
            <text:p>3,271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 table:style-name="Default"/>
          <table:table-cell table:style-name="ce24" office:value-type="float" office:value="1676" calcext:value-type="float">
            <text:p>1,676</text:p>
          </table:table-cell>
          <table:table-cell table:style-name="ce31" table:number-columns-repeated="2"/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1" table:number-columns-repeated="2"/>
          <table:table-cell table:style-name="ce32" office:value-type="float" office:value="1751" calcext:value-type="float">
            <text:p>1,751</text:p>
          </table:table-cell>
          <table:table-cell table:style-name="ce45" office:value-type="float" office:value="3427" calcext:value-type="float">
            <text:p>3,427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 table:style-name="Default"/>
          <table:table-cell table:style-name="ce24" office:value-type="float" office:value="1988" calcext:value-type="float">
            <text:p>1,988</text:p>
          </table:table-cell>
          <table:table-cell table:style-name="ce31" table:number-columns-repeated="2"/>
          <table:table-cell table:style-name="ce32" office:value-type="float" office:value="1988" calcext:value-type="float">
            <text:p>1,988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1" table:number-columns-repeated="2"/>
          <table:table-cell table:style-name="ce32" office:value-type="float" office:value="1950" calcext:value-type="float">
            <text:p>1,950</text:p>
          </table:table-cell>
          <table:table-cell table:style-name="ce45" office:value-type="float" office:value="3938" calcext:value-type="float">
            <text:p>3,938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 table:style-name="Default"/>
          <table:table-cell table:style-name="ce24" office:value-type="float" office:value="2027" calcext:value-type="float">
            <text:p>2,027</text:p>
          </table:table-cell>
          <table:table-cell table:style-name="ce31" table:number-columns-repeated="2"/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1" table:number-columns-repeated="2"/>
          <table:table-cell table:style-name="ce32" office:value-type="float" office:value="1991" calcext:value-type="float">
            <text:p>1,991</text:p>
          </table:table-cell>
          <table:table-cell table:style-name="ce45" office:value-type="float" office:value="4018" calcext:value-type="float">
            <text:p>4,018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 table:style-name="Default"/>
          <table:table-cell table:style-name="ce24" office:value-type="float" office:value="1888" calcext:value-type="float">
            <text:p>1,888</text:p>
          </table:table-cell>
          <table:table-cell table:style-name="ce31" table:number-columns-repeated="2"/>
          <table:table-cell table:style-name="ce32" office:value-type="float" office:value="1888" calcext:value-type="float">
            <text:p>1,888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1" table:number-columns-repeated="2"/>
          <table:table-cell table:style-name="ce32" office:value-type="float" office:value="1863" calcext:value-type="float">
            <text:p>1,863</text:p>
          </table:table-cell>
          <table:table-cell table:style-name="ce45" office:value-type="float" office:value="3751" calcext:value-type="float">
            <text:p>3,751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 table:style-name="Default"/>
          <table:table-cell table:style-name="ce24" office:value-type="float" office:value="1891" calcext:value-type="float">
            <text:p>1,891</text:p>
          </table:table-cell>
          <table:table-cell table:style-name="ce31" table:number-columns-repeated="2"/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1" table:number-columns-repeated="2"/>
          <table:table-cell table:style-name="ce32" office:value-type="float" office:value="1872" calcext:value-type="float">
            <text:p>1,872</text:p>
          </table:table-cell>
          <table:table-cell table:style-name="ce45" office:value-type="float" office:value="3763" calcext:value-type="float">
            <text:p>3,763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 table:style-name="Default"/>
          <table:table-cell table:style-name="ce24" office:value-type="float" office:value="1898" calcext:value-type="float">
            <text:p>1,898</text:p>
          </table:table-cell>
          <table:table-cell table:style-name="ce31" table:number-columns-repeated="2"/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1" table:number-columns-repeated="2"/>
          <table:table-cell table:style-name="ce32" office:value-type="float" office:value="1868" calcext:value-type="float">
            <text:p>1,868</text:p>
          </table:table-cell>
          <table:table-cell table:style-name="ce45" office:value-type="float" office:value="3766" calcext:value-type="float">
            <text:p>3,766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 table:style-name="Default"/>
          <table:table-cell table:style-name="ce24" office:value-type="float" office:value="1799" calcext:value-type="float">
            <text:p>1,799</text:p>
          </table:table-cell>
          <table:table-cell table:style-name="ce31" table:number-columns-repeated="2"/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1" table:number-columns-repeated="2"/>
          <table:table-cell table:style-name="ce32" office:value-type="float" office:value="1769" calcext:value-type="float">
            <text:p>1,769</text:p>
          </table:table-cell>
          <table:table-cell table:style-name="ce45" office:value-type="float" office:value="3568" calcext:value-type="float">
            <text:p>3,568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 table:style-name="Default"/>
          <table:table-cell table:style-name="ce24" office:value-type="float" office:value="1913" calcext:value-type="float">
            <text:p>1,913</text:p>
          </table:table-cell>
          <table:table-cell table:style-name="ce31" table:number-columns-repeated="2"/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1" table:number-columns-repeated="2"/>
          <table:table-cell table:style-name="ce32" office:value-type="float" office:value="1885" calcext:value-type="float">
            <text:p>1,885</text:p>
          </table:table-cell>
          <table:table-cell table:style-name="ce45" office:value-type="float" office:value="3798" calcext:value-type="float">
            <text:p>3,798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 table:style-name="Default"/>
          <table:table-cell table:style-name="ce24" office:value-type="float" office:value="1717" calcext:value-type="float">
            <text:p>1,717</text:p>
          </table:table-cell>
          <table:table-cell table:style-name="ce31" table:number-columns-repeated="2"/>
          <table:table-cell table:style-name="ce32" office:value-type="float" office:value="1717" calcext:value-type="float">
            <text:p>1,717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1" table:number-columns-repeated="2"/>
          <table:table-cell table:style-name="ce32" office:value-type="float" office:value="1653" calcext:value-type="float">
            <text:p>1,653</text:p>
          </table:table-cell>
          <table:table-cell table:style-name="ce45" office:value-type="float" office:value="3370" calcext:value-type="float">
            <text:p>3,370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 table:style-name="Default"/>
          <table:table-cell table:style-name="ce24" office:value-type="float" office:value="1732" calcext:value-type="float">
            <text:p>1,732</text:p>
          </table:table-cell>
          <table:table-cell table:style-name="ce31" table:number-columns-repeated="2"/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1" table:number-columns-repeated="2"/>
          <table:table-cell table:style-name="ce32" office:value-type="float" office:value="1679" calcext:value-type="float">
            <text:p>1,679</text:p>
          </table:table-cell>
          <table:table-cell table:style-name="ce45" office:value-type="float" office:value="3411" calcext:value-type="float">
            <text:p>3,411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 table:style-name="Default"/>
          <table:table-cell table:style-name="ce24" office:value-type="float" office:value="1742" calcext:value-type="float">
            <text:p>1,742</text:p>
          </table:table-cell>
          <table:table-cell table:style-name="ce31" table:number-columns-repeated="2"/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1" table:number-columns-repeated="2"/>
          <table:table-cell table:style-name="ce32" office:value-type="float" office:value="1691" calcext:value-type="float">
            <text:p>1,691</text:p>
          </table:table-cell>
          <table:table-cell table:style-name="ce45" office:value-type="float" office:value="3433" calcext:value-type="float">
            <text:p>3,433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 table:style-name="Default"/>
          <table:table-cell table:style-name="ce24" office:value-type="float" office:value="1639" calcext:value-type="float">
            <text:p>1,639</text:p>
          </table:table-cell>
          <table:table-cell table:style-name="ce31" table:number-columns-repeated="2"/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1" table:number-columns-repeated="2"/>
          <table:table-cell table:style-name="ce32" office:value-type="float" office:value="1653" calcext:value-type="float">
            <text:p>1,653</text:p>
          </table:table-cell>
          <table:table-cell table:style-name="ce45" office:value-type="float" office:value="3292" calcext:value-type="float">
            <text:p>3,292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 table:style-name="Default"/>
          <table:table-cell table:style-name="ce24" office:value-type="float" office:value="1581" calcext:value-type="float">
            <text:p>1,581</text:p>
          </table:table-cell>
          <table:table-cell table:style-name="ce31" table:number-columns-repeated="2"/>
          <table:table-cell table:style-name="ce32" office:value-type="float" office:value="1581" calcext:value-type="float">
            <text:p>1,581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1" table:number-columns-repeated="2"/>
          <table:table-cell table:style-name="ce32" office:value-type="float" office:value="1636" calcext:value-type="float">
            <text:p>1,636</text:p>
          </table:table-cell>
          <table:table-cell table:style-name="ce45" office:value-type="float" office:value="3217" calcext:value-type="float">
            <text:p>3,217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 table:style-name="Default"/>
          <table:table-cell table:style-name="ce24" office:value-type="float" office:value="1567" calcext:value-type="float">
            <text:p>1,567</text:p>
          </table:table-cell>
          <table:table-cell table:style-name="ce31" table:number-columns-repeated="2"/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1" table:number-columns-repeated="2"/>
          <table:table-cell table:style-name="ce32" office:value-type="float" office:value="1662" calcext:value-type="float">
            <text:p>1,662</text:p>
          </table:table-cell>
          <table:table-cell table:style-name="ce45" office:value-type="float" office:value="3229" calcext:value-type="float">
            <text:p>3,229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 table:style-name="Default"/>
          <table:table-cell table:style-name="ce24" office:value-type="float" office:value="1404" calcext:value-type="float">
            <text:p>1,404</text:p>
          </table:table-cell>
          <table:table-cell table:style-name="ce31" table:number-columns-repeated="2"/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467" calcext:value-type="float">
            <text:p>1,467</text:p>
          </table:table-cell>
          <table:table-cell table:style-name="ce45" office:value-type="float" office:value="2871" calcext:value-type="float">
            <text:p>2,871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 table:style-name="Default"/>
          <table:table-cell table:style-name="ce24" office:value-type="float" office:value="1390" calcext:value-type="float">
            <text:p>1,39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2" office:value-type="float" office:value="1421" calcext:value-type="float">
            <text:p>1,421</text:p>
          </table:table-cell>
          <table:table-cell table:style-name="ce45" office:value-type="float" office:value="2812" calcext:value-type="float">
            <text:p>2,812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 table:style-name="Default"/>
          <table:table-cell table:style-name="ce24" office:value-type="float" office:value="1435" calcext:value-type="float">
            <text:p>1,43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2" office:value-type="float" office:value="1495" calcext:value-type="float">
            <text:p>1,495</text:p>
          </table:table-cell>
          <table:table-cell table:style-name="ce45" office:value-type="float" office:value="2931" calcext:value-type="float">
            <text:p>2,931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 table:style-name="Default"/>
          <table:table-cell table:style-name="ce24" office:value-type="float" office:value="1380" calcext:value-type="float">
            <text:p>1,380</text:p>
          </table:table-cell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5" office:value-type="float" office:value="2904" calcext:value-type="float">
            <text:p>2,904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 table:style-name="Default"/>
          <table:table-cell table:style-name="ce24" office:value-type="float" office:value="1322" calcext:value-type="float">
            <text:p>1,322</text:p>
          </table:table-cell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369" calcext:value-type="float">
            <text:p>1,369</text:p>
          </table:table-cell>
          <table:table-cell table:style-name="ce45" office:value-type="float" office:value="2718" calcext:value-type="float">
            <text:p>2,718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 table:style-name="Default"/>
          <table:table-cell table:style-name="ce24" office:value-type="float" office:value="1044" calcext:value-type="float">
            <text:p>1,044</text:p>
          </table:table-cell>
          <table:table-cell table:style-name="ce31" office:value-type="float" office:value="47" calcext:value-type="float">
            <text:p>47</text:p>
          </table:table-cell>
          <table:table-cell table:style-name="ce31"/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168" calcext:value-type="float">
            <text:p>1,168</text:p>
          </table:table-cell>
          <table:table-cell table:style-name="ce45" office:value-type="float" office:value="2259" calcext:value-type="float">
            <text:p>2,259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 table:style-name="Default"/>
          <table:table-cell table:style-name="ce24" office:value-type="float" office:value="1164" calcext:value-type="float">
            <text:p>1,164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276" calcext:value-type="float">
            <text:p>1,276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52" calcext:value-type="float">
            <text:p>1,352</text:p>
          </table:table-cell>
          <table:table-cell table:style-name="ce45" office:value-type="float" office:value="2628" calcext:value-type="float">
            <text:p>2,628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 table:style-name="Default"/>
          <table:table-cell table:style-name="ce24" office:value-type="float" office:value="1162" calcext:value-type="float">
            <text:p>1,162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398" calcext:value-type="float">
            <text:p>1,398</text:p>
          </table:table-cell>
          <table:table-cell table:style-name="ce45" office:value-type="float" office:value="2766" calcext:value-type="float">
            <text:p>2,766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 table:style-name="Default"/>
          <table:table-cell table:style-name="ce24" office:value-type="float" office:value="1067" calcext:value-type="float">
            <text:p>1,06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347" calcext:value-type="float">
            <text:p>1,347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29" calcext:value-type="float">
            <text:p>1,329</text:p>
          </table:table-cell>
          <table:table-cell table:style-name="ce45" office:value-type="float" office:value="2676" calcext:value-type="float">
            <text:p>2,676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 table:style-name="Default"/>
          <table:table-cell table:style-name="ce23" office:value-type="float" office:value="992" calcext:value-type="float">
            <text:p>992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1318" calcext:value-type="float">
            <text:p>1,318</text:p>
          </table:table-cell>
          <table:table-cell table:style-name="ce45" office:value-type="float" office:value="2699" calcext:value-type="float">
            <text:p>2,699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 table:style-name="Default"/>
          <table:table-cell table:style-name="ce23" office:value-type="float" office:value="863" calcext:value-type="float">
            <text:p>863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1248" calcext:value-type="float">
            <text:p>1,248</text:p>
          </table:table-cell>
          <table:table-cell table:style-name="ce45" office:value-type="float" office:value="2580" calcext:value-type="float">
            <text:p>2,580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 table:style-name="Default"/>
          <table:table-cell table:style-name="ce23" office:value-type="float" office:value="646" calcext:value-type="float">
            <text:p>646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5" office:value-type="float" office:value="2383" calcext:value-type="float">
            <text:p>2,383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 table:style-name="Default"/>
          <table:table-cell table:style-name="ce23" office:value-type="float" office:value="567" calcext:value-type="float">
            <text:p>567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179" calcext:value-type="float">
            <text:p>1,179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728" calcext:value-type="float">
            <text:p>728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270" calcext:value-type="float">
            <text:p>1,270</text:p>
          </table:table-cell>
          <table:table-cell table:style-name="ce45" office:value-type="float" office:value="2449" calcext:value-type="float">
            <text:p>2,449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 table:style-name="Default"/>
          <table:table-cell table:style-name="ce23" office:value-type="float" office:value="560" calcext:value-type="float">
            <text:p>560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27" calcext:value-type="float">
            <text:p>27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37" calcext:value-type="float">
            <text:p>37</text:p>
          </table:table-cell>
          <table:table-cell table:style-name="ce32" office:value-type="float" office:value="1290" calcext:value-type="float">
            <text:p>1,290</text:p>
          </table:table-cell>
          <table:table-cell table:style-name="ce45" office:value-type="float" office:value="2567" calcext:value-type="float">
            <text:p>2,567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 table:style-name="Default"/>
          <table:table-cell table:style-name="ce23" office:value-type="float" office:value="393" calcext:value-type="float">
            <text:p>393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39" calcext:value-type="float">
            <text:p>39</text:p>
          </table:table-cell>
          <table:table-cell table:style-name="ce32" office:value-type="float" office:value="1153" calcext:value-type="float">
            <text:p>1,153</text:p>
          </table:table-cell>
          <table:table-cell table:style-name="ce45" office:value-type="float" office:value="2256" calcext:value-type="float">
            <text:p>2,256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 table:style-name="Default"/>
          <table:table-cell table:style-name="ce23" office:value-type="float" office:value="433" calcext:value-type="float">
            <text:p>433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41" calcext:value-type="float">
            <text:p>41</text:p>
          </table:table-cell>
          <table:table-cell table:style-name="ce32" office:value-type="float" office:value="1124" calcext:value-type="float">
            <text:p>1,124</text:p>
          </table:table-cell>
          <table:table-cell table:style-name="ce45" office:value-type="float" office:value="2264" calcext:value-type="float">
            <text:p>2,264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 table:style-name="Default"/>
          <table:table-cell table:style-name="ce23" office:value-type="float" office:value="372" calcext:value-type="float">
            <text:p>372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32" calcext:value-type="float">
            <text:p>32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844" calcext:value-type="float">
            <text:p>844</text:p>
          </table:table-cell>
          <table:table-cell table:style-name="ce31" office:value-type="float" office:value="46" calcext:value-type="float">
            <text:p>46</text:p>
          </table:table-cell>
          <table:table-cell table:style-name="ce32" office:value-type="float" office:value="1157" calcext:value-type="float">
            <text:p>1,157</text:p>
          </table:table-cell>
          <table:table-cell table:style-name="ce45" office:value-type="float" office:value="2283" calcext:value-type="float">
            <text:p>2,283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 table:style-name="Default"/>
          <table:table-cell table:style-name="ce23" office:value-type="float" office:value="300" calcext:value-type="float">
            <text:p>300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35" calcext:value-type="float">
            <text:p>35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808" calcext:value-type="float">
            <text:p>808</text:p>
          </table:table-cell>
          <table:table-cell table:style-name="ce31" office:value-type="float" office:value="65" calcext:value-type="float">
            <text:p>65</text:p>
          </table:table-cell>
          <table:table-cell table:style-name="ce32" office:value-type="float" office:value="1102" calcext:value-type="float">
            <text:p>1,102</text:p>
          </table:table-cell>
          <table:table-cell table:style-name="ce45" office:value-type="float" office:value="2224" calcext:value-type="float">
            <text:p>2,224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 table:style-name="Default"/>
          <table:table-cell table:style-name="ce23" office:value-type="float" office:value="248" calcext:value-type="float">
            <text:p>248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5" office:value-type="float" office:value="2158" calcext:value-type="float">
            <text:p>2,158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 table:style-name="Default"/>
          <table:table-cell table:style-name="ce23" office:value-type="float" office:value="200" calcext:value-type="float">
            <text:p>200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99" calcext:value-type="float">
            <text:p>999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0" calcext:value-type="float">
            <text:p>80</text:p>
          </table:table-cell>
          <table:table-cell table:style-name="ce32" office:value-type="float" office:value="1069" calcext:value-type="float">
            <text:p>1,069</text:p>
          </table:table-cell>
          <table:table-cell table:style-name="ce45" office:value-type="float" office:value="2068" calcext:value-type="float">
            <text:p>2,068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 table:style-name="Default"/>
          <table:table-cell table:style-name="ce23" office:value-type="float" office:value="162" calcext:value-type="float">
            <text:p>162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32" calcext:value-type="float">
            <text:p>932</text:p>
          </table:table-cell>
          <table:table-cell table:style-name="ce45" office:value-type="float" office:value="1852" calcext:value-type="float">
            <text:p>1,852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 table:style-name="Default"/>
          <table:table-cell table:style-name="ce23" office:value-type="float" office:value="155" calcext:value-type="float">
            <text:p>155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967" calcext:value-type="float">
            <text:p>967</text:p>
          </table:table-cell>
          <table:table-cell table:style-name="ce45" office:value-type="float" office:value="1899" calcext:value-type="float">
            <text:p>1,899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 table:style-name="Default"/>
          <table:table-cell table:style-name="ce23" office:value-type="float" office:value="134" calcext:value-type="float">
            <text:p>134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59" calcext:value-type="float">
            <text:p>859</text:p>
          </table:table-cell>
          <table:table-cell table:style-name="ce45" office:value-type="float" office:value="1748" calcext:value-type="float">
            <text:p>1,748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 table:style-name="Default"/>
          <table:table-cell table:style-name="ce23" office:value-type="float" office:value="128" calcext:value-type="float">
            <text:p>128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58" calcext:value-type="float">
            <text:p>758</text:p>
          </table:table-cell>
          <table:table-cell table:style-name="ce45" office:value-type="float" office:value="1499" calcext:value-type="float">
            <text:p>1,499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 table:style-name="Default"/>
          <table:table-cell table:style-name="ce23" office:value-type="float" office:value="93" calcext:value-type="float">
            <text:p>93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76" calcext:value-type="float">
            <text:p>676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66" calcext:value-type="float">
            <text:p>666</text:p>
          </table:table-cell>
          <table:table-cell table:style-name="ce45" office:value-type="float" office:value="1342" calcext:value-type="float">
            <text:p>1,342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 table:style-name="Default"/>
          <table:table-cell table:style-name="ce23" office:value-type="float" office:value="103" calcext:value-type="float">
            <text:p>103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93" calcext:value-type="float">
            <text:p>793</text:p>
          </table:table-cell>
          <table:table-cell table:style-name="ce45" office:value-type="float" office:value="1593" calcext:value-type="float">
            <text:p>1,593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 table:style-name="Default"/>
          <table:table-cell table:style-name="ce23" office:value-type="float" office:value="101" calcext:value-type="float">
            <text:p>101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783" calcext:value-type="float">
            <text:p>783</text:p>
          </table:table-cell>
          <table:table-cell table:style-name="ce45" office:value-type="float" office:value="1560" calcext:value-type="float">
            <text:p>1,560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 table:style-name="Default"/>
          <table:table-cell table:style-name="ce23" office:value-type="float" office:value="94" calcext:value-type="float">
            <text:p>94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788" calcext:value-type="float">
            <text:p>788</text:p>
          </table:table-cell>
          <table:table-cell table:style-name="ce45" office:value-type="float" office:value="1570" calcext:value-type="float">
            <text:p>1,570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 table:style-name="Default"/>
          <table:table-cell table:style-name="ce23" office:value-type="float" office:value="91" calcext:value-type="float">
            <text:p>91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95" calcext:value-type="float">
            <text:p>795</text:p>
          </table:table-cell>
          <table:table-cell table:style-name="ce45" office:value-type="float" office:value="1529" calcext:value-type="float">
            <text:p>1,529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 table:style-name="Default"/>
          <table:table-cell table:style-name="ce23" office:value-type="float" office:value="97" calcext:value-type="float">
            <text:p>97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774" calcext:value-type="float">
            <text:p>774</text:p>
          </table:table-cell>
          <table:table-cell table:style-name="ce45" office:value-type="float" office:value="1598" calcext:value-type="float">
            <text:p>1,598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 table:style-name="Default"/>
          <table:table-cell table:style-name="ce23" office:value-type="float" office:value="83" calcext:value-type="float">
            <text:p>83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818" calcext:value-type="float">
            <text:p>818</text:p>
          </table:table-cell>
          <table:table-cell table:style-name="ce45" office:value-type="float" office:value="1595" calcext:value-type="float">
            <text:p>1,595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 table:style-name="Default"/>
          <table:table-cell table:style-name="ce23" office:value-type="float" office:value="68" calcext:value-type="float">
            <text:p>68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30" calcext:value-type="float">
            <text:p>730</text:p>
          </table:table-cell>
          <table:table-cell table:style-name="ce45" office:value-type="float" office:value="1452" calcext:value-type="float">
            <text:p>1,452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 table:style-name="Default"/>
          <table:table-cell table:style-name="ce23" office:value-type="float" office:value="67" calcext:value-type="float">
            <text:p>67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799" calcext:value-type="float">
            <text:p>799</text:p>
          </table:table-cell>
          <table:table-cell table:style-name="ce45" office:value-type="float" office:value="1545" calcext:value-type="float">
            <text:p>1,545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 table:style-name="Default"/>
          <table:table-cell table:style-name="ce23" office:value-type="float" office:value="67" calcext:value-type="float">
            <text:p>67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48" calcext:value-type="float">
            <text:p>748</text:p>
          </table:table-cell>
          <table:table-cell table:style-name="ce45" office:value-type="float" office:value="1511" calcext:value-type="float">
            <text:p>1,511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 table:style-name="Default"/>
          <table:table-cell table:style-name="ce24" office:value-type="float" office:value="49092" calcext:value-type="float">
            <text:p>49,092</text:p>
          </table:table-cell>
          <table:table-cell table:style-name="ce32" office:value-type="float" office:value="16637" calcext:value-type="float">
            <text:p>16,637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2" office:value-type="float" office:value="66742" calcext:value-type="float">
            <text:p>66,742</text:p>
          </table:table-cell>
          <table:table-cell table:style-name="ce32" office:value-type="float" office:value="47110" calcext:value-type="float">
            <text:p>47,110</text:p>
          </table:table-cell>
          <table:table-cell table:style-name="ce32" office:value-type="float" office:value="18219" calcext:value-type="float">
            <text:p>18,219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67124" calcext:value-type="float">
            <text:p>67,124</text:p>
          </table:table-cell>
          <table:table-cell table:style-name="ce45" office:value-type="float" office:value="133866" calcext:value-type="float">
            <text:p>133,866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 table:style-name="Default"/>
          <table:table-cell table:style-name="ce23" office:value-type="float" office:value="47" calcext:value-type="float">
            <text:p>47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28" calcext:value-type="float">
            <text:p>628</text:p>
          </table:table-cell>
          <table:table-cell table:style-name="ce45" office:value-type="float" office:value="1269" calcext:value-type="float">
            <text:p>1,269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59" calcext:value-type="float">
            <text:p>659</text:p>
          </table:table-cell>
          <table:table-cell table:style-name="ce45" office:value-type="float" office:value="1372" calcext:value-type="float">
            <text:p>1,372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 table:style-name="Default"/>
          <table:table-cell table:style-name="ce23" office:value-type="float" office:value="53" calcext:value-type="float">
            <text:p>53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641" calcext:value-type="float">
            <text:p>641</text:p>
          </table:table-cell>
          <table:table-cell table:style-name="ce45" office:value-type="float" office:value="1220" calcext:value-type="float">
            <text:p>1,220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 table:style-name="Default"/>
          <table:table-cell table:style-name="ce23" office:value-type="float" office:value="53" calcext:value-type="float">
            <text:p>53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655" calcext:value-type="float">
            <text:p>655</text:p>
          </table:table-cell>
          <table:table-cell table:style-name="ce45" office:value-type="float" office:value="1228" calcext:value-type="float">
            <text:p>1,228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 table:style-name="Default"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538" calcext:value-type="float">
            <text:p>538</text:p>
          </table:table-cell>
          <table:table-cell table:style-name="ce45" office:value-type="float" office:value="1068" calcext:value-type="float">
            <text:p>1,068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 table:style-name="Default"/>
          <table:table-cell table:style-name="ce23" office:value-type="float" office:value="39" calcext:value-type="float">
            <text:p>39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558" calcext:value-type="float">
            <text:p>558</text:p>
          </table:table-cell>
          <table:table-cell table:style-name="ce45" office:value-type="float" office:value="1081" calcext:value-type="float">
            <text:p>1,081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 table:style-name="Default"/>
          <table:table-cell table:style-name="ce23" office:value-type="float" office:value="36" calcext:value-type="float">
            <text:p>36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500" calcext:value-type="float">
            <text:p>500</text:p>
          </table:table-cell>
          <table:table-cell table:style-name="ce45" office:value-type="float" office:value="1005" calcext:value-type="float">
            <text:p>1,005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 table:style-name="Default"/>
          <table:table-cell table:style-name="ce23" office:value-type="float" office:value="30" calcext:value-type="float">
            <text:p>30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46" calcext:value-type="float">
            <text:p>546</text:p>
          </table:table-cell>
          <table:table-cell table:style-name="ce45" office:value-type="float" office:value="1036" calcext:value-type="float">
            <text:p>1,036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 table:style-name="Default"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526" calcext:value-type="float">
            <text:p>526</text:p>
          </table:table-cell>
          <table:table-cell table:style-name="ce44" office:value-type="float" office:value="967" calcext:value-type="float">
            <text:p>967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 table:style-name="Default"/>
          <table:table-cell table:style-name="ce23" office:value-type="float" office:value="37" calcext:value-type="float">
            <text:p>37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435" calcext:value-type="float">
            <text:p>435</text:p>
          </table:table-cell>
          <table:table-cell table:style-name="ce44" office:value-type="float" office:value="857" calcext:value-type="float">
            <text:p>857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 table:style-name="Default"/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459" calcext:value-type="float">
            <text:p>459</text:p>
          </table:table-cell>
          <table:table-cell table:style-name="ce44" office:value-type="float" office:value="869" calcext:value-type="float">
            <text:p>869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484" calcext:value-type="float">
            <text:p>484</text:p>
          </table:table-cell>
          <table:table-cell table:style-name="ce44" office:value-type="float" office:value="940" calcext:value-type="float">
            <text:p>940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386" calcext:value-type="float">
            <text:p>386</text:p>
          </table:table-cell>
          <table:table-cell table:style-name="ce44" office:value-type="float" office:value="780" calcext:value-type="float">
            <text:p>780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413" calcext:value-type="float">
            <text:p>413</text:p>
          </table:table-cell>
          <table:table-cell table:style-name="ce44" office:value-type="float" office:value="710" calcext:value-type="float">
            <text:p>710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 table:style-name="Default"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01" calcext:value-type="float">
            <text:p>301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 table:style-name="Default"/>
          <table:table-cell table:style-name="ce23" office:value-type="float" office:value="16" calcext:value-type="float">
            <text:p>16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315" calcext:value-type="float">
            <text:p>315</text:p>
          </table:table-cell>
          <table:table-cell table:style-name="ce44" office:value-type="float" office:value="549" calcext:value-type="float">
            <text:p>549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 table:style-name="Default"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52" calcext:value-type="float">
            <text:p>252</text:p>
          </table:table-cell>
          <table:table-cell table:style-name="ce44" office:value-type="float" office:value="472" calcext:value-type="float">
            <text:p>472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229" calcext:value-type="float">
            <text:p>229</text:p>
          </table:table-cell>
          <table:table-cell table:style-name="ce44" office:value-type="float" office:value="421" calcext:value-type="float">
            <text:p>421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48" calcext:value-type="float">
            <text:p>248</text:p>
          </table:table-cell>
          <table:table-cell table:style-name="ce44" office:value-type="float" office:value="466" calcext:value-type="float">
            <text:p>466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252" calcext:value-type="float">
            <text:p>252</text:p>
          </table:table-cell>
          <table:table-cell table:style-name="ce44" office:value-type="float" office:value="444" calcext:value-type="float">
            <text:p>444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13" calcext:value-type="float">
            <text:p>213</text:p>
          </table:table-cell>
          <table:table-cell table:style-name="ce44" office:value-type="float" office:value="388" calcext:value-type="float">
            <text:p>388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97" calcext:value-type="float">
            <text:p>197</text:p>
          </table:table-cell>
          <table:table-cell table:style-name="ce44" office:value-type="float" office:value="385" calcext:value-type="float">
            <text:p>385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91" calcext:value-type="float">
            <text:p>191</text:p>
          </table:table-cell>
          <table:table-cell table:style-name="ce44" office:value-type="float" office:value="341" calcext:value-type="float">
            <text:p>341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 table:style-name="Default"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185" calcext:value-type="float">
            <text:p>185</text:p>
          </table:table-cell>
          <table:table-cell table:style-name="ce44" office:value-type="float" office:value="340" calcext:value-type="float">
            <text:p>340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52" calcext:value-type="float">
            <text:p>152</text:p>
          </table:table-cell>
          <table:table-cell table:style-name="ce44" office:value-type="float" office:value="279" calcext:value-type="float">
            <text:p>279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55" calcext:value-type="float">
            <text:p>155</text:p>
          </table:table-cell>
          <table:table-cell table:style-name="ce44" office:value-type="float" office:value="308" calcext:value-type="float">
            <text:p>308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49" calcext:value-type="float">
            <text:p>149</text:p>
          </table:table-cell>
          <table:table-cell table:style-name="ce44" office:value-type="float" office:value="278" calcext:value-type="float">
            <text:p>278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 table:style-name="Default"/>
          <table:table-cell table:style-name="ce23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06" calcext:value-type="float">
            <text:p>106</text:p>
          </table:table-cell>
          <table:table-cell table:style-name="ce44" office:value-type="float" office:value="188" calcext:value-type="float">
            <text:p>188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 table:style-name="Default"/>
          <table:table-cell table:style-name="ce23" office:value-type="float" office:value="6" calcext:value-type="float">
            <text:p>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26" calcext:value-type="float">
            <text:p>126</text:p>
          </table:table-cell>
          <table:table-cell table:style-name="ce44" office:value-type="float" office:value="241" calcext:value-type="float">
            <text:p>241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04" calcext:value-type="float">
            <text:p>104</text:p>
          </table:table-cell>
          <table:table-cell table:style-name="ce44" office:value-type="float" office:value="164" calcext:value-type="float">
            <text:p>164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6" calcext:value-type="float">
            <text:p>66</text:p>
          </table:table-cell>
          <table:table-cell table:style-name="ce44" office:value-type="float" office:value="119" calcext:value-type="float">
            <text:p>119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6" calcext:value-type="float">
            <text:p>66</text:p>
          </table:table-cell>
          <table:table-cell table:style-name="ce44" office:value-type="float" office:value="103" calcext:value-type="float">
            <text:p>103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1" calcext:value-type="float">
            <text:p>41</text:p>
          </table:table-cell>
          <table:table-cell table:style-name="ce44" office:value-type="float" office:value="96" calcext:value-type="float">
            <text:p>96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1" calcext:value-type="float">
            <text:p>41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" calcext:value-type="float">
            <text:p>29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 table:style-name="Default"/>
          <table:table-cell table:style-name="ce23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6" calcext:value-type="float">
            <text:p>26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 table:style-name="Default"/>
          <table:table-cell table:style-name="ce2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" calcext:value-type="float">
            <text:p>23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 table:style-name="Default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 table:style-name="Default"/>
          <table:table-cell table:style-name="ce2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4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TOTAAL.</text:p>
          </table:table-cell>
          <table:table-cell table:style-name="Default"/>
          <table:table-cell table:style-name="ce24" office:value-type="float" office:value="49825" calcext:value-type="float">
            <text:p>49,825</text:p>
          </table:table-cell>
          <table:table-cell table:style-name="ce32" office:value-type="float" office:value="23628" calcext:value-type="float">
            <text:p>23,628</text:p>
          </table:table-cell>
          <table:table-cell table:style-name="ce32" office:value-type="float" office:value="3220" calcext:value-type="float">
            <text:p>3,220</text:p>
          </table:table-cell>
          <table:table-cell table:style-name="ce32" office:value-type="float" office:value="76673" calcext:value-type="float">
            <text:p>76,673</text:p>
          </table:table-cell>
          <table:table-cell table:style-name="ce32" office:value-type="float" office:value="47875" calcext:value-type="float">
            <text:p>47,875</text:p>
          </table:table-cell>
          <table:table-cell table:style-name="ce32" office:value-type="float" office:value="23883" calcext:value-type="float">
            <text:p>23,883</text:p>
          </table:table-cell>
          <table:table-cell table:style-name="ce32" office:value-type="float" office:value="6317" calcext:value-type="float">
            <text:p>6,317</text:p>
          </table:table-cell>
          <table:table-cell table:style-name="ce32" office:value-type="float" office:value="78075" calcext:value-type="float">
            <text:p>78,075</text:p>
          </table:table-cell>
          <table:table-cell table:style-name="ce45" office:value-type="float" office:value="154748" calcext:value-type="float">
            <text:p>154,748</text:p>
          </table:table-cell>
          <table:table-cell table:number-columns-repeated="1012"/>
        </table:table-row>
        <table:table-row table:style-name="ro3">
          <table:table-cell table:style-name="ce8" office:value-type="float" office:value="1849" calcext:value-type="float">
            <text:p>1849</text:p>
          </table:table-cell>
          <table:table-cell table:style-name="ce13" office:value-type="string" calcext:value-type="string">
            <text:p>Beneden het jaar.</text:p>
          </table:table-cell>
          <table:table-cell table:style-name="Default"/>
          <table:table-cell table:style-name="ce24" office:value-type="float" office:value="2743" calcext:value-type="float">
            <text:p>2,743</text:p>
          </table:table-cell>
          <table:table-cell table:style-name="ce31" table:number-columns-repeated="2"/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1" table:number-columns-repeated="2"/>
          <table:table-cell table:style-name="ce32" office:value-type="float" office:value="2600" calcext:value-type="float">
            <text:p>2,600</text:p>
          </table:table-cell>
          <table:table-cell table:style-name="ce45" office:value-type="float" office:value="5343" calcext:value-type="float">
            <text:p>5,343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 table:style-name="Default"/>
          <table:table-cell table:style-name="ce24" office:value-type="float" office:value="2085" calcext:value-type="float">
            <text:p>2,085</text:p>
          </table:table-cell>
          <table:table-cell table:style-name="ce31" table:number-columns-repeated="2"/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1" table:number-columns-repeated="2"/>
          <table:table-cell table:style-name="ce32" office:value-type="float" office:value="2018" calcext:value-type="float">
            <text:p>2,018</text:p>
          </table:table-cell>
          <table:table-cell table:style-name="ce45" office:value-type="float" office:value="4103" calcext:value-type="float">
            <text:p>4,103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 table:style-name="Default"/>
          <table:table-cell table:style-name="ce24" office:value-type="float" office:value="1964" calcext:value-type="float">
            <text:p>1,964</text:p>
          </table:table-cell>
          <table:table-cell table:style-name="ce31" table:number-columns-repeated="2"/>
          <table:table-cell table:style-name="ce32" office:value-type="float" office:value="1964" calcext:value-type="float">
            <text:p>1,964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1" table:number-columns-repeated="2"/>
          <table:table-cell table:style-name="ce32" office:value-type="float" office:value="1981" calcext:value-type="float">
            <text:p>1,981</text:p>
          </table:table-cell>
          <table:table-cell table:style-name="ce45" office:value-type="float" office:value="3945" calcext:value-type="float">
            <text:p>3,945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 table:style-name="Default"/>
          <table:table-cell table:style-name="ce24" office:value-type="float" office:value="2003" calcext:value-type="float">
            <text:p>2,003</text:p>
          </table:table-cell>
          <table:table-cell table:style-name="ce31" table:number-columns-repeated="2"/>
          <table:table-cell table:style-name="ce32" office:value-type="float" office:value="2003" calcext:value-type="float">
            <text:p>2,003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1" table:number-columns-repeated="2"/>
          <table:table-cell table:style-name="ce32" office:value-type="float" office:value="2092" calcext:value-type="float">
            <text:p>2,092</text:p>
          </table:table-cell>
          <table:table-cell table:style-name="ce45" office:value-type="float" office:value="4095" calcext:value-type="float">
            <text:p>4,095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 table:style-name="Default"/>
          <table:table-cell table:style-name="ce24" office:value-type="float" office:value="2315" calcext:value-type="float">
            <text:p>2,315</text:p>
          </table:table-cell>
          <table:table-cell table:style-name="ce31" table:number-columns-repeated="2"/>
          <table:table-cell table:style-name="ce32" office:value-type="float" office:value="2315" calcext:value-type="float">
            <text:p>2,315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1" table:number-columns-repeated="2"/>
          <table:table-cell table:style-name="ce32" office:value-type="float" office:value="2301" calcext:value-type="float">
            <text:p>2,301</text:p>
          </table:table-cell>
          <table:table-cell table:style-name="ce45" office:value-type="float" office:value="4616" calcext:value-type="float">
            <text:p>4,616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 table:style-name="Default"/>
          <table:table-cell table:style-name="ce24" office:value-type="float" office:value="2418" calcext:value-type="float">
            <text:p>2,418</text:p>
          </table:table-cell>
          <table:table-cell table:style-name="ce31" table:number-columns-repeated="2"/>
          <table:table-cell table:number-columns-repeated="2" table:style-name="ce32" office:value-type="float" office:value="2418" calcext:value-type="float">
            <text:p>2,418</text:p>
          </table:table-cell>
          <table:table-cell table:style-name="ce31" table:number-columns-repeated="2"/>
          <table:table-cell table:style-name="ce32" office:value-type="float" office:value="2418" calcext:value-type="float">
            <text:p>2,418</text:p>
          </table:table-cell>
          <table:table-cell table:style-name="ce45" office:value-type="float" office:value="4836" calcext:value-type="float">
            <text:p>4,836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 table:style-name="Default"/>
          <table:table-cell table:style-name="ce24" office:value-type="float" office:value="2221" calcext:value-type="float">
            <text:p>2,221</text:p>
          </table:table-cell>
          <table:table-cell table:style-name="ce31" table:number-columns-repeated="2"/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1" table:number-columns-repeated="2"/>
          <table:table-cell table:style-name="ce32" office:value-type="float" office:value="2217" calcext:value-type="float">
            <text:p>2,217</text:p>
          </table:table-cell>
          <table:table-cell table:style-name="ce45" office:value-type="float" office:value="4438" calcext:value-type="float">
            <text:p>4,438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 table:style-name="Default"/>
          <table:table-cell table:style-name="ce24" office:value-type="float" office:value="2250" calcext:value-type="float">
            <text:p>2,250</text:p>
          </table:table-cell>
          <table:table-cell table:style-name="ce31" table:number-columns-repeated="2"/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1" table:number-columns-repeated="2"/>
          <table:table-cell table:style-name="ce32" office:value-type="float" office:value="2216" calcext:value-type="float">
            <text:p>2,216</text:p>
          </table:table-cell>
          <table:table-cell table:style-name="ce45" office:value-type="float" office:value="4466" calcext:value-type="float">
            <text:p>4,466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 table:style-name="Default"/>
          <table:table-cell table:style-name="ce24" office:value-type="float" office:value="2229" calcext:value-type="float">
            <text:p>2,229</text:p>
          </table:table-cell>
          <table:table-cell table:style-name="ce31" table:number-columns-repeated="2"/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1" table:number-columns-repeated="2"/>
          <table:table-cell table:style-name="ce32" office:value-type="float" office:value="2228" calcext:value-type="float">
            <text:p>2,228</text:p>
          </table:table-cell>
          <table:table-cell table:style-name="ce45" office:value-type="float" office:value="4457" calcext:value-type="float">
            <text:p>4,457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 table:style-name="Default"/>
          <table:table-cell table:style-name="ce24" office:value-type="float" office:value="2121" calcext:value-type="float">
            <text:p>2,121</text:p>
          </table:table-cell>
          <table:table-cell table:style-name="ce31" table:number-columns-repeated="2"/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1" table:number-columns-repeated="2"/>
          <table:table-cell table:style-name="ce32" office:value-type="float" office:value="2128" calcext:value-type="float">
            <text:p>2,128</text:p>
          </table:table-cell>
          <table:table-cell table:style-name="ce45" office:value-type="float" office:value="4249" calcext:value-type="float">
            <text:p>4,249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 table:style-name="Default"/>
          <table:table-cell table:style-name="ce24" office:value-type="float" office:value="2306" calcext:value-type="float">
            <text:p>2,306</text:p>
          </table:table-cell>
          <table:table-cell table:style-name="ce31" table:number-columns-repeated="2"/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1" table:number-columns-repeated="2"/>
          <table:table-cell table:style-name="ce32" office:value-type="float" office:value="2234" calcext:value-type="float">
            <text:p>2,234</text:p>
          </table:table-cell>
          <table:table-cell table:style-name="ce45" office:value-type="float" office:value="4540" calcext:value-type="float">
            <text:p>4,540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 table:style-name="Default"/>
          <table:table-cell table:style-name="ce24" office:value-type="float" office:value="2034" calcext:value-type="float">
            <text:p>2,034</text:p>
          </table:table-cell>
          <table:table-cell table:style-name="ce31" table:number-columns-repeated="2"/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1" table:number-columns-repeated="2"/>
          <table:table-cell table:style-name="ce32" office:value-type="float" office:value="1994" calcext:value-type="float">
            <text:p>1,994</text:p>
          </table:table-cell>
          <table:table-cell table:style-name="ce45" office:value-type="float" office:value="4028" calcext:value-type="float">
            <text:p>4,028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 table:style-name="Default"/>
          <table:table-cell table:style-name="ce24" office:value-type="float" office:value="2083" calcext:value-type="float">
            <text:p>2,083</text:p>
          </table:table-cell>
          <table:table-cell table:style-name="ce31" table:number-columns-repeated="2"/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1" table:number-columns-repeated="2"/>
          <table:table-cell table:style-name="ce32" office:value-type="float" office:value="2027" calcext:value-type="float">
            <text:p>2,027</text:p>
          </table:table-cell>
          <table:table-cell table:style-name="ce45" office:value-type="float" office:value="4110" calcext:value-type="float">
            <text:p>4,110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 table:style-name="Default"/>
          <table:table-cell table:style-name="ce24" office:value-type="float" office:value="2089" calcext:value-type="float">
            <text:p>2,089</text:p>
          </table:table-cell>
          <table:table-cell table:style-name="ce31" table:number-columns-repeated="2"/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1" table:number-columns-repeated="2"/>
          <table:table-cell table:style-name="ce32" office:value-type="float" office:value="2031" calcext:value-type="float">
            <text:p>2,031</text:p>
          </table:table-cell>
          <table:table-cell table:style-name="ce45" office:value-type="float" office:value="4120" calcext:value-type="float">
            <text:p>4,120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 table:style-name="Default"/>
          <table:table-cell table:style-name="ce24" office:value-type="float" office:value="1979" calcext:value-type="float">
            <text:p>1,979</text:p>
          </table:table-cell>
          <table:table-cell table:style-name="ce31" table:number-columns-repeated="2"/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1" table:number-columns-repeated="2"/>
          <table:table-cell table:style-name="ce32" office:value-type="float" office:value="2033" calcext:value-type="float">
            <text:p>2,033</text:p>
          </table:table-cell>
          <table:table-cell table:style-name="ce45" office:value-type="float" office:value="4012" calcext:value-type="float">
            <text:p>4,012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 table:style-name="Default"/>
          <table:table-cell table:style-name="ce24" office:value-type="float" office:value="1906" calcext:value-type="float">
            <text:p>1,906</text:p>
          </table:table-cell>
          <table:table-cell table:style-name="ce31" table:number-columns-repeated="2"/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1" table:number-columns-repeated="2"/>
          <table:table-cell table:style-name="ce32" office:value-type="float" office:value="1981" calcext:value-type="float">
            <text:p>1,981</text:p>
          </table:table-cell>
          <table:table-cell table:style-name="ce45" office:value-type="float" office:value="3887" calcext:value-type="float">
            <text:p>3,887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 table:style-name="Default"/>
          <table:table-cell table:style-name="ce24" office:value-type="float" office:value="1901" calcext:value-type="float">
            <text:p>1,901</text:p>
          </table:table-cell>
          <table:table-cell table:style-name="ce31" table:number-columns-repeated="2"/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1" table:number-columns-repeated="2"/>
          <table:table-cell table:style-name="ce32" office:value-type="float" office:value="2030" calcext:value-type="float">
            <text:p>2,030</text:p>
          </table:table-cell>
          <table:table-cell table:style-name="ce45" office:value-type="float" office:value="3931" calcext:value-type="float">
            <text:p>3,931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 table:style-name="Default"/>
          <table:table-cell table:style-name="ce24" office:value-type="float" office:value="1706" calcext:value-type="float">
            <text:p>1,706</text:p>
          </table:table-cell>
          <table:table-cell table:style-name="ce31" table:number-columns-repeated="2"/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1790" calcext:value-type="float">
            <text:p>1,790</text:p>
          </table:table-cell>
          <table:table-cell table:style-name="ce45" office:value-type="float" office:value="3496" calcext:value-type="float">
            <text:p>3,496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 table:style-name="Default"/>
          <table:table-cell table:style-name="ce24" office:value-type="float" office:value="1672" calcext:value-type="float">
            <text:p>1,67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2" office:value-type="float" office:value="1734" calcext:value-type="float">
            <text:p>1,734</text:p>
          </table:table-cell>
          <table:table-cell table:style-name="ce45" office:value-type="float" office:value="3407" calcext:value-type="float">
            <text:p>3,407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 table:style-name="Default"/>
          <table:table-cell table:style-name="ce24" office:value-type="float" office:value="1778" calcext:value-type="float">
            <text:p>1,778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32" office:value-type="float" office:value="1825" calcext:value-type="float">
            <text:p>1,825</text:p>
          </table:table-cell>
          <table:table-cell table:style-name="ce45" office:value-type="float" office:value="3607" calcext:value-type="float">
            <text:p>3,607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 table:style-name="Default"/>
          <table:table-cell table:style-name="ce24" office:value-type="float" office:value="1738" calcext:value-type="float">
            <text:p>1,738</text:p>
          </table:table-cell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821" calcext:value-type="float">
            <text:p>1,821</text:p>
          </table:table-cell>
          <table:table-cell table:style-name="ce45" office:value-type="float" office:value="3581" calcext:value-type="float">
            <text:p>3,581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 table:style-name="Default"/>
          <table:table-cell table:style-name="ce24" office:value-type="float" office:value="1637" calcext:value-type="float">
            <text:p>1,637</text:p>
          </table:table-cell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669" calcext:value-type="float">
            <text:p>1,669</text:p>
          </table:table-cell>
          <table:table-cell table:style-name="ce45" office:value-type="float" office:value="3339" calcext:value-type="float">
            <text:p>3,339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 table:style-name="Default"/>
          <table:table-cell table:style-name="ce24" office:value-type="float" office:value="1257" calcext:value-type="float">
            <text:p>1,257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402" calcext:value-type="float">
            <text:p>1,402</text:p>
          </table:table-cell>
          <table:table-cell table:style-name="ce45" office:value-type="float" office:value="2712" calcext:value-type="float">
            <text:p>2,712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 table:style-name="Default"/>
          <table:table-cell table:style-name="ce24" office:value-type="float" office:value="1384" calcext:value-type="float">
            <text:p>1,384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5" office:value-type="float" office:value="3156" calcext:value-type="float">
            <text:p>3,156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 table:style-name="Default"/>
          <table:table-cell table:style-name="ce24" office:value-type="float" office:value="1372" calcext:value-type="float">
            <text:p>1,372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698" calcext:value-type="float">
            <text:p>1,698</text:p>
          </table:table-cell>
          <table:table-cell table:style-name="ce45" office:value-type="float" office:value="3305" calcext:value-type="float">
            <text:p>3,305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 table:style-name="Default"/>
          <table:table-cell table:style-name="ce24" office:value-type="float" office:value="1269" calcext:value-type="float">
            <text:p>1,269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641" calcext:value-type="float">
            <text:p>1,641</text:p>
          </table:table-cell>
          <table:table-cell table:style-name="ce45" office:value-type="float" office:value="3251" calcext:value-type="float">
            <text:p>3,251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 table:style-name="Default"/>
          <table:table-cell table:style-name="ce24" office:value-type="float" office:value="1157" calcext:value-type="float">
            <text:p>1,157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5" office:value-type="float" office:value="3275" calcext:value-type="float">
            <text:p>3,275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 table:style-name="Default"/>
          <table:table-cell table:style-name="ce24" office:value-type="float" office:value="1013" calcext:value-type="float">
            <text:p>1,013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585" calcext:value-type="float">
            <text:p>1,585</text:p>
          </table:table-cell>
          <table:table-cell table:style-name="ce45" office:value-type="float" office:value="3178" calcext:value-type="float">
            <text:p>3,178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 table:style-name="Default"/>
          <table:table-cell table:style-name="ce23" office:value-type="float" office:value="763" calcext:value-type="float">
            <text:p>763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31" calcext:value-type="float">
            <text:p>31</text:p>
          </table:table-cell>
          <table:table-cell table:style-name="ce32" office:value-type="float" office:value="1544" calcext:value-type="float">
            <text:p>1,544</text:p>
          </table:table-cell>
          <table:table-cell table:style-name="ce45" office:value-type="float" office:value="2952" calcext:value-type="float">
            <text:p>2,952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 table:style-name="Default"/>
          <table:table-cell table:style-name="ce23" office:value-type="float" office:value="652" calcext:value-type="float">
            <text:p>652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39" calcext:value-type="float">
            <text:p>39</text:p>
          </table:table-cell>
          <table:table-cell table:style-name="ce32" office:value-type="float" office:value="1579" calcext:value-type="float">
            <text:p>1,579</text:p>
          </table:table-cell>
          <table:table-cell table:style-name="ce45" office:value-type="float" office:value="2964" calcext:value-type="float">
            <text:p>2,964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 table:style-name="Default"/>
          <table:table-cell table:style-name="ce23" office:value-type="float" office:value="637" calcext:value-type="float">
            <text:p>637</text:p>
          </table:table-cell>
          <table:table-cell table:style-name="ce31" office:value-type="float" office:value="838" calcext:value-type="float">
            <text:p>838</text:p>
          </table:table-cell>
          <table:table-cell table:style-name="ce31" office:value-type="float" office:value="34" calcext:value-type="float">
            <text:p>34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1631" calcext:value-type="float">
            <text:p>1,631</text:p>
          </table:table-cell>
          <table:table-cell table:style-name="ce45" office:value-type="float" office:value="3140" calcext:value-type="float">
            <text:p>3,140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 table:style-name="Default"/>
          <table:table-cell table:style-name="ce23" office:value-type="float" office:value="470" calcext:value-type="float">
            <text:p>470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414" calcext:value-type="float">
            <text:p>1,414</text:p>
          </table:table-cell>
          <table:table-cell table:style-name="ce45" office:value-type="float" office:value="2718" calcext:value-type="float">
            <text:p>2,718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 table:style-name="Default"/>
          <table:table-cell table:style-name="ce23" office:value-type="float" office:value="508" calcext:value-type="float">
            <text:p>508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405" calcext:value-type="float">
            <text:p>1,405</text:p>
          </table:table-cell>
          <table:table-cell table:style-name="ce45" office:value-type="float" office:value="2809" calcext:value-type="float">
            <text:p>2,809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 table:style-name="Default"/>
          <table:table-cell table:style-name="ce23" office:value-type="float" office:value="423" calcext:value-type="float">
            <text:p>423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1" office:value-type="float" office:value="346" calcext:value-type="float">
            <text:p>346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1" office:value-type="float" office:value="53" calcext:value-type="float">
            <text:p>53</text:p>
          </table:table-cell>
          <table:table-cell table:style-name="ce32" office:value-type="float" office:value="1408" calcext:value-type="float">
            <text:p>1,408</text:p>
          </table:table-cell>
          <table:table-cell table:style-name="ce45" office:value-type="float" office:value="2759" calcext:value-type="float">
            <text:p>2,759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 table:style-name="Default"/>
          <table:table-cell table:style-name="ce23" office:value-type="float" office:value="352" calcext:value-type="float">
            <text:p>352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87" calcext:value-type="float">
            <text:p>87</text:p>
          </table:table-cell>
          <table:table-cell table:style-name="ce32" office:value-type="float" office:value="1378" calcext:value-type="float">
            <text:p>1,378</text:p>
          </table:table-cell>
          <table:table-cell table:style-name="ce45" office:value-type="float" office:value="2736" calcext:value-type="float">
            <text:p>2,736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 table:style-name="Default"/>
          <table:table-cell table:style-name="ce23" office:value-type="float" office:value="282" calcext:value-type="float">
            <text:p>282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1" office:value-type="float" office:value="270" calcext:value-type="float">
            <text:p>270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1" office:value-type="float" office:value="72" calcext:value-type="float">
            <text:p>72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5" office:value-type="float" office:value="2665" calcext:value-type="float">
            <text:p>2,665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 table:style-name="Default"/>
          <table:table-cell table:style-name="ce23" office:value-type="float" office:value="257" calcext:value-type="float">
            <text:p>257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57" calcext:value-type="float">
            <text:p>57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107" calcext:value-type="float">
            <text:p>107</text:p>
          </table:table-cell>
          <table:table-cell table:style-name="ce32" office:value-type="float" office:value="1315" calcext:value-type="float">
            <text:p>1,315</text:p>
          </table:table-cell>
          <table:table-cell table:style-name="ce45" office:value-type="float" office:value="2553" calcext:value-type="float">
            <text:p>2,553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 table:style-name="Default"/>
          <table:table-cell table:style-name="ce23" office:value-type="float" office:value="196" calcext:value-type="float">
            <text:p>196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1184" calcext:value-type="float">
            <text:p>1,184</text:p>
          </table:table-cell>
          <table:table-cell table:style-name="ce45" office:value-type="float" office:value="2290" calcext:value-type="float">
            <text:p>2,290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 table:style-name="Default"/>
          <table:table-cell table:style-name="ce23" office:value-type="float" office:value="178" calcext:value-type="float">
            <text:p>178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50" calcext:value-type="float">
            <text:p>50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948" calcext:value-type="float">
            <text:p>948</text:p>
          </table:table-cell>
          <table:table-cell table:style-name="ce31" office:value-type="float" office:value="90" calcext:value-type="float">
            <text:p>90</text:p>
          </table:table-cell>
          <table:table-cell table:style-name="ce32" office:value-type="float" office:value="1235" calcext:value-type="float">
            <text:p>1,235</text:p>
          </table:table-cell>
          <table:table-cell table:style-name="ce45" office:value-type="float" office:value="2381" calcext:value-type="float">
            <text:p>2,381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 table:style-name="Default"/>
          <table:table-cell table:style-name="ce23" office:value-type="float" office:value="163" calcext:value-type="float">
            <text:p>163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805" calcext:value-type="float">
            <text:p>805</text:p>
          </table:table-cell>
          <table:table-cell table:style-name="ce31" office:value-type="float" office:value="96" calcext:value-type="float">
            <text:p>96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5" office:value-type="float" office:value="2182" calcext:value-type="float">
            <text:p>2,182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 table:style-name="Default"/>
          <table:table-cell table:style-name="ce23" office:value-type="float" office:value="161" calcext:value-type="float">
            <text:p>161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63" calcext:value-type="float">
            <text:p>963</text:p>
          </table:table-cell>
          <table:table-cell table:style-name="ce45" office:value-type="float" office:value="1871" calcext:value-type="float">
            <text:p>1,871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31" office:value-type="float" office:value="687" calcext:value-type="float">
            <text:p>68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4" calcext:value-type="float">
            <text:p>854</text:p>
          </table:table-cell>
          <table:table-cell table:style-name="ce45" office:value-type="float" office:value="1694" calcext:value-type="float">
            <text:p>1,694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 table:style-name="Default"/>
          <table:table-cell table:style-name="ce23" office:value-type="float" office:value="121" calcext:value-type="float">
            <text:p>121</text:p>
          </table:table-cell>
          <table:table-cell table:style-name="ce31" office:value-type="float" office:value="814" calcext:value-type="float">
            <text:p>81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101" calcext:value-type="float">
            <text:p>101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5" office:value-type="float" office:value="1990" calcext:value-type="float">
            <text:p>1,990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 table:style-name="Default"/>
          <table:table-cell table:style-name="ce23" office:value-type="float" office:value="116" calcext:value-type="float">
            <text:p>11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990" calcext:value-type="float">
            <text:p>990</text:p>
          </table:table-cell>
          <table:table-cell table:style-name="ce45" office:value-type="float" office:value="1926" calcext:value-type="float">
            <text:p>1,926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 table:style-name="Default"/>
          <table:table-cell table:style-name="ce23" office:value-type="float" office:value="114" calcext:value-type="float">
            <text:p>114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982" calcext:value-type="float">
            <text:p>982</text:p>
          </table:table-cell>
          <table:table-cell table:style-name="ce45" office:value-type="float" office:value="1926" calcext:value-type="float">
            <text:p>1,926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 table:style-name="Default"/>
          <table:table-cell table:style-name="ce23" office:value-type="float" office:value="101" calcext:value-type="float">
            <text:p>101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" calcext:value-type="float">
            <text:p>1</text:p>
          </table:table-cell>
          <table:table-cell table:style-name="ce45" office:value-type="float" office:value="1905" calcext:value-type="float">
            <text:p>1,905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 table:style-name="Default"/>
          <table:table-cell table:style-name="ce23" office:value-type="float" office:value="118" calcext:value-type="float">
            <text:p>118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73" calcext:value-type="float">
            <text:p>73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695" calcext:value-type="float">
            <text:p>695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984" calcext:value-type="float">
            <text:p>984</text:p>
          </table:table-cell>
          <table:table-cell table:style-name="ce45" office:value-type="float" office:value="1990" calcext:value-type="float">
            <text:p>1,990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 table:style-name="Default"/>
          <table:table-cell table:style-name="ce23" office:value-type="float" office:value="96" calcext:value-type="float">
            <text:p>96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168" calcext:value-type="float">
            <text:p>168</text:p>
          </table:table-cell>
          <table:table-cell table:style-name="ce32" office:value-type="float" office:value="1051" calcext:value-type="float">
            <text:p>1,051</text:p>
          </table:table-cell>
          <table:table-cell table:style-name="ce45" office:value-type="float" office:value="1991" calcext:value-type="float">
            <text:p>1,991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 table:style-name="Default"/>
          <table:table-cell table:style-name="ce23" office:value-type="float" office:value="80" calcext:value-type="float">
            <text:p>80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906" calcext:value-type="float">
            <text:p>906</text:p>
          </table:table-cell>
          <table:table-cell table:style-name="ce45" office:value-type="float" office:value="1769" calcext:value-type="float">
            <text:p>1,769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 table:style-name="Default"/>
          <table:table-cell table:style-name="ce23" office:value-type="float" office:value="84" calcext:value-type="float">
            <text:p>84</text:p>
          </table:table-cell>
          <table:table-cell table:style-name="ce31" office:value-type="float" office:value="739" calcext:value-type="float">
            <text:p>739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191" calcext:value-type="float">
            <text:p>19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45" office:value-type="float" office:value="1940" calcext:value-type="float">
            <text:p>1,940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 table:style-name="Default"/>
          <table:table-cell table:style-name="ce23" office:value-type="float" office:value="76" calcext:value-type="float">
            <text:p>7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914" calcext:value-type="float">
            <text:p>914</text:p>
          </table:table-cell>
          <table:table-cell table:style-name="ce45" office:value-type="float" office:value="1836" calcext:value-type="float">
            <text:p>1,836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 table:style-name="Default"/>
          <table:table-cell table:style-name="ce24" office:value-type="float" office:value="58689" calcext:value-type="float">
            <text:p>58,689</text:p>
          </table:table-cell>
          <table:table-cell table:style-name="ce32" office:value-type="float" office:value="20335" calcext:value-type="float">
            <text:p>20,335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80258" calcext:value-type="float">
            <text:p>80,258</text:p>
          </table:table-cell>
          <table:table-cell table:style-name="ce32" office:value-type="float" office:value="57741" calcext:value-type="float">
            <text:p>57,741</text:p>
          </table:table-cell>
          <table:table-cell table:style-name="ce32" office:value-type="float" office:value="22126" calcext:value-type="float">
            <text:p>22,126</text:p>
          </table:table-cell>
          <table:table-cell table:style-name="ce32" office:value-type="float" office:value="2345" calcext:value-type="float">
            <text:p>2,345</text:p>
          </table:table-cell>
          <table:table-cell table:style-name="ce32" office:value-type="float" office:value="82212" calcext:value-type="float">
            <text:p>82,212</text:p>
          </table:table-cell>
          <table:table-cell table:style-name="ce45" office:value-type="float" office:value="162470" calcext:value-type="float">
            <text:p>162,470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 table:style-name="Default"/>
          <table:table-cell table:style-name="ce23" office:value-type="float" office:value="60" calcext:value-type="float">
            <text:p>60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814" calcext:value-type="float">
            <text:p>814</text:p>
          </table:table-cell>
          <table:table-cell table:style-name="ce45" office:value-type="float" office:value="1604" calcext:value-type="float">
            <text:p>1,604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 table:style-name="Default"/>
          <table:table-cell table:style-name="ce23" office:value-type="float" office:value="78" calcext:value-type="float">
            <text:p>78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853" calcext:value-type="float">
            <text:p>853</text:p>
          </table:table-cell>
          <table:table-cell table:style-name="ce45" office:value-type="float" office:value="1718" calcext:value-type="float">
            <text:p>1,718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813" calcext:value-type="float">
            <text:p>813</text:p>
          </table:table-cell>
          <table:table-cell table:style-name="ce45" office:value-type="float" office:value="1505" calcext:value-type="float">
            <text:p>1,505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 table:style-name="Default"/>
          <table:table-cell table:style-name="ce23" office:value-type="float" office:value="59" calcext:value-type="float">
            <text:p>59</text:p>
          </table:table-cell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822" calcext:value-type="float">
            <text:p>822</text:p>
          </table:table-cell>
          <table:table-cell table:style-name="ce45" office:value-type="float" office:value="1523" calcext:value-type="float">
            <text:p>1,523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25" calcext:value-type="float">
            <text:p>62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679" calcext:value-type="float">
            <text:p>679</text:p>
          </table:table-cell>
          <table:table-cell table:style-name="ce45" office:value-type="float" office:value="1304" calcext:value-type="float">
            <text:p>1,304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 table:style-name="Default"/>
          <table:table-cell table:style-name="ce23" office:value-type="float" office:value="48" calcext:value-type="float">
            <text:p>48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700" calcext:value-type="float">
            <text:p>700</text:p>
          </table:table-cell>
          <table:table-cell table:style-name="ce45" office:value-type="float" office:value="1347" calcext:value-type="float">
            <text:p>1,347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 table:style-name="Default"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655" calcext:value-type="float">
            <text:p>655</text:p>
          </table:table-cell>
          <table:table-cell table:style-name="ce45" office:value-type="float" office:value="1252" calcext:value-type="float">
            <text:p>1,252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 table:style-name="Default"/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691" calcext:value-type="float">
            <text:p>691</text:p>
          </table:table-cell>
          <table:table-cell table:style-name="ce45" office:value-type="float" office:value="1288" calcext:value-type="float">
            <text:p>1,288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 table:style-name="Default"/>
          <table:table-cell table:style-name="ce23" office:value-type="float" office:value="49" calcext:value-type="float">
            <text:p>49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657" calcext:value-type="float">
            <text:p>657</text:p>
          </table:table-cell>
          <table:table-cell table:style-name="ce45" office:value-type="float" office:value="1182" calcext:value-type="float">
            <text:p>1,182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600" calcext:value-type="float">
            <text:p>600</text:p>
          </table:table-cell>
          <table:table-cell table:style-name="ce45" office:value-type="float" office:value="1105" calcext:value-type="float">
            <text:p>1,105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 table:style-name="Default"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88" calcext:value-type="float">
            <text:p>588</text:p>
          </table:table-cell>
          <table:table-cell table:style-name="ce45" office:value-type="float" office:value="1084" calcext:value-type="float">
            <text:p>1,084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608" calcext:value-type="float">
            <text:p>608</text:p>
          </table:table-cell>
          <table:table-cell table:style-name="ce45" office:value-type="float" office:value="1136" calcext:value-type="float">
            <text:p>1,136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 table:style-name="Default"/>
          <table:table-cell table:style-name="ce23" office:value-type="float" office:value="24" calcext:value-type="float">
            <text:p>24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494" calcext:value-type="float">
            <text:p>494</text:p>
          </table:table-cell>
          <table:table-cell table:style-name="ce44" office:value-type="float" office:value="935" calcext:value-type="float">
            <text:p>935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522" calcext:value-type="float">
            <text:p>522</text:p>
          </table:table-cell>
          <table:table-cell table:style-name="ce44" office:value-type="float" office:value="876" calcext:value-type="float">
            <text:p>876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 table:style-name="Default"/>
          <table:table-cell table:style-name="ce23" office:value-type="float" office:value="16" calcext:value-type="float">
            <text:p>16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392" calcext:value-type="float">
            <text:p>392</text:p>
          </table:table-cell>
          <table:table-cell table:style-name="ce44" office:value-type="float" office:value="714" calcext:value-type="float">
            <text:p>714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 table:style-name="Default"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398" calcext:value-type="float">
            <text:p>398</text:p>
          </table:table-cell>
          <table:table-cell table:style-name="ce44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310" calcext:value-type="float">
            <text:p>310</text:p>
          </table:table-cell>
          <table:table-cell table:style-name="ce44" office:value-type="float" office:value="565" calcext:value-type="float">
            <text:p>565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 table:style-name="Default"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292" calcext:value-type="float">
            <text:p>292</text:p>
          </table:table-cell>
          <table:table-cell table:style-name="ce44" office:value-type="float" office:value="515" calcext:value-type="float">
            <text:p>515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1" calcext:value-type="float">
            <text:p>311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 table:style-name="Default"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324" calcext:value-type="float">
            <text:p>324</text:p>
          </table:table-cell>
          <table:table-cell table:style-name="ce44" office:value-type="float" office:value="566" calcext:value-type="float">
            <text:p>566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8" calcext:value-type="float">
            <text:p>258</text:p>
          </table:table-cell>
          <table:table-cell table:style-name="ce44" office:value-type="float" office:value="465" calcext:value-type="float">
            <text:p>465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66" calcext:value-type="float">
            <text:p>266</text:p>
          </table:table-cell>
          <table:table-cell table:style-name="ce44" office:value-type="float" office:value="503" calcext:value-type="float">
            <text:p>503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53" calcext:value-type="float">
            <text:p>253</text:p>
          </table:table-cell>
          <table:table-cell table:style-name="ce44" office:value-type="float" office:value="434" calcext:value-type="float">
            <text:p>434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236" calcext:value-type="float">
            <text:p>236</text:p>
          </table:table-cell>
          <table:table-cell table:style-name="ce44" office:value-type="float" office:value="417" calcext:value-type="float">
            <text:p>417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90" calcext:value-type="float">
            <text:p>190</text:p>
          </table:table-cell>
          <table:table-cell table:style-name="ce44" office:value-type="float" office:value="343" calcext:value-type="float">
            <text:p>343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 table:style-name="Default"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15" calcext:value-type="float">
            <text:p>215</text:p>
          </table:table-cell>
          <table:table-cell table:style-name="ce44" office:value-type="float" office:value="392" calcext:value-type="float">
            <text:p>392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94" calcext:value-type="float">
            <text:p>194</text:p>
          </table:table-cell>
          <table:table-cell table:style-name="ce44" office:value-type="float" office:value="346" calcext:value-type="float">
            <text:p>346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44" calcext:value-type="float">
            <text:p>144</text:p>
          </table:table-cell>
          <table:table-cell table:style-name="ce44" office:value-type="float" office:value="245" calcext:value-type="float">
            <text:p>245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number-columns-repeated="2" table:style-name="ce31" office:value-type="float" office:value="62" calcext:value-type="float">
            <text:p>6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64" calcext:value-type="float">
            <text:p>164</text:p>
          </table:table-cell>
          <table:table-cell table:style-name="ce44" office:value-type="float" office:value="296" calcext:value-type="float">
            <text:p>296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34" calcext:value-type="float">
            <text:p>134</text:p>
          </table:table-cell>
          <table:table-cell table:style-name="ce44" office:value-type="float" office:value="210" calcext:value-type="float">
            <text:p>210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86" calcext:value-type="float">
            <text:p>86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7" calcext:value-type="float">
            <text:p>77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4" office:value-type="float" office:value="125" calcext:value-type="float">
            <text:p>125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66" calcext:value-type="float">
            <text:p>66</text:p>
          </table:table-cell>
          <table:table-cell table:style-name="ce44" office:value-type="float" office:value="110" calcext:value-type="float">
            <text:p>110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 table:style-name="Default"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8" calcext:value-type="float">
            <text:p>48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 table:style-name="Default"/>
          <table:table-cell table:style-name="ce23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4" calcext:value-type="float">
            <text:p>34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 table:style-name="Default"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7" calcext:value-type="float">
            <text:p>37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 table:style-name="Default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1" calcext:value-type="float">
            <text:p>21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 table:style-name="Default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 table:style-name="Default"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 table:style-name="Default"/>
          <table:table-cell table:style-name="ce2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4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 table:style-name="Default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 table:style-name="Default"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44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14" office:value-type="string" calcext:value-type="string">
            <text:p>TOTAAL.</text:p>
          </table:table-cell>
          <table:table-cell table:style-name="Default"/>
          <table:table-cell table:style-name="ce25" office:value-type="float" office:value="59549" calcext:value-type="float">
            <text:p>59,549</text:p>
          </table:table-cell>
          <table:table-cell table:style-name="ce33" office:value-type="float" office:value="28780" calcext:value-type="float">
            <text:p>28,780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92167" calcext:value-type="float">
            <text:p>92,167</text:p>
          </table:table-cell>
          <table:table-cell table:style-name="ce33" office:value-type="float" office:value="58936" calcext:value-type="float">
            <text:p>58,936</text:p>
          </table:table-cell>
          <table:table-cell table:style-name="ce33" office:value-type="float" office:value="29099" calcext:value-type="float">
            <text:p>29,099</text:p>
          </table:table-cell>
          <table:table-cell table:style-name="ce33" office:value-type="float" office:value="8240" calcext:value-type="float">
            <text:p>8,240</text:p>
          </table:table-cell>
          <table:table-cell table:style-name="ce33" office:value-type="float" office:value="96275" calcext:value-type="float">
            <text:p>96,275</text:p>
          </table:table-cell>
          <table:table-cell table:style-name="ce46" office:value-type="float" office:value="188442" calcext:value-type="float">
            <text:p>188,442</text:p>
          </table:table-cell>
          <table:table-cell table:number-columns-repeated="1012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7" table:default-cell-style-name="ce11"/>
        <table:table-column table:style-name="co4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63" office:value-type="string" calcext:value-type="string">
            <text:p>Editregel</text:p>
          </table:table-cell>
          <table:table-cell table:style-name="ce63" office:value-type="string" calcext:value-type="string">
            <text:p>Deel telling</text:p>
          </table:table-cell>
          <table:table-cell table:style-name="ce63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4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float" office:value="8321" calcext:value-type="float">
            <text:p>832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1" calcext:value-type="float">
            <text:p>3802390040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322" calcext:value-type="float">
            <text:p>832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2" calcext:value-type="float">
            <text:p>3802390040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323" calcext:value-type="float">
            <text:p>832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3" calcext:value-type="float">
            <text:p>3802390040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324" calcext:value-type="float">
            <text:p>832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4" calcext:value-type="float">
            <text:p>3802390040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325" calcext:value-type="float">
            <text:p>832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5" calcext:value-type="float">
            <text:p>3802390040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326" calcext:value-type="float">
            <text:p>832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6" calcext:value-type="float">
            <text:p>3802390040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327" calcext:value-type="float">
            <text:p>832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7" calcext:value-type="float">
            <text:p>3802390040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328" calcext:value-type="float">
            <text:p>832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8" calcext:value-type="float">
            <text:p>3802390040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329" calcext:value-type="float">
            <text:p>832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09" calcext:value-type="float">
            <text:p>3802390040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330" calcext:value-type="float">
            <text:p>833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0" calcext:value-type="float">
            <text:p>3802390040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331" calcext:value-type="float">
            <text:p>833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1" calcext:value-type="float">
            <text:p>3802390040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332" calcext:value-type="float">
            <text:p>833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2" calcext:value-type="float">
            <text:p>3802390040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333" calcext:value-type="float">
            <text:p>833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3" calcext:value-type="float">
            <text:p>3802390040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334" calcext:value-type="float">
            <text:p>833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4" calcext:value-type="float">
            <text:p>3802390040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335" calcext:value-type="float">
            <text:p>833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5" calcext:value-type="float">
            <text:p>3802390040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336" calcext:value-type="float">
            <text:p>833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6" calcext:value-type="float">
            <text:p>3802390040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337" calcext:value-type="float">
            <text:p>833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7" calcext:value-type="float">
            <text:p>3802390040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338" calcext:value-type="float">
            <text:p>833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8" calcext:value-type="float">
            <text:p>3802390040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339" calcext:value-type="float">
            <text:p>833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19" calcext:value-type="float">
            <text:p>3802390040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340" calcext:value-type="float">
            <text:p>834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0" calcext:value-type="float">
            <text:p>3802390040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341" calcext:value-type="float">
            <text:p>834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1" calcext:value-type="float">
            <text:p>3802390040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342" calcext:value-type="float">
            <text:p>834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2" calcext:value-type="float">
            <text:p>3802390040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343" calcext:value-type="float">
            <text:p>834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3" calcext:value-type="float">
            <text:p>3802390040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344" calcext:value-type="float">
            <text:p>834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4" calcext:value-type="float">
            <text:p>3802390040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345" calcext:value-type="float">
            <text:p>834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5" calcext:value-type="float">
            <text:p>3802390040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346" calcext:value-type="float">
            <text:p>834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6" calcext:value-type="float">
            <text:p>3802390040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347" calcext:value-type="float">
            <text:p>834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7" calcext:value-type="float">
            <text:p>3802390040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348" calcext:value-type="float">
            <text:p>834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8" calcext:value-type="float">
            <text:p>3802390040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349" calcext:value-type="float">
            <text:p>834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29" calcext:value-type="float">
            <text:p>3802390040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350" calcext:value-type="float">
            <text:p>835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0" calcext:value-type="float">
            <text:p>3802390040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351" calcext:value-type="float">
            <text:p>835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1" calcext:value-type="float">
            <text:p>3802390040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352" calcext:value-type="float">
            <text:p>835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2" calcext:value-type="float">
            <text:p>3802390040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353" calcext:value-type="float">
            <text:p>835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3" calcext:value-type="float">
            <text:p>3802390040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354" calcext:value-type="float">
            <text:p>835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4" calcext:value-type="float">
            <text:p>3802390040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355" calcext:value-type="float">
            <text:p>835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5" calcext:value-type="float">
            <text:p>3802390040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356" calcext:value-type="float">
            <text:p>835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6" calcext:value-type="float">
            <text:p>3802390040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357" calcext:value-type="float">
            <text:p>835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7" calcext:value-type="float">
            <text:p>3802390040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358" calcext:value-type="float">
            <text:p>835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8" calcext:value-type="float">
            <text:p>3802390040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359" calcext:value-type="float">
            <text:p>835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39" calcext:value-type="float">
            <text:p>3802390040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360" calcext:value-type="float">
            <text:p>836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0" calcext:value-type="float">
            <text:p>3802390040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361" calcext:value-type="float">
            <text:p>836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1" calcext:value-type="float">
            <text:p>3802390040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362" calcext:value-type="float">
            <text:p>836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2" calcext:value-type="float">
            <text:p>3802390040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363" calcext:value-type="float">
            <text:p>836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3" calcext:value-type="float">
            <text:p>3802390040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364" calcext:value-type="float">
            <text:p>836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4" calcext:value-type="float">
            <text:p>3802390040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365" calcext:value-type="float">
            <text:p>836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5" calcext:value-type="float">
            <text:p>3802390040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366" calcext:value-type="float">
            <text:p>836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6" calcext:value-type="float">
            <text:p>3802390040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367" calcext:value-type="float">
            <text:p>836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7" calcext:value-type="float">
            <text:p>3802390040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368" calcext:value-type="float">
            <text:p>836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8" calcext:value-type="float">
            <text:p>3802390040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369" calcext:value-type="float">
            <text:p>836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49" calcext:value-type="float">
            <text:p>3802390040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370" calcext:value-type="float">
            <text:p>837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0" calcext:value-type="float">
            <text:p>3802390040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371" calcext:value-type="float">
            <text:p>837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1" calcext:value-type="float">
            <text:p>3802390040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372" calcext:value-type="float">
            <text:p>837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2" calcext:value-type="float">
            <text:p>3802390040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373" calcext:value-type="float">
            <text:p>837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3" calcext:value-type="float">
            <text:p>3802390040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374" calcext:value-type="float">
            <text:p>837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4" calcext:value-type="float">
            <text:p>3802390040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375" calcext:value-type="float">
            <text:p>837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5" calcext:value-type="float">
            <text:p>3802390040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376" calcext:value-type="float">
            <text:p>837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6" calcext:value-type="float">
            <text:p>3802390040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377" calcext:value-type="float">
            <text:p>837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7" calcext:value-type="float">
            <text:p>3802390040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378" calcext:value-type="float">
            <text:p>837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8" calcext:value-type="float">
            <text:p>3802390040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379" calcext:value-type="float">
            <text:p>837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59" calcext:value-type="float">
            <text:p>3802390040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380" calcext:value-type="float">
            <text:p>838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0" calcext:value-type="float">
            <text:p>3802390040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381" calcext:value-type="float">
            <text:p>838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1" calcext:value-type="float">
            <text:p>3802390040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382" calcext:value-type="float">
            <text:p>838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2" calcext:value-type="float">
            <text:p>3802390040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383" calcext:value-type="float">
            <text:p>838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3" calcext:value-type="float">
            <text:p>3802390040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384" calcext:value-type="float">
            <text:p>838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4" calcext:value-type="float">
            <text:p>3802390040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385" calcext:value-type="float">
            <text:p>838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5" calcext:value-type="float">
            <text:p>3802390040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386" calcext:value-type="float">
            <text:p>838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6" calcext:value-type="float">
            <text:p>3802390040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387" calcext:value-type="float">
            <text:p>838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7" calcext:value-type="float">
            <text:p>3802390040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388" calcext:value-type="float">
            <text:p>838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8" calcext:value-type="float">
            <text:p>3802390040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389" calcext:value-type="float">
            <text:p>838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69" calcext:value-type="float">
            <text:p>3802390040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390" calcext:value-type="float">
            <text:p>839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0" calcext:value-type="float">
            <text:p>3802390040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391" calcext:value-type="float">
            <text:p>839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1" calcext:value-type="float">
            <text:p>3802390040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392" calcext:value-type="float">
            <text:p>839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2" calcext:value-type="float">
            <text:p>3802390040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393" calcext:value-type="float">
            <text:p>839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3" calcext:value-type="float">
            <text:p>3802390040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394" calcext:value-type="float">
            <text:p>839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4" calcext:value-type="float">
            <text:p>3802390040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395" calcext:value-type="float">
            <text:p>839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5" calcext:value-type="float">
            <text:p>3802390040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396" calcext:value-type="float">
            <text:p>839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6" calcext:value-type="float">
            <text:p>3802390040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397" calcext:value-type="float">
            <text:p>839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7" calcext:value-type="float">
            <text:p>3802390040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398" calcext:value-type="float">
            <text:p>839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8" calcext:value-type="float">
            <text:p>3802390040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399" calcext:value-type="float">
            <text:p>839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79" calcext:value-type="float">
            <text:p>3802390040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400" calcext:value-type="float">
            <text:p>840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0" calcext:value-type="float">
            <text:p>3802390040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401" calcext:value-type="float">
            <text:p>840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1" calcext:value-type="float">
            <text:p>3802390040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402" calcext:value-type="float">
            <text:p>840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2" calcext:value-type="float">
            <text:p>3802390040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403" calcext:value-type="float">
            <text:p>840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3" calcext:value-type="float">
            <text:p>3802390040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404" calcext:value-type="float">
            <text:p>840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4" calcext:value-type="float">
            <text:p>3802390040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405" calcext:value-type="float">
            <text:p>840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5" calcext:value-type="float">
            <text:p>3802390040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406" calcext:value-type="float">
            <text:p>840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6" calcext:value-type="float">
            <text:p>3802390040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407" calcext:value-type="float">
            <text:p>840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7" calcext:value-type="float">
            <text:p>3802390040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408" calcext:value-type="float">
            <text:p>840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8" calcext:value-type="float">
            <text:p>3802390040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409" calcext:value-type="float">
            <text:p>840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89" calcext:value-type="float">
            <text:p>3802390040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410" calcext:value-type="float">
            <text:p>841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0" calcext:value-type="float">
            <text:p>3802390040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411" calcext:value-type="float">
            <text:p>841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1" calcext:value-type="float">
            <text:p>3802390040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412" calcext:value-type="float">
            <text:p>841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2" calcext:value-type="float">
            <text:p>3802390040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413" calcext:value-type="float">
            <text:p>841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3" calcext:value-type="float">
            <text:p>3802390040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414" calcext:value-type="float">
            <text:p>841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4" calcext:value-type="float">
            <text:p>3802390040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415" calcext:value-type="float">
            <text:p>841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5" calcext:value-type="float">
            <text:p>3802390040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416" calcext:value-type="float">
            <text:p>841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6" calcext:value-type="float">
            <text:p>3802390040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417" calcext:value-type="float">
            <text:p>841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7" calcext:value-type="float">
            <text:p>3802390040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418" calcext:value-type="float">
            <text:p>841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8" calcext:value-type="float">
            <text:p>3802390040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419" calcext:value-type="float">
            <text:p>841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099" calcext:value-type="float">
            <text:p>3802390040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420" calcext:value-type="float">
            <text:p>842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100" calcext:value-type="float">
            <text:p>3802390040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421" calcext:value-type="float">
            <text:p>842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101" calcext:value-type="float">
            <text:p>3802390040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422" calcext:value-type="float">
            <text:p>842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102" calcext:value-type="float">
            <text:p>3802390040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423" calcext:value-type="float">
            <text:p>842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103" calcext:value-type="float">
            <text:p>3802390040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424" calcext:value-type="float">
            <text:p>842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001104" calcext:value-type="float">
            <text:p>380239004001104</text:p>
          </table:table-cell>
          <table:table-cell table:number-columns-repeated="1021"/>
        </table:table-row>
        <table:table-row table:style-name="ro3">
          <table:table-cell table:style-name="ce6" office:value-type="float" office:value="8425" calcext:value-type="float">
            <text:p>842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1" calcext:value-type="float">
            <text:p>3802390041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426" calcext:value-type="float">
            <text:p>842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2" calcext:value-type="float">
            <text:p>3802390041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427" calcext:value-type="float">
            <text:p>842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3" calcext:value-type="float">
            <text:p>3802390041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428" calcext:value-type="float">
            <text:p>842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4" calcext:value-type="float">
            <text:p>3802390041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429" calcext:value-type="float">
            <text:p>842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5" calcext:value-type="float">
            <text:p>3802390041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430" calcext:value-type="float">
            <text:p>843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6" calcext:value-type="float">
            <text:p>3802390041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431" calcext:value-type="float">
            <text:p>843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7" calcext:value-type="float">
            <text:p>3802390041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432" calcext:value-type="float">
            <text:p>843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8" calcext:value-type="float">
            <text:p>3802390041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433" calcext:value-type="float">
            <text:p>843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09" calcext:value-type="float">
            <text:p>3802390041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434" calcext:value-type="float">
            <text:p>843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0" calcext:value-type="float">
            <text:p>3802390041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435" calcext:value-type="float">
            <text:p>843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1" calcext:value-type="float">
            <text:p>3802390041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436" calcext:value-type="float">
            <text:p>843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2" calcext:value-type="float">
            <text:p>3802390041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437" calcext:value-type="float">
            <text:p>843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3" calcext:value-type="float">
            <text:p>3802390041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438" calcext:value-type="float">
            <text:p>843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4" calcext:value-type="float">
            <text:p>3802390041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439" calcext:value-type="float">
            <text:p>843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5" calcext:value-type="float">
            <text:p>3802390041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440" calcext:value-type="float">
            <text:p>844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6" calcext:value-type="float">
            <text:p>3802390041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441" calcext:value-type="float">
            <text:p>844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7" calcext:value-type="float">
            <text:p>3802390041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442" calcext:value-type="float">
            <text:p>844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8" calcext:value-type="float">
            <text:p>3802390041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443" calcext:value-type="float">
            <text:p>844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19" calcext:value-type="float">
            <text:p>3802390041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444" calcext:value-type="float">
            <text:p>844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0" calcext:value-type="float">
            <text:p>3802390041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445" calcext:value-type="float">
            <text:p>844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1" calcext:value-type="float">
            <text:p>3802390041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446" calcext:value-type="float">
            <text:p>844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2" calcext:value-type="float">
            <text:p>3802390041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447" calcext:value-type="float">
            <text:p>844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3" calcext:value-type="float">
            <text:p>3802390041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448" calcext:value-type="float">
            <text:p>844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4" calcext:value-type="float">
            <text:p>3802390041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449" calcext:value-type="float">
            <text:p>844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5" calcext:value-type="float">
            <text:p>3802390041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450" calcext:value-type="float">
            <text:p>845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6" calcext:value-type="float">
            <text:p>3802390041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451" calcext:value-type="float">
            <text:p>845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7" calcext:value-type="float">
            <text:p>3802390041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452" calcext:value-type="float">
            <text:p>845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8" calcext:value-type="float">
            <text:p>3802390041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453" calcext:value-type="float">
            <text:p>845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29" calcext:value-type="float">
            <text:p>3802390041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454" calcext:value-type="float">
            <text:p>845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0" calcext:value-type="float">
            <text:p>3802390041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455" calcext:value-type="float">
            <text:p>845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1" calcext:value-type="float">
            <text:p>3802390041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456" calcext:value-type="float">
            <text:p>845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2" calcext:value-type="float">
            <text:p>3802390041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457" calcext:value-type="float">
            <text:p>845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3" calcext:value-type="float">
            <text:p>3802390041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458" calcext:value-type="float">
            <text:p>845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4" calcext:value-type="float">
            <text:p>3802390041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459" calcext:value-type="float">
            <text:p>845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5" calcext:value-type="float">
            <text:p>3802390041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460" calcext:value-type="float">
            <text:p>846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6" calcext:value-type="float">
            <text:p>3802390041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461" calcext:value-type="float">
            <text:p>846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7" calcext:value-type="float">
            <text:p>3802390041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462" calcext:value-type="float">
            <text:p>846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8" calcext:value-type="float">
            <text:p>3802390041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463" calcext:value-type="float">
            <text:p>846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39" calcext:value-type="float">
            <text:p>3802390041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464" calcext:value-type="float">
            <text:p>846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0" calcext:value-type="float">
            <text:p>3802390041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465" calcext:value-type="float">
            <text:p>846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1" calcext:value-type="float">
            <text:p>3802390041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466" calcext:value-type="float">
            <text:p>846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2" calcext:value-type="float">
            <text:p>3802390041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467" calcext:value-type="float">
            <text:p>846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3" calcext:value-type="float">
            <text:p>3802390041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468" calcext:value-type="float">
            <text:p>846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4" calcext:value-type="float">
            <text:p>3802390041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469" calcext:value-type="float">
            <text:p>846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5" calcext:value-type="float">
            <text:p>3802390041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470" calcext:value-type="float">
            <text:p>847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6" calcext:value-type="float">
            <text:p>3802390041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471" calcext:value-type="float">
            <text:p>847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7" calcext:value-type="float">
            <text:p>3802390041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472" calcext:value-type="float">
            <text:p>847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8" calcext:value-type="float">
            <text:p>3802390041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473" calcext:value-type="float">
            <text:p>847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49" calcext:value-type="float">
            <text:p>3802390041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474" calcext:value-type="float">
            <text:p>847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0" calcext:value-type="float">
            <text:p>3802390041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475" calcext:value-type="float">
            <text:p>847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1" calcext:value-type="float">
            <text:p>3802390041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476" calcext:value-type="float">
            <text:p>847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2" calcext:value-type="float">
            <text:p>3802390041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477" calcext:value-type="float">
            <text:p>847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3" calcext:value-type="float">
            <text:p>3802390041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478" calcext:value-type="float">
            <text:p>847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4" calcext:value-type="float">
            <text:p>3802390041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479" calcext:value-type="float">
            <text:p>847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5" calcext:value-type="float">
            <text:p>3802390041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480" calcext:value-type="float">
            <text:p>848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6" calcext:value-type="float">
            <text:p>3802390041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481" calcext:value-type="float">
            <text:p>848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7" calcext:value-type="float">
            <text:p>3802390041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482" calcext:value-type="float">
            <text:p>848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8" calcext:value-type="float">
            <text:p>3802390041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483" calcext:value-type="float">
            <text:p>848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59" calcext:value-type="float">
            <text:p>3802390041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484" calcext:value-type="float">
            <text:p>848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0" calcext:value-type="float">
            <text:p>3802390041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485" calcext:value-type="float">
            <text:p>848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1" calcext:value-type="float">
            <text:p>3802390041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486" calcext:value-type="float">
            <text:p>848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2" calcext:value-type="float">
            <text:p>3802390041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487" calcext:value-type="float">
            <text:p>848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3" calcext:value-type="float">
            <text:p>3802390041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488" calcext:value-type="float">
            <text:p>848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4" calcext:value-type="float">
            <text:p>3802390041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489" calcext:value-type="float">
            <text:p>848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5" calcext:value-type="float">
            <text:p>3802390041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490" calcext:value-type="float">
            <text:p>849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6" calcext:value-type="float">
            <text:p>3802390041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491" calcext:value-type="float">
            <text:p>849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7" calcext:value-type="float">
            <text:p>3802390041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492" calcext:value-type="float">
            <text:p>849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8" calcext:value-type="float">
            <text:p>3802390041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493" calcext:value-type="float">
            <text:p>849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69" calcext:value-type="float">
            <text:p>3802390041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494" calcext:value-type="float">
            <text:p>849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0" calcext:value-type="float">
            <text:p>3802390041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495" calcext:value-type="float">
            <text:p>849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1" calcext:value-type="float">
            <text:p>3802390041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496" calcext:value-type="float">
            <text:p>849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2" calcext:value-type="float">
            <text:p>3802390041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497" calcext:value-type="float">
            <text:p>849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3" calcext:value-type="float">
            <text:p>3802390041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498" calcext:value-type="float">
            <text:p>849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4" calcext:value-type="float">
            <text:p>3802390041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499" calcext:value-type="float">
            <text:p>849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5" calcext:value-type="float">
            <text:p>3802390041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500" calcext:value-type="float">
            <text:p>850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6" calcext:value-type="float">
            <text:p>3802390041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501" calcext:value-type="float">
            <text:p>850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7" calcext:value-type="float">
            <text:p>3802390041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502" calcext:value-type="float">
            <text:p>850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8" calcext:value-type="float">
            <text:p>3802390041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503" calcext:value-type="float">
            <text:p>850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79" calcext:value-type="float">
            <text:p>3802390041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504" calcext:value-type="float">
            <text:p>850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0" calcext:value-type="float">
            <text:p>3802390041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505" calcext:value-type="float">
            <text:p>850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1" calcext:value-type="float">
            <text:p>3802390041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506" calcext:value-type="float">
            <text:p>850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2" calcext:value-type="float">
            <text:p>3802390041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507" calcext:value-type="float">
            <text:p>850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3" calcext:value-type="float">
            <text:p>3802390041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508" calcext:value-type="float">
            <text:p>850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4" calcext:value-type="float">
            <text:p>3802390041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509" calcext:value-type="float">
            <text:p>850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5" calcext:value-type="float">
            <text:p>3802390041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510" calcext:value-type="float">
            <text:p>851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6" calcext:value-type="float">
            <text:p>3802390041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511" calcext:value-type="float">
            <text:p>851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7" calcext:value-type="float">
            <text:p>3802390041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512" calcext:value-type="float">
            <text:p>851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8" calcext:value-type="float">
            <text:p>3802390041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513" calcext:value-type="float">
            <text:p>851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89" calcext:value-type="float">
            <text:p>3802390041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514" calcext:value-type="float">
            <text:p>851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0" calcext:value-type="float">
            <text:p>3802390041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515" calcext:value-type="float">
            <text:p>851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1" calcext:value-type="float">
            <text:p>3802390041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516" calcext:value-type="float">
            <text:p>851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2" calcext:value-type="float">
            <text:p>3802390041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517" calcext:value-type="float">
            <text:p>851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3" calcext:value-type="float">
            <text:p>3802390041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518" calcext:value-type="float">
            <text:p>851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4" calcext:value-type="float">
            <text:p>3802390041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519" calcext:value-type="float">
            <text:p>851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5" calcext:value-type="float">
            <text:p>3802390041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520" calcext:value-type="float">
            <text:p>852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6" calcext:value-type="float">
            <text:p>3802390041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521" calcext:value-type="float">
            <text:p>852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7" calcext:value-type="float">
            <text:p>3802390041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522" calcext:value-type="float">
            <text:p>852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8" calcext:value-type="float">
            <text:p>3802390041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523" calcext:value-type="float">
            <text:p>852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099" calcext:value-type="float">
            <text:p>3802390041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524" calcext:value-type="float">
            <text:p>852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100" calcext:value-type="float">
            <text:p>3802390041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525" calcext:value-type="float">
            <text:p>852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101" calcext:value-type="float">
            <text:p>3802390041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526" calcext:value-type="float">
            <text:p>852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102" calcext:value-type="float">
            <text:p>3802390041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527" calcext:value-type="float">
            <text:p>852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103" calcext:value-type="float">
            <text:p>3802390041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528" calcext:value-type="float">
            <text:p>852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39004101104" calcext:value-type="float">
            <text:p>380239004101104</text:p>
          </table:table-cell>
          <table:table-cell table:number-columns-repeated="1021"/>
        </table:table-row>
        <table:table-row table:style-name="ro3">
          <table:table-cell table:style-name="ce6" office:value-type="float" office:value="8529" calcext:value-type="float">
            <text:p>852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1" calcext:value-type="float">
            <text:p>3802400042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530" calcext:value-type="float">
            <text:p>853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2" calcext:value-type="float">
            <text:p>3802400042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531" calcext:value-type="float">
            <text:p>853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3" calcext:value-type="float">
            <text:p>3802400042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532" calcext:value-type="float">
            <text:p>853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4" calcext:value-type="float">
            <text:p>3802400042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533" calcext:value-type="float">
            <text:p>853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5" calcext:value-type="float">
            <text:p>3802400042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534" calcext:value-type="float">
            <text:p>853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6" calcext:value-type="float">
            <text:p>3802400042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535" calcext:value-type="float">
            <text:p>853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7" calcext:value-type="float">
            <text:p>3802400042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536" calcext:value-type="float">
            <text:p>853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8" calcext:value-type="float">
            <text:p>3802400042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537" calcext:value-type="float">
            <text:p>853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09" calcext:value-type="float">
            <text:p>3802400042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538" calcext:value-type="float">
            <text:p>853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0" calcext:value-type="float">
            <text:p>3802400042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539" calcext:value-type="float">
            <text:p>853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1" calcext:value-type="float">
            <text:p>3802400042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540" calcext:value-type="float">
            <text:p>854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2" calcext:value-type="float">
            <text:p>3802400042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541" calcext:value-type="float">
            <text:p>854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3" calcext:value-type="float">
            <text:p>3802400042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542" calcext:value-type="float">
            <text:p>854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4" calcext:value-type="float">
            <text:p>3802400042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543" calcext:value-type="float">
            <text:p>854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5" calcext:value-type="float">
            <text:p>3802400042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544" calcext:value-type="float">
            <text:p>854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6" calcext:value-type="float">
            <text:p>3802400042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545" calcext:value-type="float">
            <text:p>854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7" calcext:value-type="float">
            <text:p>3802400042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546" calcext:value-type="float">
            <text:p>854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8" calcext:value-type="float">
            <text:p>3802400042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547" calcext:value-type="float">
            <text:p>854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19" calcext:value-type="float">
            <text:p>3802400042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548" calcext:value-type="float">
            <text:p>854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0" calcext:value-type="float">
            <text:p>3802400042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549" calcext:value-type="float">
            <text:p>854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1" calcext:value-type="float">
            <text:p>3802400042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550" calcext:value-type="float">
            <text:p>855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2" calcext:value-type="float">
            <text:p>3802400042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551" calcext:value-type="float">
            <text:p>855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3" calcext:value-type="float">
            <text:p>3802400042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552" calcext:value-type="float">
            <text:p>855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4" calcext:value-type="float">
            <text:p>3802400042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553" calcext:value-type="float">
            <text:p>855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5" calcext:value-type="float">
            <text:p>3802400042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554" calcext:value-type="float">
            <text:p>855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6" calcext:value-type="float">
            <text:p>3802400042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555" calcext:value-type="float">
            <text:p>855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7" calcext:value-type="float">
            <text:p>3802400042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556" calcext:value-type="float">
            <text:p>855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8" calcext:value-type="float">
            <text:p>3802400042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557" calcext:value-type="float">
            <text:p>855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29" calcext:value-type="float">
            <text:p>3802400042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558" calcext:value-type="float">
            <text:p>855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0" calcext:value-type="float">
            <text:p>3802400042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559" calcext:value-type="float">
            <text:p>855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1" calcext:value-type="float">
            <text:p>3802400042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560" calcext:value-type="float">
            <text:p>856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2" calcext:value-type="float">
            <text:p>3802400042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561" calcext:value-type="float">
            <text:p>856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3" calcext:value-type="float">
            <text:p>3802400042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562" calcext:value-type="float">
            <text:p>856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4" calcext:value-type="float">
            <text:p>3802400042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563" calcext:value-type="float">
            <text:p>856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5" calcext:value-type="float">
            <text:p>3802400042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564" calcext:value-type="float">
            <text:p>856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6" calcext:value-type="float">
            <text:p>3802400042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565" calcext:value-type="float">
            <text:p>856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7" calcext:value-type="float">
            <text:p>3802400042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566" calcext:value-type="float">
            <text:p>856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8" calcext:value-type="float">
            <text:p>3802400042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567" calcext:value-type="float">
            <text:p>856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39" calcext:value-type="float">
            <text:p>3802400042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568" calcext:value-type="float">
            <text:p>856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0" calcext:value-type="float">
            <text:p>3802400042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569" calcext:value-type="float">
            <text:p>856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1" calcext:value-type="float">
            <text:p>3802400042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570" calcext:value-type="float">
            <text:p>857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2" calcext:value-type="float">
            <text:p>3802400042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571" calcext:value-type="float">
            <text:p>857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3" calcext:value-type="float">
            <text:p>3802400042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572" calcext:value-type="float">
            <text:p>857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4" calcext:value-type="float">
            <text:p>3802400042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573" calcext:value-type="float">
            <text:p>857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5" calcext:value-type="float">
            <text:p>3802400042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574" calcext:value-type="float">
            <text:p>857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6" calcext:value-type="float">
            <text:p>3802400042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575" calcext:value-type="float">
            <text:p>857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7" calcext:value-type="float">
            <text:p>3802400042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576" calcext:value-type="float">
            <text:p>857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8" calcext:value-type="float">
            <text:p>3802400042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577" calcext:value-type="float">
            <text:p>857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49" calcext:value-type="float">
            <text:p>3802400042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578" calcext:value-type="float">
            <text:p>857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0" calcext:value-type="float">
            <text:p>3802400042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579" calcext:value-type="float">
            <text:p>857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1" calcext:value-type="float">
            <text:p>3802400042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580" calcext:value-type="float">
            <text:p>858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2" calcext:value-type="float">
            <text:p>3802400042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581" calcext:value-type="float">
            <text:p>858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3" calcext:value-type="float">
            <text:p>3802400042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582" calcext:value-type="float">
            <text:p>858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4" calcext:value-type="float">
            <text:p>3802400042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583" calcext:value-type="float">
            <text:p>858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5" calcext:value-type="float">
            <text:p>3802400042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584" calcext:value-type="float">
            <text:p>858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6" calcext:value-type="float">
            <text:p>3802400042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585" calcext:value-type="float">
            <text:p>858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7" calcext:value-type="float">
            <text:p>3802400042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586" calcext:value-type="float">
            <text:p>858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8" calcext:value-type="float">
            <text:p>3802400042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587" calcext:value-type="float">
            <text:p>858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59" calcext:value-type="float">
            <text:p>3802400042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588" calcext:value-type="float">
            <text:p>858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0" calcext:value-type="float">
            <text:p>3802400042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589" calcext:value-type="float">
            <text:p>858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1" calcext:value-type="float">
            <text:p>3802400042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590" calcext:value-type="float">
            <text:p>859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2" calcext:value-type="float">
            <text:p>3802400042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591" calcext:value-type="float">
            <text:p>859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3" calcext:value-type="float">
            <text:p>3802400042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592" calcext:value-type="float">
            <text:p>859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4" calcext:value-type="float">
            <text:p>3802400042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593" calcext:value-type="float">
            <text:p>859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5" calcext:value-type="float">
            <text:p>3802400042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594" calcext:value-type="float">
            <text:p>859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6" calcext:value-type="float">
            <text:p>3802400042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595" calcext:value-type="float">
            <text:p>859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7" calcext:value-type="float">
            <text:p>3802400042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596" calcext:value-type="float">
            <text:p>859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8" calcext:value-type="float">
            <text:p>3802400042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597" calcext:value-type="float">
            <text:p>859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69" calcext:value-type="float">
            <text:p>3802400042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598" calcext:value-type="float">
            <text:p>859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0" calcext:value-type="float">
            <text:p>3802400042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599" calcext:value-type="float">
            <text:p>859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1" calcext:value-type="float">
            <text:p>3802400042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600" calcext:value-type="float">
            <text:p>860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2" calcext:value-type="float">
            <text:p>3802400042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601" calcext:value-type="float">
            <text:p>860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3" calcext:value-type="float">
            <text:p>3802400042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602" calcext:value-type="float">
            <text:p>860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4" calcext:value-type="float">
            <text:p>3802400042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603" calcext:value-type="float">
            <text:p>860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5" calcext:value-type="float">
            <text:p>3802400042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604" calcext:value-type="float">
            <text:p>860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6" calcext:value-type="float">
            <text:p>3802400042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605" calcext:value-type="float">
            <text:p>860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7" calcext:value-type="float">
            <text:p>3802400042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606" calcext:value-type="float">
            <text:p>860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8" calcext:value-type="float">
            <text:p>3802400042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607" calcext:value-type="float">
            <text:p>860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79" calcext:value-type="float">
            <text:p>3802400042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608" calcext:value-type="float">
            <text:p>860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0" calcext:value-type="float">
            <text:p>3802400042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609" calcext:value-type="float">
            <text:p>860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1" calcext:value-type="float">
            <text:p>3802400042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610" calcext:value-type="float">
            <text:p>861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2" calcext:value-type="float">
            <text:p>3802400042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611" calcext:value-type="float">
            <text:p>861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3" calcext:value-type="float">
            <text:p>3802400042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612" calcext:value-type="float">
            <text:p>861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4" calcext:value-type="float">
            <text:p>3802400042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613" calcext:value-type="float">
            <text:p>861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5" calcext:value-type="float">
            <text:p>3802400042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614" calcext:value-type="float">
            <text:p>861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6" calcext:value-type="float">
            <text:p>3802400042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615" calcext:value-type="float">
            <text:p>861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7" calcext:value-type="float">
            <text:p>3802400042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616" calcext:value-type="float">
            <text:p>861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8" calcext:value-type="float">
            <text:p>3802400042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617" calcext:value-type="float">
            <text:p>861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89" calcext:value-type="float">
            <text:p>3802400042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618" calcext:value-type="float">
            <text:p>861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0" calcext:value-type="float">
            <text:p>3802400042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619" calcext:value-type="float">
            <text:p>861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1" calcext:value-type="float">
            <text:p>3802400042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620" calcext:value-type="float">
            <text:p>862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2" calcext:value-type="float">
            <text:p>3802400042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621" calcext:value-type="float">
            <text:p>862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3" calcext:value-type="float">
            <text:p>3802400042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622" calcext:value-type="float">
            <text:p>862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4" calcext:value-type="float">
            <text:p>3802400042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623" calcext:value-type="float">
            <text:p>8623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5" calcext:value-type="float">
            <text:p>3802400042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624" calcext:value-type="float">
            <text:p>8624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6" calcext:value-type="float">
            <text:p>3802400042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625" calcext:value-type="float">
            <text:p>8625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7" calcext:value-type="float">
            <text:p>3802400042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626" calcext:value-type="float">
            <text:p>8626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8" calcext:value-type="float">
            <text:p>3802400042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627" calcext:value-type="float">
            <text:p>8627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099" calcext:value-type="float">
            <text:p>3802400042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628" calcext:value-type="float">
            <text:p>8628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100" calcext:value-type="float">
            <text:p>3802400042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629" calcext:value-type="float">
            <text:p>8629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101" calcext:value-type="float">
            <text:p>3802400042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630" calcext:value-type="float">
            <text:p>8630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102" calcext:value-type="float">
            <text:p>3802400042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631" calcext:value-type="float">
            <text:p>8631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103" calcext:value-type="float">
            <text:p>3802400042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632" calcext:value-type="float">
            <text:p>8632</text:p>
          </table:table-cell>
          <table:table-cell table:style-name="ce11" office:value-type="string" calcext:value-type="string">
            <text:p>Gr-3edl</text:p>
          </table:table-cell>
          <table:table-cell table:style-name="ce65" office:value-type="float" office:value="380240004201104" calcext:value-type="float">
            <text:p>3802400042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24.26329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2:07</meta:creation-date>
    <dc:creator>Yamit</dc:creator>
    <dc:date>2004-12-16T15:47:06</dc:date>
    <meta:generator>LibreOffice/4.2.8.2$Linux_X86_64 LibreOffice_project/420m0$Build-2</meta:generator>
    <meta:document-statistic meta:table-count="2" meta:cell-count="3925" meta:object-count="0"/>
  </office:meta>
</office:document-meta>
</file>