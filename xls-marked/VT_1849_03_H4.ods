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0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8.3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9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9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Metadata">
      <style:table-cell-properties fo:padding="0.071cm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1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TL_20_Data">
      <style:table-cell-properties style:diagonal-bl-tr="none" style:diagonal-tl-br="none" fo:border="none" fo:padding="0.071cm" style:rotation-align="none"/>
    </style:style>
    <style:style style:name="ce31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2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3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3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3">
      <style:table-cell-properties fo:padding="0.071cm"/>
    </style:style>
    <style:style style:name="ce7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10" table:default-cell-style-name="ce7"/>
        <table:table-column table:style-name="co4" table:default-cell-style-name="Default"/>
        <table:table-column table:style-name="co5" table:number-columns-repeated="6" table:default-cell-style-name="ce60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6" table:default-cell-style-name="ce7"/>
        <table:table-column table:style-name="co4" table:number-columns-repeated="996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183cm" svg:height="2.806cm" svg:x="11.327cm" svg:y="0.052cm" draw:caption-point-x="-0.43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DERNTHE - VIERDE GEDEELTE - <text:s/>INDEELING DER BEVOLKING NAAR DE BEROEPEN </text:p>
          </table:table-cell>
          <table:table-cell table:style-name="ce12" table:number-columns-repeated="3"/>
          <table:table-cell table:style-name="ce33" table:number-columns-repeated="6"/>
          <table:table-cell table:style-name="ce41" table:number-columns-repeated="3"/>
          <table:table-cell table:style-name="ce55" table:number-columns-repeated="5"/>
          <table:table-cell table:style-name="ce65"/>
          <table:table-cell table:style-name="ce69" table:number-columns-repeated="3"/>
          <table:table-cell table:style-name="ce72" table:number-columns-repeated="1002"/>
        </table:table-row>
        <table:table-row table:style-name="ro1">
          <table:table-cell table:style-name="ce2"/>
          <table:table-cell table:style-name="ce13" table:number-columns-repeated="12"/>
          <table:table-cell table:style-name="ce56" table:number-columns-repeated="6"/>
          <table:table-cell table:style-name="ce13" table:number-columns-repeated="2"/>
          <table:table-cell table:style-name="ce70"/>
          <table:table-cell table:style-name="ce72" table:number-columns-repeated="1002"/>
        </table:table-row>
        <table:table-row table:style-name="ro2">
          <table:table-cell table:style-name="ce3" office:value-type="string" calcext:value-type="string">
            <text:p>DE DRIE STEDEN <text:s text:c="6"/></text:p>
          </table:table-cell>
          <table:table-cell table:style-name="ce14"/>
          <table:table-cell table:style-name="ce17" office:value-type="string" calcext:value-type="string" table:number-columns-spanned="2" table:number-rows-spanned="1">
            <text:p>Beneden de 10 jaren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Van 10 en 11 jaren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Van 12 tot en met 15 jaren</text:p>
          </table:table-cell>
          <table:covered-table-cell table:style-name="ce25"/>
          <table:table-cell table:style-name="ce37" office:value-type="string" calcext:value-type="string" table:number-columns-spanned="2" table:number-rows-spanned="1">
            <text:p>Van 16 jaren en daarboven</text:p>
          </table:table-cell>
          <table:covered-table-cell table:style-name="ce25"/>
          <table:table-cell table:style-name="ce42" office:value-type="string" calcext:value-type="string" table:number-columns-spanned="3" table:number-rows-spanned="3">
            <text:p>TOTAAL</text:p>
          </table:table-cell>
          <table:covered-table-cell table:style-name="ce45"/>
          <table:covered-table-cell table:style-name="ce46"/>
          <table:table-cell table:style-name="ce57" office:value-type="string" calcext:value-type="string" table:number-columns-spanned="1" table:number-rows-spanned="4">
            <text:p>Telling</text:p>
          </table:table-cell>
          <table:table-cell table:style-name="ce61" office:value-type="string" calcext:value-type="string" table:number-columns-spanned="1" table:number-rows-spanned="4">
            <text:p>Tabel</text:p>
          </table:table-cell>
          <table:table-cell table:style-name="ce61" office:value-type="string" calcext:value-type="string" table:number-columns-spanned="1" table:number-rows-spanned="4">
            <text:p>Pagina links</text:p>
          </table:table-cell>
          <table:table-cell table:style-name="ce61" office:value-type="string" calcext:value-type="string" table:number-columns-spanned="1" table:number-rows-spanned="4">
            <text:p>Pagina rechts</text:p>
          </table:table-cell>
          <table:table-cell table:style-name="ce61" office:value-type="string" calcext:value-type="string" table:number-columns-spanned="1" table:number-rows-spanned="4">
            <text:p>Provincie</text:p>
          </table:table-cell>
          <table:table-cell table:style-name="ce66" office:value-type="string" calcext:value-type="string" table:number-columns-spanned="1" table:number-rows-spanned="4">
            <text:p>Image nr</text:p>
          </table:table-cell>
          <table:table-cell table:style-name="ce70"/>
          <table:table-cell table:style-name="ce13" table:number-columns-repeated="2"/>
          <table:table-cell table:style-name="ce72" table:number-columns-repeated="1002"/>
        </table:table-row>
        <table:table-row table:style-name="ro3">
          <table:table-cell table:style-name="ce4" office:value-type="string" calcext:value-type="string" table:number-columns-spanned="1" table:number-rows-spanned="3">
            <text:p><text:span text:style-name="T2"><text:a xlink:href="#Veerde gedeelte.A909" xlink:type="simple"> Beroepen of middelen van bestaan  </text:a></text:span></text:p>
          </table:table-cell>
          <table:table-cell table:style-name="ce15"/>
          <table:table-cell table:style-name="ce18" office:value-type="string" calcext:value-type="string" table:number-columns-spanned="2" table:number-rows-spanned="2">
            <text:p>Geboren in 1849 tot en met 1840</text:p>
          </table:table-cell>
          <table:covered-table-cell table:style-name="ce26"/>
          <table:table-cell table:style-name="ce35" office:value-type="string" calcext:value-type="string" table:number-columns-spanned="2" table:number-rows-spanned="2">
            <text:p>Geboren in 1839 en 1838</text:p>
          </table:table-cell>
          <table:covered-table-cell table:style-name="ce26"/>
          <table:table-cell table:style-name="ce35" office:value-type="string" calcext:value-type="string" table:number-columns-spanned="2" table:number-rows-spanned="2">
            <text:p>Geboren in 1837 tot en met 1834</text:p>
          </table:table-cell>
          <table:covered-table-cell table:style-name="ce26"/>
          <table:table-cell table:style-name="ce38" office:value-type="string" calcext:value-type="string" table:number-columns-spanned="2" table:number-rows-spanned="2">
            <text:p>Geboren in 1833 en vroegere jaren.</text:p>
          </table:table-cell>
          <table:covered-table-cell table:style-name="ce39"/>
          <table:covered-table-cell table:style-name="ce43"/>
          <table:covered-table-cell table:style-name="ce14"/>
          <table:covered-table-cell table:style-name="ce47"/>
          <table:covered-table-cell table:style-name="ce58"/>
          <table:covered-table-cell table:number-columns-repeated="4" table:style-name="ce62"/>
          <table:covered-table-cell table:style-name="ce67"/>
          <table:table-cell table:style-name="ce70" table:number-columns-repeated="3"/>
          <table:table-cell table:style-name="ce72" table:number-columns-repeated="1002"/>
        </table:table-row>
        <table:table-row table:style-name="ro4">
          <table:covered-table-cell table:style-name="ce5"/>
          <table:table-cell table:style-name="ce15"/>
          <table:covered-table-cell table:style-name="ce19"/>
          <table:covered-table-cell table:number-columns-repeated="6" table:style-name="ce27"/>
          <table:covered-table-cell table:style-name="ce40"/>
          <table:covered-table-cell table:style-name="ce44"/>
          <table:covered-table-cell table:style-name="ce27"/>
          <table:covered-table-cell table:style-name="ce48"/>
          <table:covered-table-cell table:style-name="ce58"/>
          <table:covered-table-cell table:number-columns-repeated="4" table:style-name="ce62"/>
          <table:covered-table-cell table:style-name="ce67"/>
          <table:table-cell table:style-name="ce70" table:number-columns-repeated="3"/>
          <table:table-cell table:style-name="ce72" table:number-columns-repeated="1002"/>
        </table:table-row>
        <table:table-row table:style-name="ro2">
          <table:covered-table-cell table:style-name="ce6"/>
          <table:table-cell table:style-name="ce15"/>
          <table:table-cell table:style-name="ce20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49" office:value-type="string" calcext:value-type="string">
            <text:p>Totaal.</text:p>
          </table:table-cell>
          <table:covered-table-cell table:style-name="ce59"/>
          <table:covered-table-cell table:number-columns-repeated="4" table:style-name="ce63"/>
          <table:covered-table-cell table:style-name="ce68"/>
          <table:table-cell table:style-name="ce70" table:number-columns-repeated="3"/>
          <table:table-cell table:style-name="ce72"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table:style-name="ce8" office:value-type="string" calcext:value-type="string">
            <text:p>Aannemers</text:p>
          </table:table-cell>
          <table:table-cell table:style-name="Default"/>
          <table:table-cell table:style-name="ce21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50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koop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51" office:value-type="float" office:value="50" calcext:value-type="float">
            <text:p>5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1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235" calcext:value-type="float">
            <text:p>235</text:p>
          </table:table-cell>
          <table:table-cell table:style-name="ce51" office:value-type="float" office:value="836" calcext:value-type="float">
            <text:p>8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lik-, en plee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51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ordpapier (werkers in) doozen-, kaartenma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51" office:value-type="float" office:value="19" calcext:value-type="float">
            <text:p>1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uwmeesters, civiel ingeni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113" calcext:value-type="float">
            <text:p>1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42" calcext:value-type="float">
            <text:p>542</text:p>
          </table:table-cell>
          <table:table-cell table:style-name="ce51" office:value-type="float" office:value="604" calcext:value-type="float">
            <text:p>60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" calcext:value-type="float">
            <text:p>6</text:p>
          </table:table-cell>
          <table:table-cell table:style-name="ce51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1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112" calcext:value-type="float">
            <text:p>1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" calcext:value-type="float">
            <text:p>47</text:p>
          </table:table-cell>
          <table:table-cell table:style-name="ce51" office:value-type="float" office:value="89" calcext:value-type="float">
            <text:p>8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1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gewon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be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4" calcext:value-type="float">
            <text:p>24</text:p>
          </table:table-cell>
          <table:table-cell table:style-name="ce51" office:value-type="float" office:value="244" calcext:value-type="float">
            <text:p>2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houders 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leerling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51" office:value-type="float" office:value="20" calcext:value-type="float">
            <text:p>2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87" calcext:value-type="float">
            <text:p>187</text:p>
          </table:table-cell>
          <table:table-cell table:style-name="ce30"/>
          <table:table-cell table:style-name="ce30" office:value-type="float" office:value="191" calcext:value-type="float">
            <text:p>191</text:p>
          </table:table-cell>
          <table:table-cell table:style-name="ce30"/>
          <table:table-cell table:style-name="ce51" office:value-type="float" office:value="191" calcext:value-type="float">
            <text:p>19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1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andbouwers</text:p>
          </table:table-cell>
          <table:table-cell table:style-name="Default"/>
          <table:table-cell table:style-name="ce22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96" calcext:value-type="float">
            <text:p>96</text:p>
          </table:table-cell>
          <table:table-cell table:style-name="ce51" office:value-type="float" office:value="472" calcext:value-type="float">
            <text:p>47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51" office:value-type="float" office:value="33" calcext:value-type="float">
            <text:p>3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table:number-columns-repeated="4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73" calcext:value-type="float">
            <text:p>173</text:p>
          </table:table-cell>
          <table:table-cell table:style-name="ce30"/>
          <table:table-cell table:style-name="ce30" office:value-type="float" office:value="182" calcext:value-type="float">
            <text:p>182</text:p>
          </table:table-cell>
          <table:table-cell table:style-name="ce51" office:value-type="float" office:value="182" calcext:value-type="float">
            <text:p>18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wijzers, onderwijzeressen, ondermeesters, kweekelingen, gouve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" calcext:value-type="float">
            <text:p>9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7" calcext:value-type="float">
            <text:p>7</text:p>
          </table:table-cell>
          <table:table-cell table:style-name="ce51" office:value-type="float" office:value="38" calcext:value-type="float">
            <text:p>3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51" office:value-type="float" office:value="13" calcext:value-type="float">
            <text:p>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ublieke vrouwen, publiekhuishouden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u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51" office:value-type="float" office:value="38" calcext:value-type="float">
            <text:p>3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51" office:value-type="float" office:value="80" calcext:value-type="float">
            <text:p>8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5" calcext:value-type="float">
            <text:p>5</text:p>
          </table:table-cell>
          <table:table-cell table:style-name="ce51" office:value-type="float" office:value="219" calcext:value-type="float">
            <text:p>21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enmakers en lap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137" calcext:value-type="float">
            <text:p>13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olleerlingen</text:p>
          </table:table-cell>
          <table:table-cell table:style-name="Default"/>
          <table:table-cell table:style-name="ce22" office:value-type="float" office:value="625" calcext:value-type="float">
            <text:p>625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1019" calcext:value-type="float">
            <text:p>1,019</text:p>
          </table:table-cell>
          <table:table-cell table:style-name="ce30" office:value-type="float" office:value="995" calcext:value-type="float">
            <text:p>995</text:p>
          </table:table-cell>
          <table:table-cell table:style-name="ce52" office:value-type="float" office:value="2014" calcext:value-type="float">
            <text:p>2,014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51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nners, spoelders, wev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39" calcext:value-type="float">
            <text:p>39</text:p>
          </table:table-cell>
          <table:table-cell table:style-name="ce51" office:value-type="float" office:value="212" calcext:value-type="float">
            <text:p>2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1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kerv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immerlieden, kis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57" calcext:value-type="float">
            <text:p>157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/>
          <table:table-cell table:style-name="ce51" office:value-type="float" office:value="166" calcext:value-type="float">
            <text:p>16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1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1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1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51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64" calcext:value-type="float">
            <text:p>6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51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der beroep</text:p>
          </table:table-cell>
          <table:table-cell table:style-name="Default"/>
          <table:table-cell table:style-name="ce22" office:value-type="float" office:value="960" calcext:value-type="float">
            <text:p>960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87" calcext:value-type="float">
            <text:p>387</text:p>
          </table:table-cell>
          <table:table-cell table:style-name="ce31" office:value-type="float" office:value="3148" calcext:value-type="float">
            <text:p>3,148</text:p>
          </table:table-cell>
          <table:table-cell table:style-name="ce31" office:value-type="float" office:value="1667" calcext:value-type="float">
            <text:p>1,667</text:p>
          </table:table-cell>
          <table:table-cell table:style-name="ce31" office:value-type="float" office:value="4575" calcext:value-type="float">
            <text:p>4,575</text:p>
          </table:table-cell>
          <table:table-cell table:style-name="ce52" office:value-type="float" office:value="6242" calcext:value-type="float">
            <text:p>6,242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3" office:value-type="float" office:value="1592" calcext:value-type="float">
            <text:p>1,592</text:p>
          </table:table-cell>
          <table:table-cell table:style-name="ce31" office:value-type="float" office:value="1604" calcext:value-type="float">
            <text:p>1,604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580" calcext:value-type="float">
            <text:p>580</text:p>
          </table:table-cell>
          <table:table-cell table:style-name="ce31" office:value-type="float" office:value="4010" calcext:value-type="float">
            <text:p>4,010</text:p>
          </table:table-cell>
          <table:table-cell table:style-name="ce31" office:value-type="float" office:value="4369" calcext:value-type="float">
            <text:p>4,369</text:p>
          </table:table-cell>
          <table:table-cell table:style-name="ce31" office:value-type="float" office:value="6492" calcext:value-type="float">
            <text:p>6,492</text:p>
          </table:table-cell>
          <table:table-cell table:style-name="ce31" office:value-type="float" office:value="6848" calcext:value-type="float">
            <text:p>6,848</text:p>
          </table:table-cell>
          <table:table-cell table:style-name="ce52" office:value-type="float" office:value="13340" calcext:value-type="float">
            <text:p>13,340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73" calcext:value-type="float">
            <text:p>7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51" office:value-type="float" office:value="52" calcext:value-type="float">
            <text:p>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beiders, dagloon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11" calcext:value-type="float">
            <text:p>211</text:p>
          </table:table-cell>
          <table:table-cell table:style-name="ce31" office:value-type="float" office:value="4824" calcext:value-type="float">
            <text:p>4,824</text:p>
          </table:table-cell>
          <table:table-cell table:style-name="ce31" office:value-type="float" office:value="2821" calcext:value-type="float">
            <text:p>2,821</text:p>
          </table:table-cell>
          <table:table-cell table:style-name="ce31" office:value-type="float" office:value="5135" calcext:value-type="float">
            <text:p>5,135</text:p>
          </table:table-cell>
          <table:table-cell table:style-name="ce31" office:value-type="float" office:value="3040" calcext:value-type="float">
            <text:p>3,040</text:p>
          </table:table-cell>
          <table:table-cell table:style-name="ce52" office:value-type="float" office:value="8175" calcext:value-type="float">
            <text:p>8,175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1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51" office:value-type="float" office:value="20" calcext:value-type="float">
            <text:p>2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erbrouwers, biersto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lik-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47" calcext:value-type="float">
            <text:p>4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13" calcext:value-type="float">
            <text:p>13</text:p>
          </table:table-cell>
          <table:table-cell table:style-name="ce51" office:value-type="float" office:value="321" calcext:value-type="float">
            <text:p>3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51" office:value-type="float" office:value="69" calcext:value-type="float">
            <text:p>6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180" calcext:value-type="float">
            <text:p>180</text:p>
          </table:table-cell>
          <table:table-cell table:style-name="ce31" office:value-type="float" office:value="1107" calcext:value-type="float">
            <text:p>1,107</text:p>
          </table:table-cell>
          <table:table-cell table:style-name="ce52" office:value-type="float" office:value="1287" calcext:value-type="float">
            <text:p>1,287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ren- en handwinkel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" calcext:value-type="float">
            <text:p>12</text:p>
          </table:table-cell>
          <table:table-cell table:style-name="ce51" office:value-type="float" office:value="52" calcext:value-type="float">
            <text:p>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" calcext:value-type="float">
            <text:p>7</text:p>
          </table:table-cell>
          <table:table-cell table:style-name="ce51" office:value-type="float" office:value="115" calcext:value-type="float">
            <text:p>1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string" calcext:value-type="string">
            <text:p>58/1</text:p>
          </table:table-cell>
          <table:table-cell table:style-name="ce30"/>
          <table:table-cell table:style-name="ce30" office:value-type="string" calcext:value-type="string">
            <text:p>58/1</text:p>
          </table:table-cell>
          <table:table-cell table:style-name="ce30"/>
          <table:table-cell table:style-name="ce51" office:value-type="string" calcext:value-type="string">
            <text:p>58/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51" office:value-type="float" office:value="52" calcext:value-type="float">
            <text:p>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" calcext:value-type="float">
            <text:p>7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291" calcext:value-type="float">
            <text:p>29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7" calcext:value-type="float">
            <text:p>7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45" calcext:value-type="float">
            <text:p>45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32" calcext:value-type="float">
            <text:p>132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51" office:value-type="float" office:value="20" calcext:value-type="float">
            <text:p>2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9" calcext:value-type="float">
            <text:p>19</text:p>
          </table:table-cell>
          <table:table-cell table:style-name="ce51" office:value-type="float" office:value="412" calcext:value-type="float">
            <text:p>4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94" calcext:value-type="float">
            <text:p>94</text:p>
          </table:table-cell>
          <table:table-cell table:style-name="ce51" office:value-type="float" office:value="209" calcext:value-type="float">
            <text:p>20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51" office:value-type="float" office:value="56" calcext:value-type="float">
            <text:p>5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51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arbeiders</text:p>
          </table:table-cell>
          <table:table-cell table:style-name="Default"/>
          <table:table-cell table:style-name="ce22" office:value-type="float" office:value="53" calcext:value-type="float">
            <text:p>5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string" calcext:value-type="string">
            <text:p>255/1</text:p>
          </table:table-cell>
          <table:table-cell table:style-name="ce30" office:value-type="string" calcext:value-type="string">
            <text:p>174/2</text:p>
          </table:table-cell>
          <table:table-cell table:style-name="ce51" office:value-type="float" office:value="429" calcext:value-type="float">
            <text:p>42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hulpbehoevende</text:p>
          </table:table-cell>
          <table:table-cell table:style-name="Default"/>
          <table:table-cell table:style-name="ce2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40/3</text:p>
          </table:table-cell>
          <table:table-cell table:style-name="ce51" office:value-type="float" office:value="59" calcext:value-type="float">
            <text:p>5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bedelaars</text:p>
          </table:table-cell>
          <table:table-cell table:style-name="Default"/>
          <table:table-cell table:style-name="ce22" office:value-type="float" office:value="41" calcext:value-type="float">
            <text:p>4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16" calcext:value-type="float">
            <text:p>716</text:p>
          </table:table-cell>
          <table:table-cell table:style-name="ce52" office:value-type="float" office:value="1510" calcext:value-type="float">
            <text:p>1,510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144" calcext:value-type="float">
            <text:p>144</text:p>
          </table:table-cell>
          <table:table-cell table:style-name="ce51" office:value-type="float" office:value="546" calcext:value-type="float">
            <text:p>54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135" calcext:value-type="float">
            <text:p>13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51" office:value-type="float" office:value="13" calcext:value-type="float">
            <text:p>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0" calcext:value-type="float">
            <text:p>30</text:p>
          </table:table-cell>
          <table:table-cell table:style-name="ce51" office:value-type="float" office:value="116" calcext:value-type="float">
            <text:p>1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51" office:value-type="float" office:value="37" calcext:value-type="float">
            <text:p>3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96" calcext:value-type="float">
            <text:p>9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andbouw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273" calcext:value-type="float">
            <text:p>273</text:p>
          </table:table-cell>
          <table:table-cell table:style-name="ce31" office:value-type="float" office:value="8974" calcext:value-type="float">
            <text:p>8,974</text:p>
          </table:table-cell>
          <table:table-cell table:style-name="ce31" office:value-type="float" office:value="3608" calcext:value-type="float">
            <text:p>3,608</text:p>
          </table:table-cell>
          <table:table-cell table:style-name="ce31" office:value-type="float" office:value="9545" calcext:value-type="float">
            <text:p>9,545</text:p>
          </table:table-cell>
          <table:table-cell table:style-name="ce31" office:value-type="float" office:value="3892" calcext:value-type="float">
            <text:p>3,892</text:p>
          </table:table-cell>
          <table:table-cell table:style-name="ce52" office:value-type="float" office:value="13437" calcext:value-type="float">
            <text:p>13,437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51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1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51" office:value-type="float" office:value="51" calcext:value-type="float">
            <text:p>5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51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table:number-columns-repeated="4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393" calcext:value-type="float">
            <text:p>393</text:p>
          </table:table-cell>
          <table:table-cell table:style-name="ce30"/>
          <table:table-cell table:style-name="ce30" office:value-type="float" office:value="408" calcext:value-type="float">
            <text:p>408</text:p>
          </table:table-cell>
          <table:table-cell table:style-name="ce51" office:value-type="float" office:value="408" calcext:value-type="float">
            <text:p>40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en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en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68" calcext:value-type="float">
            <text:p>16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20" calcext:value-type="float">
            <text:p>20</text:p>
          </table:table-cell>
          <table:table-cell table:style-name="ce51" office:value-type="float" office:value="148" calcext:value-type="float">
            <text:p>1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51" office:value-type="float" office:value="44" calcext:value-type="float">
            <text:p>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51" office:value-type="float" office:value="35" calcext:value-type="float">
            <text:p>3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1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51" office:value-type="float" office:value="89" calcext:value-type="float">
            <text:p>8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/>
          <table:table-cell table:style-name="ce51" office:value-type="float" office:value="81" calcext:value-type="float">
            <text:p>8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322" calcext:value-type="float">
            <text:p>3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9" calcext:value-type="float">
            <text:p>9</text:p>
          </table:table-cell>
          <table:table-cell table:style-name="ce51" office:value-type="float" office:value="403" calcext:value-type="float">
            <text:p>40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2598" calcext:value-type="float">
            <text:p>2,598</text:p>
          </table:table-cell>
          <table:table-cell table:style-name="ce31" office:value-type="float" office:value="2360" calcext:value-type="float">
            <text:p>2,360</text:p>
          </table:table-cell>
          <table:table-cell table:style-name="ce31" office:value-type="float" office:value="1049" calcext:value-type="float">
            <text:p>1,049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4275" calcext:value-type="float">
            <text:p>4,275</text:p>
          </table:table-cell>
          <table:table-cell table:style-name="ce31" office:value-type="float" office:value="3763" calcext:value-type="float">
            <text:p>3,763</text:p>
          </table:table-cell>
          <table:table-cell table:style-name="ce52" office:value-type="float" office:value="8038" calcext:value-type="float">
            <text:p>8,038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215" calcext:value-type="float">
            <text:p>2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278" calcext:value-type="float">
            <text:p>278</text:p>
          </table:table-cell>
          <table:table-cell table:style-name="ce51" office:value-type="float" office:value="774" calcext:value-type="float">
            <text:p>77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kerv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633" calcext:value-type="float">
            <text:p>63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3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26" calcext:value-type="float">
            <text:p>26</text:p>
          </table:table-cell>
          <table:table-cell table:style-name="ce51" office:value-type="float" office:value="137" calcext:value-type="float">
            <text:p>13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51" office:value-type="float" office:value="86" calcext:value-type="float">
            <text:p>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51" office:value-type="float" office:value="85" calcext:value-type="float">
            <text:p>8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5282" calcext:value-type="float">
            <text:p>5,282</text:p>
          </table:table-cell>
          <table:table-cell table:style-name="ce31" office:value-type="float" office:value="5114" calcext:value-type="float">
            <text:p>5,114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558" calcext:value-type="float">
            <text:p>558</text:p>
          </table:table-cell>
          <table:table-cell table:style-name="ce31" office:value-type="float" office:value="1318" calcext:value-type="float">
            <text:p>1,318</text:p>
          </table:table-cell>
          <table:table-cell table:style-name="ce31" office:value-type="float" office:value="1652" calcext:value-type="float">
            <text:p>1,652</text:p>
          </table:table-cell>
          <table:table-cell table:style-name="ce31" office:value-type="float" office:value="2102" calcext:value-type="float">
            <text:p>2,102</text:p>
          </table:table-cell>
          <table:table-cell table:style-name="ce31" office:value-type="float" office:value="12258" calcext:value-type="float">
            <text:p>12,258</text:p>
          </table:table-cell>
          <table:table-cell table:style-name="ce30" office:value-type="string" calcext:value-type="string">
            <text:p>9.224/1</text:p>
          </table:table-cell>
          <table:table-cell table:style-name="ce31" office:value-type="float" office:value="19582" calcext:value-type="float">
            <text:p>19,582</text:p>
          </table:table-cell>
          <table:table-cell table:style-name="ce52" office:value-type="float" office:value="28806" calcext:value-type="float">
            <text:p>28,806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3" office:value-type="float" office:value="8030" calcext:value-type="float">
            <text:p>8,030</text:p>
          </table:table-cell>
          <table:table-cell table:style-name="ce31" office:value-type="float" office:value="7581" calcext:value-type="float">
            <text:p>7,581</text:p>
          </table:table-cell>
          <table:table-cell table:style-name="ce31" office:value-type="float" office:value="1670" calcext:value-type="float">
            <text:p>1,670</text:p>
          </table:table-cell>
          <table:table-cell table:style-name="ce31" office:value-type="float" office:value="1511" calcext:value-type="float">
            <text:p>1,511</text:p>
          </table:table-cell>
          <table:table-cell table:style-name="ce31" office:value-type="float" office:value="3152" calcext:value-type="float">
            <text:p>3,152</text:p>
          </table:table-cell>
          <table:table-cell table:style-name="ce31" office:value-type="float" office:value="2965" calcext:value-type="float">
            <text:p>2,965</text:p>
          </table:table-cell>
          <table:table-cell table:style-name="ce31" office:value-type="float" office:value="22910" calcext:value-type="float">
            <text:p>22,910</text:p>
          </table:table-cell>
          <table:table-cell table:style-name="ce31" office:value-type="float" office:value="21574" calcext:value-type="float">
            <text:p>21,574</text:p>
          </table:table-cell>
          <table:table-cell table:style-name="ce31" office:value-type="float" office:value="35764" calcext:value-type="float">
            <text:p>35,764</text:p>
          </table:table-cell>
          <table:table-cell table:style-name="ce31" office:value-type="float" office:value="33634" calcext:value-type="float">
            <text:p>33,634</text:p>
          </table:table-cell>
          <table:table-cell table:style-name="ce52" office:value-type="float" office:value="69398" calcext:value-type="float">
            <text:p>69,398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51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23" calcext:value-type="float">
            <text:p>1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51" office:value-type="float" office:value="63" calcext:value-type="float">
            <text:p>6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31" calcext:value-type="float">
            <text:p>3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15" calcext:value-type="float">
            <text:p>215</text:p>
          </table:table-cell>
          <table:table-cell table:style-name="ce31" office:value-type="float" office:value="5408" calcext:value-type="float">
            <text:p>5,408</text:p>
          </table:table-cell>
          <table:table-cell table:style-name="ce31" office:value-type="float" office:value="3050" calcext:value-type="float">
            <text:p>3,050</text:p>
          </table:table-cell>
          <table:table-cell table:style-name="ce31" office:value-type="float" office:value="5736" calcext:value-type="float">
            <text:p>5,736</text:p>
          </table:table-cell>
          <table:table-cell table:style-name="ce31" office:value-type="float" office:value="3275" calcext:value-type="float">
            <text:p>3,275</text:p>
          </table:table-cell>
          <table:table-cell table:style-name="ce52" office:value-type="float" office:value="9011" calcext:value-type="float">
            <text:p>9,011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60" calcext:value-type="float">
            <text:p>6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erbrouwers, biersto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1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lik-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63" calcext:value-type="float">
            <text:p>6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51" office:value-type="float" office:value="13" calcext:value-type="float">
            <text:p>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51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17" calcext:value-type="float">
            <text:p>17</text:p>
          </table:table-cell>
          <table:table-cell table:style-name="ce51" office:value-type="float" office:value="434" calcext:value-type="float">
            <text:p>43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1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51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210" calcext:value-type="float">
            <text:p>210</text:p>
          </table:table-cell>
          <table:table-cell table:style-name="ce31" office:value-type="float" office:value="1466" calcext:value-type="float">
            <text:p>1,466</text:p>
          </table:table-cell>
          <table:table-cell table:style-name="ce30" office:value-type="float" office:value="242" calcext:value-type="float">
            <text:p>242</text:p>
          </table:table-cell>
          <table:table-cell table:style-name="ce31" office:value-type="float" office:value="1649" calcext:value-type="float">
            <text:p>1,649</text:p>
          </table:table-cell>
          <table:table-cell table:style-name="ce52" office:value-type="float" office:value="1891" calcext:value-type="float">
            <text:p>1,891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1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3" calcext:value-type="float">
            <text:p>13</text:p>
          </table:table-cell>
          <table:table-cell table:style-name="ce51" office:value-type="float" office:value="67" calcext:value-type="float">
            <text:p>6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" calcext:value-type="float">
            <text:p>10</text:p>
          </table:table-cell>
          <table:table-cell table:style-name="ce51" office:value-type="float" office:value="141" calcext:value-type="float">
            <text:p>14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string" calcext:value-type="string">
            <text:p>65/1</text:p>
          </table:table-cell>
          <table:table-cell table:style-name="ce30"/>
          <table:table-cell table:style-name="ce30" office:value-type="string" calcext:value-type="string">
            <text:p>65/1</text:p>
          </table:table-cell>
          <table:table-cell table:style-name="ce30"/>
          <table:table-cell table:style-name="ce51" office:value-type="string" calcext:value-type="string">
            <text:p>65/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3" calcext:value-type="float">
            <text:p>13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307" calcext:value-type="float">
            <text:p>30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8" calcext:value-type="float">
            <text:p>18</text:p>
          </table:table-cell>
          <table:table-cell table:style-name="ce51" office:value-type="float" office:value="47" calcext:value-type="float">
            <text:p>4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50" calcext:value-type="float">
            <text:p>5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41" calcext:value-type="float">
            <text:p>141</text:p>
          </table:table-cell>
          <table:table-cell table:style-name="ce51" office:value-type="float" office:value="268" calcext:value-type="float">
            <text:p>26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1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51" office:value-type="float" office:value="49" calcext:value-type="float">
            <text:p>4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51" office:value-type="float" office:value="43" calcext:value-type="float">
            <text:p>4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21" calcext:value-type="float">
            <text:p>21</text:p>
          </table:table-cell>
          <table:table-cell table:style-name="ce51" office:value-type="float" office:value="524" calcext:value-type="float">
            <text:p>5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41" calcext:value-type="float">
            <text:p>141</text:p>
          </table:table-cell>
          <table:table-cell table:style-name="ce51" office:value-type="float" office:value="298" calcext:value-type="float">
            <text:p>29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88" calcext:value-type="float">
            <text:p>88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51" office:value-type="float" office:value="92" calcext:value-type="float">
            <text:p>9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51" office:value-type="float" office:value="62" calcext:value-type="float">
            <text:p>6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arbeiders</text:p>
          </table:table-cell>
          <table:table-cell table:style-name="Default"/>
          <table:table-cell table:style-name="ce22" office:value-type="float" office:value="53" calcext:value-type="float">
            <text:p>5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string" calcext:value-type="string">
            <text:p>255/1</text:p>
          </table:table-cell>
          <table:table-cell table:style-name="ce30" office:value-type="string" calcext:value-type="string">
            <text:p>174/2</text:p>
          </table:table-cell>
          <table:table-cell table:style-name="ce51" office:value-type="float" office:value="429" calcext:value-type="float">
            <text:p>42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hulpbehoevende</text:p>
          </table:table-cell>
          <table:table-cell table:style-name="Default"/>
          <table:table-cell table:style-name="ce2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40/3</text:p>
          </table:table-cell>
          <table:table-cell table:style-name="ce51" office:value-type="float" office:value="59" calcext:value-type="float">
            <text:p>5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bedelaars</text:p>
          </table:table-cell>
          <table:table-cell table:style-name="Default"/>
          <table:table-cell table:style-name="ce22" office:value-type="float" office:value="41" calcext:value-type="float">
            <text:p>4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16" calcext:value-type="float">
            <text:p>716</text:p>
          </table:table-cell>
          <table:table-cell table:style-name="ce52" office:value-type="float" office:value="1510" calcext:value-type="float">
            <text:p>1,510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168" calcext:value-type="float">
            <text:p>168</text:p>
          </table:table-cell>
          <table:table-cell table:style-name="ce51" office:value-type="float" office:value="790" calcext:value-type="float">
            <text:p>79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6" calcext:value-type="float">
            <text:p>6</text:p>
          </table:table-cell>
          <table:table-cell table:style-name="ce51" office:value-type="float" office:value="157" calcext:value-type="float">
            <text:p>15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51" office:value-type="float" office:value="40" calcext:value-type="float">
            <text:p>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- leerling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" calcext:value-type="float">
            <text:p>28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7" calcext:value-type="float">
            <text:p>37</text:p>
          </table:table-cell>
          <table:table-cell table:style-name="ce51" office:value-type="float" office:value="143" calcext:value-type="float">
            <text:p>14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1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24" calcext:value-type="float">
            <text:p>224</text:p>
          </table:table-cell>
          <table:table-cell table:style-name="ce30"/>
          <table:table-cell table:style-name="ce30" office:value-type="float" office:value="228" calcext:value-type="float">
            <text:p>228</text:p>
          </table:table-cell>
          <table:table-cell table:style-name="ce30"/>
          <table:table-cell table:style-name="ce51" office:value-type="float" office:value="228" calcext:value-type="float">
            <text:p>2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32" calcext:value-type="float">
            <text:p>13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eekenaars, teekenmeesters, daguerrcotypeurs, decor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andbouw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275" calcext:value-type="float">
            <text:p>275</text:p>
          </table:table-cell>
          <table:table-cell table:style-name="ce31" office:value-type="float" office:value="9342" calcext:value-type="float">
            <text:p>9,342</text:p>
          </table:table-cell>
          <table:table-cell table:style-name="ce31" office:value-type="float" office:value="3701" calcext:value-type="float">
            <text:p>3,701</text:p>
          </table:table-cell>
          <table:table-cell table:style-name="ce31" office:value-type="float" office:value="9921" calcext:value-type="float">
            <text:p>9,921</text:p>
          </table:table-cell>
          <table:table-cell table:style-name="ce31" office:value-type="float" office:value="3988" calcext:value-type="float">
            <text:p>3,988</text:p>
          </table:table-cell>
          <table:table-cell table:style-name="ce52" office:value-type="float" office:value="13909" calcext:value-type="float">
            <text:p>13,909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51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1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1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1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51" office:value-type="float" office:value="51" calcext:value-type="float">
            <text:p>5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eters (kolen-, koorn-, hooi-, hout-, scheeps- enz.), wijnsto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51" office:value-type="float" office:value="59" calcext:value-type="float">
            <text:p>5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table:number-columns-repeated="4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566" calcext:value-type="float">
            <text:p>566</text:p>
          </table:table-cell>
          <table:table-cell table:style-name="ce30"/>
          <table:table-cell table:style-name="ce30" office:value-type="float" office:value="590" calcext:value-type="float">
            <text:p>590</text:p>
          </table:table-cell>
          <table:table-cell table:style-name="ce51" office:value-type="float" office:value="590" calcext:value-type="float">
            <text:p>59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0" calcext:value-type="float">
            <text:p>10</text:p>
          </table:table-cell>
          <table:table-cell table:style-name="ce51" office:value-type="float" office:value="207" calcext:value-type="float">
            <text:p>20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7" calcext:value-type="float">
            <text:p>27</text:p>
          </table:table-cell>
          <table:table-cell table:style-name="ce51" office:value-type="float" office:value="186" calcext:value-type="float">
            <text:p>1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 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51" office:value-type="float" office:value="57" calcext:value-type="float">
            <text:p>5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" calcext:value-type="float">
            <text:p>3</text:p>
          </table:table-cell>
          <table:table-cell table:style-name="ce51" office:value-type="float" office:value="60" calcext:value-type="float">
            <text:p>6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51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/>
          <table:table-cell table:style-name="ce30" office:value-type="float" office:value="127" calcext:value-type="float">
            <text:p>127</text:p>
          </table:table-cell>
          <table:table-cell table:style-name="ce30"/>
          <table:table-cell table:style-name="ce51" office:value-type="float" office:value="127" calcext:value-type="float">
            <text:p>1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pl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55" calcext:value-type="float">
            <text:p>155</text:p>
          </table:table-cell>
          <table:table-cell table:style-name="ce30"/>
          <table:table-cell table:style-name="ce30" office:value-type="float" office:value="161" calcext:value-type="float">
            <text:p>161</text:p>
          </table:table-cell>
          <table:table-cell table:style-name="ce30"/>
          <table:table-cell table:style-name="ce51" office:value-type="float" office:value="161" calcext:value-type="float">
            <text:p>16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9" calcext:value-type="float">
            <text:p>9</text:p>
          </table:table-cell>
          <table:table-cell table:style-name="ce51" office:value-type="float" office:value="541" calcext:value-type="float">
            <text:p>54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12" calcext:value-type="float">
            <text:p>12</text:p>
          </table:table-cell>
          <table:table-cell table:style-name="ce51" office:value-type="float" office:value="540" calcext:value-type="float">
            <text:p>5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3223" calcext:value-type="float">
            <text:p>3,223</text:p>
          </table:table-cell>
          <table:table-cell table:style-name="ce31" office:value-type="float" office:value="2974" calcext:value-type="float">
            <text:p>2,974</text:p>
          </table:table-cell>
          <table:table-cell table:style-name="ce31" office:value-type="float" office:value="1296" calcext:value-type="float">
            <text:p>1,296</text:p>
          </table:table-cell>
          <table:table-cell table:style-name="ce31" office:value-type="float" office:value="1125" calcext:value-type="float">
            <text:p>1,125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" calcext:value-type="float">
            <text:p>21</text:p>
          </table:table-cell>
          <table:table-cell table:style-name="ce31" office:value-type="float" office:value="5294" calcext:value-type="float">
            <text:p>5,294</text:p>
          </table:table-cell>
          <table:table-cell table:style-name="ce31" office:value-type="float" office:value="4758" calcext:value-type="float">
            <text:p>4,758</text:p>
          </table:table-cell>
          <table:table-cell table:style-name="ce52" office:value-type="float" office:value="10052" calcext:value-type="float">
            <text:p>10,052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51" calcext:value-type="float">
            <text:p>5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254" calcext:value-type="float">
            <text:p>25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317" calcext:value-type="float">
            <text:p>317</text:p>
          </table:table-cell>
          <table:table-cell table:style-name="ce51" office:value-type="float" office:value="986" calcext:value-type="float">
            <text:p>9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41" calcext:value-type="float">
            <text:p>4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kerv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1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plan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799" calcext:value-type="float">
            <text:p>79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29" calcext:value-type="float">
            <text:p>2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51" office:value-type="float" office:value="31" calcext:value-type="float">
            <text:p>3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Turf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51" office:value-type="float" office:value="33" calcext:value-type="float">
            <text:p>3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3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6" calcext:value-type="float">
            <text:p>26</text:p>
          </table:table-cell>
          <table:table-cell table:style-name="ce51" office:value-type="float" office:value="152" calcext:value-type="float">
            <text:p>1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51" office:value-type="float" office:value="86" calcext:value-type="float">
            <text:p>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49" calcext:value-type="float">
            <text:p>14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oerlieden, koetsiers, loopers, postknechten en sl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gelverkoopers, koolbo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5">
          <table:table-cell table:style-name="ce9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6242" calcext:value-type="float">
            <text:p>6,242</text:p>
          </table:table-cell>
          <table:table-cell table:style-name="ce31" office:value-type="float" office:value="6099" calcext:value-type="float">
            <text:p>6,099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609" calcext:value-type="float">
            <text:p>609</text:p>
          </table:table-cell>
          <table:table-cell table:style-name="ce31" office:value-type="float" office:value="1581" calcext:value-type="float">
            <text:p>1,581</text:p>
          </table:table-cell>
          <table:table-cell table:style-name="ce31" office:value-type="float" office:value="2043" calcext:value-type="float">
            <text:p>2,043</text:p>
          </table:table-cell>
          <table:table-cell table:style-name="ce31" office:value-type="float" office:value="2489" calcext:value-type="float">
            <text:p>2,489</text:p>
          </table:table-cell>
          <table:table-cell table:style-name="ce31" office:value-type="float" office:value="15406" calcext:value-type="float">
            <text:p>15,406</text:p>
          </table:table-cell>
          <table:table-cell table:style-name="ce30" office:value-type="string" calcext:value-type="string">
            <text:p>10.891/1</text:p>
          </table:table-cell>
          <table:table-cell table:style-name="ce31" office:value-type="float" office:value="24157" calcext:value-type="float">
            <text:p>24,157</text:p>
          </table:table-cell>
          <table:table-cell table:style-name="ce52" office:value-type="float" office:value="35048" calcext:value-type="float">
            <text:p>35,048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5">
          <table:table-cell table:style-name="ce9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1"/>
          <table:table-cell table:number-columns-repeated="1011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 table:style-name="Default"/>
          <table:table-cell table:style-name="ce24" office:value-type="float" office:value="9622" calcext:value-type="float">
            <text:p>9,622</text:p>
          </table:table-cell>
          <table:table-cell table:style-name="ce32" office:value-type="float" office:value="9185" calcext:value-type="float">
            <text:p>9,185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3731" calcext:value-type="float">
            <text:p>3,731</text:p>
          </table:table-cell>
          <table:table-cell table:style-name="ce32" office:value-type="float" office:value="3545" calcext:value-type="float">
            <text:p>3,545</text:p>
          </table:table-cell>
          <table:table-cell table:style-name="ce32" office:value-type="float" office:value="26920" calcext:value-type="float">
            <text:p>26,920</text:p>
          </table:table-cell>
          <table:table-cell table:style-name="ce32" office:value-type="float" office:value="25943" calcext:value-type="float">
            <text:p>25,943</text:p>
          </table:table-cell>
          <table:table-cell table:style-name="ce32" office:value-type="float" office:value="42256" calcext:value-type="float">
            <text:p>42,256</text:p>
          </table:table-cell>
          <table:table-cell table:style-name="ce32" office:value-type="float" office:value="40482" calcext:value-type="float">
            <text:p>40,482</text:p>
          </table:table-cell>
          <table:table-cell table:style-name="ce53" office:value-type="float" office:value="82738" calcext:value-type="float">
            <text:p>82,738</text:p>
          </table:table-cell>
          <table:table-cell table:style-name="Default"/>
          <table:table-cell table:style-name="ce64" table:number-columns-repeated="5"/>
          <table:table-cell table:style-name="ce71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1. De kneehts en leerlingen zijn onder de beroepen begrepen.</text:p>
          </table:table-cell>
          <table:table-cell table:style-name="ce16" table:number-columns-repeated="11"/>
          <table:table-cell table:style-name="ce54"/>
          <table:table-cell table:number-columns-repeated="1011"/>
        </table:table-row>
        <table:table-row table:style-name="ro5" table:number-rows-repeated="10476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8" table:default-cell-style-name="ce7"/>
        <table:table-column table:style-name="co9" table:default-cell-style-name="ce7"/>
        <table:table-column table:style-name="co4" table:number-columns-repeated="1020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style-name="ce72" office:value-type="string" calcext:value-type="string">
            <text:p>Editregel</text:p>
          </table:table-cell>
          <table:table-cell table:style-name="ce72" office:value-type="string" calcext:value-type="string">
            <text:p>Deel telling</text:p>
          </table:table-cell>
          <table:table-cell table:style-name="ce72" office:value-type="string" calcext:value-type="string">
            <text:p>Rolnummer</text:p>
          </table:table-cell>
          <table:table-cell table:style-name="ce72" office:value-type="string" calcext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ce73" table:number-columns-repeated="5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4" office:value-type="float" office:value="6591" calcext:value-type="float">
            <text:p>65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1" calcext:value-type="float">
            <text:p>3802040028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2" calcext:value-type="float">
            <text:p>65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2" calcext:value-type="float">
            <text:p>3802040028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3" calcext:value-type="float">
            <text:p>65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3" calcext:value-type="float">
            <text:p>3802040028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4" calcext:value-type="float">
            <text:p>65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4" calcext:value-type="float">
            <text:p>3802040028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5" calcext:value-type="float">
            <text:p>65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5" calcext:value-type="float">
            <text:p>3802040028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6" calcext:value-type="float">
            <text:p>65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6" calcext:value-type="float">
            <text:p>3802040028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7" calcext:value-type="float">
            <text:p>65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7" calcext:value-type="float">
            <text:p>3802040028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8" calcext:value-type="float">
            <text:p>65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8" calcext:value-type="float">
            <text:p>3802040028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599" calcext:value-type="float">
            <text:p>65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09" calcext:value-type="float">
            <text:p>3802040028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0" calcext:value-type="float">
            <text:p>66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0" calcext:value-type="float">
            <text:p>3802040028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1" calcext:value-type="float">
            <text:p>66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1" calcext:value-type="float">
            <text:p>3802040028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2" calcext:value-type="float">
            <text:p>66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2" calcext:value-type="float">
            <text:p>3802040028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3" calcext:value-type="float">
            <text:p>66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3" calcext:value-type="float">
            <text:p>3802040028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4" calcext:value-type="float">
            <text:p>66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4" calcext:value-type="float">
            <text:p>3802040028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5" calcext:value-type="float">
            <text:p>66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5" calcext:value-type="float">
            <text:p>3802040028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6" calcext:value-type="float">
            <text:p>66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6" calcext:value-type="float">
            <text:p>3802040028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7" calcext:value-type="float">
            <text:p>66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7" calcext:value-type="float">
            <text:p>3802040028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8" calcext:value-type="float">
            <text:p>66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8" calcext:value-type="float">
            <text:p>3802040028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09" calcext:value-type="float">
            <text:p>66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19" calcext:value-type="float">
            <text:p>3802040028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0" calcext:value-type="float">
            <text:p>66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0" calcext:value-type="float">
            <text:p>3802040028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1" calcext:value-type="float">
            <text:p>66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1" calcext:value-type="float">
            <text:p>3802040028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2" calcext:value-type="float">
            <text:p>66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2" calcext:value-type="float">
            <text:p>3802040028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3" calcext:value-type="float">
            <text:p>66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3" calcext:value-type="float">
            <text:p>3802040028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4" calcext:value-type="float">
            <text:p>66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4" calcext:value-type="float">
            <text:p>3802040028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5" calcext:value-type="float">
            <text:p>66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5" calcext:value-type="float">
            <text:p>3802040028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6" calcext:value-type="float">
            <text:p>66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6" calcext:value-type="float">
            <text:p>3802040028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7" calcext:value-type="float">
            <text:p>66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7" calcext:value-type="float">
            <text:p>3802040028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8" calcext:value-type="float">
            <text:p>66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8" calcext:value-type="float">
            <text:p>3802040028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19" calcext:value-type="float">
            <text:p>66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29" calcext:value-type="float">
            <text:p>3802040028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0" calcext:value-type="float">
            <text:p>66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0" calcext:value-type="float">
            <text:p>3802040028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1" calcext:value-type="float">
            <text:p>66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1" calcext:value-type="float">
            <text:p>3802040028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2" calcext:value-type="float">
            <text:p>66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2" calcext:value-type="float">
            <text:p>3802040028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3" calcext:value-type="float">
            <text:p>66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3" calcext:value-type="float">
            <text:p>3802040028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4" calcext:value-type="float">
            <text:p>66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4" calcext:value-type="float">
            <text:p>3802040028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5" calcext:value-type="float">
            <text:p>66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5" calcext:value-type="float">
            <text:p>3802040028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6" calcext:value-type="float">
            <text:p>66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6" calcext:value-type="float">
            <text:p>3802040028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7" calcext:value-type="float">
            <text:p>66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7" calcext:value-type="float">
            <text:p>3802040028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8" calcext:value-type="float">
            <text:p>66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8" calcext:value-type="float">
            <text:p>3802040028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29" calcext:value-type="float">
            <text:p>66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39" calcext:value-type="float">
            <text:p>3802040028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0" calcext:value-type="float">
            <text:p>66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0" calcext:value-type="float">
            <text:p>3802040028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1" calcext:value-type="float">
            <text:p>66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1" calcext:value-type="float">
            <text:p>3802040028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2" calcext:value-type="float">
            <text:p>66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2" calcext:value-type="float">
            <text:p>3802040028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3" calcext:value-type="float">
            <text:p>66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3" calcext:value-type="float">
            <text:p>3802040028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4" calcext:value-type="float">
            <text:p>66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4" calcext:value-type="float">
            <text:p>3802040028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5" calcext:value-type="float">
            <text:p>66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5" calcext:value-type="float">
            <text:p>3802040028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6" calcext:value-type="float">
            <text:p>66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6" calcext:value-type="float">
            <text:p>3802040028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7" calcext:value-type="float">
            <text:p>66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7" calcext:value-type="float">
            <text:p>3802040028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8" calcext:value-type="float">
            <text:p>66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8" calcext:value-type="float">
            <text:p>3802040028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39" calcext:value-type="float">
            <text:p>66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49" calcext:value-type="float">
            <text:p>3802040028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0" calcext:value-type="float">
            <text:p>66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50" calcext:value-type="float">
            <text:p>3802040028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1" calcext:value-type="float">
            <text:p>66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51" calcext:value-type="float">
            <text:p>3802040028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2" calcext:value-type="float">
            <text:p>66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52" calcext:value-type="float">
            <text:p>3802040028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3" calcext:value-type="float">
            <text:p>66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801053" calcext:value-type="float">
            <text:p>3802040028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4" calcext:value-type="float">
            <text:p>66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1" calcext:value-type="float">
            <text:p>3802040029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5" calcext:value-type="float">
            <text:p>66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2" calcext:value-type="float">
            <text:p>3802040029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6" calcext:value-type="float">
            <text:p>66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3" calcext:value-type="float">
            <text:p>3802040029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7" calcext:value-type="float">
            <text:p>66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4" calcext:value-type="float">
            <text:p>3802040029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8" calcext:value-type="float">
            <text:p>66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5" calcext:value-type="float">
            <text:p>3802040029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49" calcext:value-type="float">
            <text:p>66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6" calcext:value-type="float">
            <text:p>3802040029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0" calcext:value-type="float">
            <text:p>66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7" calcext:value-type="float">
            <text:p>3802040029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1" calcext:value-type="float">
            <text:p>66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8" calcext:value-type="float">
            <text:p>3802040029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2" calcext:value-type="float">
            <text:p>66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09" calcext:value-type="float">
            <text:p>3802040029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3" calcext:value-type="float">
            <text:p>66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0" calcext:value-type="float">
            <text:p>3802040029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4" calcext:value-type="float">
            <text:p>66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1" calcext:value-type="float">
            <text:p>3802040029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5" calcext:value-type="float">
            <text:p>66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2" calcext:value-type="float">
            <text:p>3802040029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6" calcext:value-type="float">
            <text:p>66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3" calcext:value-type="float">
            <text:p>3802040029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7" calcext:value-type="float">
            <text:p>66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4" calcext:value-type="float">
            <text:p>3802040029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8" calcext:value-type="float">
            <text:p>66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5" calcext:value-type="float">
            <text:p>3802040029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59" calcext:value-type="float">
            <text:p>66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6" calcext:value-type="float">
            <text:p>3802040029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0" calcext:value-type="float">
            <text:p>66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7" calcext:value-type="float">
            <text:p>3802040029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1" calcext:value-type="float">
            <text:p>66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8" calcext:value-type="float">
            <text:p>3802040029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2" calcext:value-type="float">
            <text:p>66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19" calcext:value-type="float">
            <text:p>3802040029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3" calcext:value-type="float">
            <text:p>66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0" calcext:value-type="float">
            <text:p>3802040029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4" calcext:value-type="float">
            <text:p>66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1" calcext:value-type="float">
            <text:p>3802040029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5" calcext:value-type="float">
            <text:p>66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2" calcext:value-type="float">
            <text:p>3802040029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6" calcext:value-type="float">
            <text:p>66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3" calcext:value-type="float">
            <text:p>3802040029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7" calcext:value-type="float">
            <text:p>66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4" calcext:value-type="float">
            <text:p>3802040029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8" calcext:value-type="float">
            <text:p>66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5" calcext:value-type="float">
            <text:p>3802040029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69" calcext:value-type="float">
            <text:p>66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6" calcext:value-type="float">
            <text:p>3802040029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0" calcext:value-type="float">
            <text:p>66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7" calcext:value-type="float">
            <text:p>3802040029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1" calcext:value-type="float">
            <text:p>66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8" calcext:value-type="float">
            <text:p>3802040029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2" calcext:value-type="float">
            <text:p>66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29" calcext:value-type="float">
            <text:p>3802040029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3" calcext:value-type="float">
            <text:p>66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0" calcext:value-type="float">
            <text:p>3802040029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4" calcext:value-type="float">
            <text:p>66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1" calcext:value-type="float">
            <text:p>3802040029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5" calcext:value-type="float">
            <text:p>66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2" calcext:value-type="float">
            <text:p>3802040029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6" calcext:value-type="float">
            <text:p>66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3" calcext:value-type="float">
            <text:p>3802040029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7" calcext:value-type="float">
            <text:p>66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4" calcext:value-type="float">
            <text:p>3802040029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8" calcext:value-type="float">
            <text:p>66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5" calcext:value-type="float">
            <text:p>3802040029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79" calcext:value-type="float">
            <text:p>66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6" calcext:value-type="float">
            <text:p>3802040029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0" calcext:value-type="float">
            <text:p>66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7" calcext:value-type="float">
            <text:p>3802040029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1" calcext:value-type="float">
            <text:p>66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8" calcext:value-type="float">
            <text:p>3802040029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2" calcext:value-type="float">
            <text:p>66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39" calcext:value-type="float">
            <text:p>3802040029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3" calcext:value-type="float">
            <text:p>66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0" calcext:value-type="float">
            <text:p>3802040029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4" calcext:value-type="float">
            <text:p>66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1" calcext:value-type="float">
            <text:p>3802040029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5" calcext:value-type="float">
            <text:p>66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2" calcext:value-type="float">
            <text:p>3802040029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6" calcext:value-type="float">
            <text:p>66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3" calcext:value-type="float">
            <text:p>3802040029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7" calcext:value-type="float">
            <text:p>66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4" calcext:value-type="float">
            <text:p>3802040029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8" calcext:value-type="float">
            <text:p>66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5" calcext:value-type="float">
            <text:p>3802040029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89" calcext:value-type="float">
            <text:p>66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6" calcext:value-type="float">
            <text:p>3802040029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0" calcext:value-type="float">
            <text:p>66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7" calcext:value-type="float">
            <text:p>3802040029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1" calcext:value-type="float">
            <text:p>66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8" calcext:value-type="float">
            <text:p>3802040029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2" calcext:value-type="float">
            <text:p>66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49" calcext:value-type="float">
            <text:p>3802040029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3" calcext:value-type="float">
            <text:p>66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50" calcext:value-type="float">
            <text:p>3802040029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4" calcext:value-type="float">
            <text:p>66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4002901051" calcext:value-type="float">
            <text:p>3802040029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5" calcext:value-type="float">
            <text:p>66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1" calcext:value-type="float">
            <text:p>3802050030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6" calcext:value-type="float">
            <text:p>66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2" calcext:value-type="float">
            <text:p>3802050030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7" calcext:value-type="float">
            <text:p>66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3" calcext:value-type="float">
            <text:p>3802050030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8" calcext:value-type="float">
            <text:p>66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4" calcext:value-type="float">
            <text:p>3802050030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699" calcext:value-type="float">
            <text:p>66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5" calcext:value-type="float">
            <text:p>3802050030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0" calcext:value-type="float">
            <text:p>67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6" calcext:value-type="float">
            <text:p>3802050030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1" calcext:value-type="float">
            <text:p>67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7" calcext:value-type="float">
            <text:p>3802050030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2" calcext:value-type="float">
            <text:p>67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8" calcext:value-type="float">
            <text:p>3802050030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3" calcext:value-type="float">
            <text:p>67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09" calcext:value-type="float">
            <text:p>3802050030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4" calcext:value-type="float">
            <text:p>67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0" calcext:value-type="float">
            <text:p>3802050030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5" calcext:value-type="float">
            <text:p>67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1" calcext:value-type="float">
            <text:p>3802050030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6" calcext:value-type="float">
            <text:p>67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2" calcext:value-type="float">
            <text:p>3802050030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7" calcext:value-type="float">
            <text:p>67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3" calcext:value-type="float">
            <text:p>3802050030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8" calcext:value-type="float">
            <text:p>67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4" calcext:value-type="float">
            <text:p>3802050030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09" calcext:value-type="float">
            <text:p>67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5" calcext:value-type="float">
            <text:p>3802050030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0" calcext:value-type="float">
            <text:p>67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6" calcext:value-type="float">
            <text:p>3802050030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1" calcext:value-type="float">
            <text:p>67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7" calcext:value-type="float">
            <text:p>3802050030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2" calcext:value-type="float">
            <text:p>67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8" calcext:value-type="float">
            <text:p>3802050030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3" calcext:value-type="float">
            <text:p>67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19" calcext:value-type="float">
            <text:p>3802050030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4" calcext:value-type="float">
            <text:p>67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0" calcext:value-type="float">
            <text:p>3802050030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5" calcext:value-type="float">
            <text:p>67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1" calcext:value-type="float">
            <text:p>3802050030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6" calcext:value-type="float">
            <text:p>67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2" calcext:value-type="float">
            <text:p>3802050030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7" calcext:value-type="float">
            <text:p>67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3" calcext:value-type="float">
            <text:p>3802050030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8" calcext:value-type="float">
            <text:p>67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4" calcext:value-type="float">
            <text:p>3802050030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19" calcext:value-type="float">
            <text:p>67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5" calcext:value-type="float">
            <text:p>3802050030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0" calcext:value-type="float">
            <text:p>67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6" calcext:value-type="float">
            <text:p>3802050030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1" calcext:value-type="float">
            <text:p>67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7" calcext:value-type="float">
            <text:p>3802050030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2" calcext:value-type="float">
            <text:p>67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8" calcext:value-type="float">
            <text:p>3802050030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3" calcext:value-type="float">
            <text:p>67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29" calcext:value-type="float">
            <text:p>3802050030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4" calcext:value-type="float">
            <text:p>67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0" calcext:value-type="float">
            <text:p>3802050030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5" calcext:value-type="float">
            <text:p>67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1" calcext:value-type="float">
            <text:p>3802050030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6" calcext:value-type="float">
            <text:p>67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2" calcext:value-type="float">
            <text:p>3802050030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7" calcext:value-type="float">
            <text:p>67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3" calcext:value-type="float">
            <text:p>3802050030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8" calcext:value-type="float">
            <text:p>67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4" calcext:value-type="float">
            <text:p>3802050030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29" calcext:value-type="float">
            <text:p>67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5" calcext:value-type="float">
            <text:p>3802050030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0" calcext:value-type="float">
            <text:p>67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6" calcext:value-type="float">
            <text:p>3802050030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1" calcext:value-type="float">
            <text:p>67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7" calcext:value-type="float">
            <text:p>3802050030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2" calcext:value-type="float">
            <text:p>67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8" calcext:value-type="float">
            <text:p>3802050030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3" calcext:value-type="float">
            <text:p>67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39" calcext:value-type="float">
            <text:p>3802050030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4" calcext:value-type="float">
            <text:p>67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0" calcext:value-type="float">
            <text:p>3802050030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5" calcext:value-type="float">
            <text:p>67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1" calcext:value-type="float">
            <text:p>3802050030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6" calcext:value-type="float">
            <text:p>67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2" calcext:value-type="float">
            <text:p>3802050030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7" calcext:value-type="float">
            <text:p>67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3" calcext:value-type="float">
            <text:p>3802050030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8" calcext:value-type="float">
            <text:p>67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4" calcext:value-type="float">
            <text:p>3802050030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39" calcext:value-type="float">
            <text:p>67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5" calcext:value-type="float">
            <text:p>3802050030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0" calcext:value-type="float">
            <text:p>67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6" calcext:value-type="float">
            <text:p>3802050030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1" calcext:value-type="float">
            <text:p>67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7" calcext:value-type="float">
            <text:p>3802050030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2" calcext:value-type="float">
            <text:p>67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8" calcext:value-type="float">
            <text:p>3802050030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3" calcext:value-type="float">
            <text:p>67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49" calcext:value-type="float">
            <text:p>3802050030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4" calcext:value-type="float">
            <text:p>67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50" calcext:value-type="float">
            <text:p>3802050030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5" calcext:value-type="float">
            <text:p>67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51" calcext:value-type="float">
            <text:p>3802050030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6" calcext:value-type="float">
            <text:p>67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52" calcext:value-type="float">
            <text:p>3802050030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7" calcext:value-type="float">
            <text:p>67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001053" calcext:value-type="float">
            <text:p>3802050030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8" calcext:value-type="float">
            <text:p>67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1" calcext:value-type="float">
            <text:p>380205003101001</text:p>
          </table:table-cell>
          <table:table-cell table:style-name="TL_20_Metadata" office:value-type="string" calcext:value-type="string">
            <text:p>380205003101001* <text:s/>Hieronder begrepen de fabrijkanten van katoen, hennip, vlas, wol en zijd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49" calcext:value-type="float">
            <text:p>67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2" calcext:value-type="float">
            <text:p>3802050031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0" calcext:value-type="float">
            <text:p>67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3" calcext:value-type="float">
            <text:p>3802050031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1" calcext:value-type="float">
            <text:p>67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4" calcext:value-type="float">
            <text:p>3802050031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2" calcext:value-type="float">
            <text:p>67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5" calcext:value-type="float">
            <text:p>3802050031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3" calcext:value-type="float">
            <text:p>67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6" calcext:value-type="float">
            <text:p>3802050031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4" calcext:value-type="float">
            <text:p>67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7" calcext:value-type="float">
            <text:p>3802050031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5" calcext:value-type="float">
            <text:p>67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8" calcext:value-type="float">
            <text:p>3802050031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6" calcext:value-type="float">
            <text:p>67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09" calcext:value-type="float">
            <text:p>3802050031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7" calcext:value-type="float">
            <text:p>67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0" calcext:value-type="float">
            <text:p>3802050031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8" calcext:value-type="float">
            <text:p>67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1" calcext:value-type="float">
            <text:p>3802050031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59" calcext:value-type="float">
            <text:p>67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2" calcext:value-type="float">
            <text:p>3802050031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0" calcext:value-type="float">
            <text:p>67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3" calcext:value-type="float">
            <text:p>3802050031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1" calcext:value-type="float">
            <text:p>67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4" calcext:value-type="float">
            <text:p>3802050031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2" calcext:value-type="float">
            <text:p>67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5" calcext:value-type="float">
            <text:p>3802050031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3" calcext:value-type="float">
            <text:p>67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6" calcext:value-type="float">
            <text:p>3802050031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4" calcext:value-type="float">
            <text:p>67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7" calcext:value-type="float">
            <text:p>3802050031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5" calcext:value-type="float">
            <text:p>67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8" calcext:value-type="float">
            <text:p>3802050031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6" calcext:value-type="float">
            <text:p>67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19" calcext:value-type="float">
            <text:p>3802050031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7" calcext:value-type="float">
            <text:p>67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0" calcext:value-type="float">
            <text:p>3802050031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8" calcext:value-type="float">
            <text:p>67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1" calcext:value-type="float">
            <text:p>3802050031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69" calcext:value-type="float">
            <text:p>67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2" calcext:value-type="float">
            <text:p>3802050031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0" calcext:value-type="float">
            <text:p>67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3" calcext:value-type="float">
            <text:p>3802050031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1" calcext:value-type="float">
            <text:p>67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4" calcext:value-type="float">
            <text:p>380205003101024</text:p>
          </table:table-cell>
          <table:table-cell table:style-name="TL_20_Metadata" office:value-type="string" calcext:value-type="string">
            <text:p>3802050031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2" calcext:value-type="float">
            <text:p>67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5" calcext:value-type="float">
            <text:p>3802050031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3" calcext:value-type="float">
            <text:p>67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6" calcext:value-type="float">
            <text:p>380205003101026</text:p>
          </table:table-cell>
          <table:table-cell table:style-name="TL_20_Metadata" office:value-type="string" calcext:value-type="string">
            <text:p>3802050031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4" calcext:value-type="float">
            <text:p>67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7" calcext:value-type="float">
            <text:p>3802050031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5" calcext:value-type="float">
            <text:p>67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8" calcext:value-type="float">
            <text:p>3802050031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6" calcext:value-type="float">
            <text:p>67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29" calcext:value-type="float">
            <text:p>3802050031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7" calcext:value-type="float">
            <text:p>67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0" calcext:value-type="float">
            <text:p>3802050031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8" calcext:value-type="float">
            <text:p>67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1" calcext:value-type="float">
            <text:p>3802050031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79" calcext:value-type="float">
            <text:p>67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2" calcext:value-type="float">
            <text:p>3802050031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0" calcext:value-type="float">
            <text:p>67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3" calcext:value-type="float">
            <text:p>3802050031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1" calcext:value-type="float">
            <text:p>67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4" calcext:value-type="float">
            <text:p>3802050031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2" calcext:value-type="float">
            <text:p>67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5" calcext:value-type="float">
            <text:p>3802050031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3" calcext:value-type="float">
            <text:p>67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6" calcext:value-type="float">
            <text:p>3802050031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4" calcext:value-type="float">
            <text:p>67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7" calcext:value-type="float">
            <text:p>3802050031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5" calcext:value-type="float">
            <text:p>67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8" calcext:value-type="float">
            <text:p>3802050031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6" calcext:value-type="float">
            <text:p>67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39" calcext:value-type="float">
            <text:p>3802050031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7" calcext:value-type="float">
            <text:p>67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0" calcext:value-type="float">
            <text:p>3802050031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8" calcext:value-type="float">
            <text:p>67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1" calcext:value-type="float">
            <text:p>3802050031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89" calcext:value-type="float">
            <text:p>67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2" calcext:value-type="float">
            <text:p>3802050031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0" calcext:value-type="float">
            <text:p>67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3" calcext:value-type="float">
            <text:p>3802050031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1" calcext:value-type="float">
            <text:p>67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4" calcext:value-type="float">
            <text:p>3802050031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2" calcext:value-type="float">
            <text:p>67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5" calcext:value-type="float">
            <text:p>3802050031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3" calcext:value-type="float">
            <text:p>67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6" calcext:value-type="float">
            <text:p>3802050031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4" calcext:value-type="float">
            <text:p>67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7" calcext:value-type="float">
            <text:p>3802050031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5" calcext:value-type="float">
            <text:p>67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8" calcext:value-type="float">
            <text:p>3802050031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6" calcext:value-type="float">
            <text:p>67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49" calcext:value-type="float">
            <text:p>3802050031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7" calcext:value-type="float">
            <text:p>67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5003101050" calcext:value-type="float">
            <text:p>3802050031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8" calcext:value-type="float">
            <text:p>67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1" calcext:value-type="float">
            <text:p>3802060032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799" calcext:value-type="float">
            <text:p>67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2" calcext:value-type="float">
            <text:p>3802060032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0" calcext:value-type="float">
            <text:p>68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3" calcext:value-type="float">
            <text:p>3802060032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1" calcext:value-type="float">
            <text:p>68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4" calcext:value-type="float">
            <text:p>3802060032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2" calcext:value-type="float">
            <text:p>68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5" calcext:value-type="float">
            <text:p>3802060032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3" calcext:value-type="float">
            <text:p>68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6" calcext:value-type="float">
            <text:p>3802060032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4" calcext:value-type="float">
            <text:p>68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7" calcext:value-type="float">
            <text:p>3802060032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5" calcext:value-type="float">
            <text:p>68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8" calcext:value-type="float">
            <text:p>3802060032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6" calcext:value-type="float">
            <text:p>68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09" calcext:value-type="float">
            <text:p>3802060032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7" calcext:value-type="float">
            <text:p>68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0" calcext:value-type="float">
            <text:p>3802060032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8" calcext:value-type="float">
            <text:p>68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1" calcext:value-type="float">
            <text:p>3802060032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09" calcext:value-type="float">
            <text:p>68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2" calcext:value-type="float">
            <text:p>3802060032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0" calcext:value-type="float">
            <text:p>68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3" calcext:value-type="float">
            <text:p>3802060032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1" calcext:value-type="float">
            <text:p>68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4" calcext:value-type="float">
            <text:p>3802060032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2" calcext:value-type="float">
            <text:p>68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5" calcext:value-type="float">
            <text:p>3802060032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3" calcext:value-type="float">
            <text:p>68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6" calcext:value-type="float">
            <text:p>3802060032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4" calcext:value-type="float">
            <text:p>68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7" calcext:value-type="float">
            <text:p>3802060032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5" calcext:value-type="float">
            <text:p>68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8" calcext:value-type="float">
            <text:p>3802060032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6" calcext:value-type="float">
            <text:p>68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19" calcext:value-type="float">
            <text:p>3802060032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7" calcext:value-type="float">
            <text:p>68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0" calcext:value-type="float">
            <text:p>3802060032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8" calcext:value-type="float">
            <text:p>68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1" calcext:value-type="float">
            <text:p>3802060032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19" calcext:value-type="float">
            <text:p>68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2" calcext:value-type="float">
            <text:p>3802060032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0" calcext:value-type="float">
            <text:p>68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3" calcext:value-type="float">
            <text:p>3802060032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1" calcext:value-type="float">
            <text:p>68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4" calcext:value-type="float">
            <text:p>3802060032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2" calcext:value-type="float">
            <text:p>68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5" calcext:value-type="float">
            <text:p>3802060032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3" calcext:value-type="float">
            <text:p>68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6" calcext:value-type="float">
            <text:p>3802060032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4" calcext:value-type="float">
            <text:p>68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7" calcext:value-type="float">
            <text:p>3802060032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5" calcext:value-type="float">
            <text:p>68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8" calcext:value-type="float">
            <text:p>3802060032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6" calcext:value-type="float">
            <text:p>68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29" calcext:value-type="float">
            <text:p>3802060032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7" calcext:value-type="float">
            <text:p>68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0" calcext:value-type="float">
            <text:p>3802060032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8" calcext:value-type="float">
            <text:p>68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1" calcext:value-type="float">
            <text:p>3802060032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29" calcext:value-type="float">
            <text:p>68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2" calcext:value-type="float">
            <text:p>3802060032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0" calcext:value-type="float">
            <text:p>68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3" calcext:value-type="float">
            <text:p>3802060032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1" calcext:value-type="float">
            <text:p>68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4" calcext:value-type="float">
            <text:p>3802060032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2" calcext:value-type="float">
            <text:p>68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5" calcext:value-type="float">
            <text:p>3802060032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3" calcext:value-type="float">
            <text:p>68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6" calcext:value-type="float">
            <text:p>3802060032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4" calcext:value-type="float">
            <text:p>68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7" calcext:value-type="float">
            <text:p>3802060032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5" calcext:value-type="float">
            <text:p>68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8" calcext:value-type="float">
            <text:p>3802060032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6" calcext:value-type="float">
            <text:p>68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39" calcext:value-type="float">
            <text:p>3802060032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7" calcext:value-type="float">
            <text:p>68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0" calcext:value-type="float">
            <text:p>3802060032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8" calcext:value-type="float">
            <text:p>68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1" calcext:value-type="float">
            <text:p>3802060032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39" calcext:value-type="float">
            <text:p>68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2" calcext:value-type="float">
            <text:p>3802060032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0" calcext:value-type="float">
            <text:p>68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3" calcext:value-type="float">
            <text:p>3802060032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1" calcext:value-type="float">
            <text:p>68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4" calcext:value-type="float">
            <text:p>3802060032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2" calcext:value-type="float">
            <text:p>68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5" calcext:value-type="float">
            <text:p>3802060032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3" calcext:value-type="float">
            <text:p>68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6" calcext:value-type="float">
            <text:p>3802060032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4" calcext:value-type="float">
            <text:p>68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7" calcext:value-type="float">
            <text:p>3802060032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5" calcext:value-type="float">
            <text:p>68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8" calcext:value-type="float">
            <text:p>3802060032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6" calcext:value-type="float">
            <text:p>68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49" calcext:value-type="float">
            <text:p>3802060032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7" calcext:value-type="float">
            <text:p>68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50" calcext:value-type="float">
            <text:p>3802060032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8" calcext:value-type="float">
            <text:p>68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51" calcext:value-type="float">
            <text:p>3802060032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49" calcext:value-type="float">
            <text:p>68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52" calcext:value-type="float">
            <text:p>3802060032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0" calcext:value-type="float">
            <text:p>68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201053" calcext:value-type="float">
            <text:p>3802060032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1" calcext:value-type="float">
            <text:p>68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1" calcext:value-type="float">
            <text:p>3802060033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2" calcext:value-type="float">
            <text:p>68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2" calcext:value-type="float">
            <text:p>3802060033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3" calcext:value-type="float">
            <text:p>68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3" calcext:value-type="float">
            <text:p>3802060033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4" calcext:value-type="float">
            <text:p>68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4" calcext:value-type="float">
            <text:p>3802060033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5" calcext:value-type="float">
            <text:p>68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5" calcext:value-type="float">
            <text:p>3802060033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6" calcext:value-type="float">
            <text:p>68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6" calcext:value-type="float">
            <text:p>3802060033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7" calcext:value-type="float">
            <text:p>68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7" calcext:value-type="float">
            <text:p>3802060033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8" calcext:value-type="float">
            <text:p>68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8" calcext:value-type="float">
            <text:p>3802060033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59" calcext:value-type="float">
            <text:p>68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09" calcext:value-type="float">
            <text:p>3802060033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0" calcext:value-type="float">
            <text:p>68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0" calcext:value-type="float">
            <text:p>3802060033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1" calcext:value-type="float">
            <text:p>68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1" calcext:value-type="float">
            <text:p>3802060033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2" calcext:value-type="float">
            <text:p>68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2" calcext:value-type="float">
            <text:p>3802060033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3" calcext:value-type="float">
            <text:p>68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3" calcext:value-type="float">
            <text:p>3802060033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4" calcext:value-type="float">
            <text:p>68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4" calcext:value-type="float">
            <text:p>3802060033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5" calcext:value-type="float">
            <text:p>68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5" calcext:value-type="float">
            <text:p>3802060033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6" calcext:value-type="float">
            <text:p>68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6" calcext:value-type="float">
            <text:p>3802060033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7" calcext:value-type="float">
            <text:p>68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7" calcext:value-type="float">
            <text:p>3802060033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8" calcext:value-type="float">
            <text:p>68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8" calcext:value-type="float">
            <text:p>3802060033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69" calcext:value-type="float">
            <text:p>68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19" calcext:value-type="float">
            <text:p>3802060033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0" calcext:value-type="float">
            <text:p>68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0" calcext:value-type="float">
            <text:p>3802060033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1" calcext:value-type="float">
            <text:p>68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1" calcext:value-type="float">
            <text:p>3802060033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2" calcext:value-type="float">
            <text:p>68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2" calcext:value-type="float">
            <text:p>3802060033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3" calcext:value-type="float">
            <text:p>68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3" calcext:value-type="float">
            <text:p>3802060033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4" calcext:value-type="float">
            <text:p>68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4" calcext:value-type="float">
            <text:p>3802060033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5" calcext:value-type="float">
            <text:p>68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5" calcext:value-type="float">
            <text:p>3802060033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6" calcext:value-type="float">
            <text:p>68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6" calcext:value-type="float">
            <text:p>3802060033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7" calcext:value-type="float">
            <text:p>68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7" calcext:value-type="float">
            <text:p>3802060033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8" calcext:value-type="float">
            <text:p>68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8" calcext:value-type="float">
            <text:p>3802060033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79" calcext:value-type="float">
            <text:p>68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29" calcext:value-type="float">
            <text:p>3802060033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0" calcext:value-type="float">
            <text:p>68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0" calcext:value-type="float">
            <text:p>3802060033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1" calcext:value-type="float">
            <text:p>68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1" calcext:value-type="float">
            <text:p>3802060033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2" calcext:value-type="float">
            <text:p>68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2" calcext:value-type="float">
            <text:p>3802060033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3" calcext:value-type="float">
            <text:p>68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3" calcext:value-type="float">
            <text:p>3802060033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4" calcext:value-type="float">
            <text:p>68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4" calcext:value-type="float">
            <text:p>3802060033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5" calcext:value-type="float">
            <text:p>68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5" calcext:value-type="float">
            <text:p>3802060033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6" calcext:value-type="float">
            <text:p>68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6" calcext:value-type="float">
            <text:p>3802060033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7" calcext:value-type="float">
            <text:p>68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7" calcext:value-type="float">
            <text:p>3802060033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8" calcext:value-type="float">
            <text:p>68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8" calcext:value-type="float">
            <text:p>3802060033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89" calcext:value-type="float">
            <text:p>68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39" calcext:value-type="float">
            <text:p>3802060033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0" calcext:value-type="float">
            <text:p>68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6003301040" calcext:value-type="float">
            <text:p>3802060033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1" calcext:value-type="float">
            <text:p>68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1" calcext:value-type="float">
            <text:p>3802070034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2" calcext:value-type="float">
            <text:p>68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2" calcext:value-type="float">
            <text:p>3802070034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3" calcext:value-type="float">
            <text:p>68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3" calcext:value-type="float">
            <text:p>3802070034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4" calcext:value-type="float">
            <text:p>68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4" calcext:value-type="float">
            <text:p>3802070034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5" calcext:value-type="float">
            <text:p>68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5" calcext:value-type="float">
            <text:p>3802070034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6" calcext:value-type="float">
            <text:p>68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6" calcext:value-type="float">
            <text:p>3802070034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7" calcext:value-type="float">
            <text:p>68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7" calcext:value-type="float">
            <text:p>3802070034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8" calcext:value-type="float">
            <text:p>68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8" calcext:value-type="float">
            <text:p>3802070034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899" calcext:value-type="float">
            <text:p>68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09" calcext:value-type="float">
            <text:p>3802070034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0" calcext:value-type="float">
            <text:p>69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0" calcext:value-type="float">
            <text:p>3802070034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1" calcext:value-type="float">
            <text:p>69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1" calcext:value-type="float">
            <text:p>3802070034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2" calcext:value-type="float">
            <text:p>69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2" calcext:value-type="float">
            <text:p>3802070034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3" calcext:value-type="float">
            <text:p>69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3" calcext:value-type="float">
            <text:p>3802070034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4" calcext:value-type="float">
            <text:p>69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4" calcext:value-type="float">
            <text:p>3802070034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5" calcext:value-type="float">
            <text:p>69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5" calcext:value-type="float">
            <text:p>3802070034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6" calcext:value-type="float">
            <text:p>69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6" calcext:value-type="float">
            <text:p>3802070034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7" calcext:value-type="float">
            <text:p>69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7" calcext:value-type="float">
            <text:p>3802070034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8" calcext:value-type="float">
            <text:p>69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8" calcext:value-type="float">
            <text:p>3802070034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09" calcext:value-type="float">
            <text:p>69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19" calcext:value-type="float">
            <text:p>3802070034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0" calcext:value-type="float">
            <text:p>69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0" calcext:value-type="float">
            <text:p>3802070034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1" calcext:value-type="float">
            <text:p>69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1" calcext:value-type="float">
            <text:p>3802070034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2" calcext:value-type="float">
            <text:p>69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2" calcext:value-type="float">
            <text:p>3802070034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3" calcext:value-type="float">
            <text:p>69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3" calcext:value-type="float">
            <text:p>3802070034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4" calcext:value-type="float">
            <text:p>69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4" calcext:value-type="float">
            <text:p>3802070034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5" calcext:value-type="float">
            <text:p>69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5" calcext:value-type="float">
            <text:p>3802070034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6" calcext:value-type="float">
            <text:p>69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6" calcext:value-type="float">
            <text:p>3802070034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7" calcext:value-type="float">
            <text:p>69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7" calcext:value-type="float">
            <text:p>3802070034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8" calcext:value-type="float">
            <text:p>69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8" calcext:value-type="float">
            <text:p>3802070034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19" calcext:value-type="float">
            <text:p>69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29" calcext:value-type="float">
            <text:p>3802070034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0" calcext:value-type="float">
            <text:p>69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0" calcext:value-type="float">
            <text:p>3802070034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1" calcext:value-type="float">
            <text:p>69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1" calcext:value-type="float">
            <text:p>3802070034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2" calcext:value-type="float">
            <text:p>69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2" calcext:value-type="float">
            <text:p>3802070034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3" calcext:value-type="float">
            <text:p>69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3" calcext:value-type="float">
            <text:p>3802070034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4" calcext:value-type="float">
            <text:p>69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4" calcext:value-type="float">
            <text:p>3802070034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5" calcext:value-type="float">
            <text:p>69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5" calcext:value-type="float">
            <text:p>3802070034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6" calcext:value-type="float">
            <text:p>69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6" calcext:value-type="float">
            <text:p>3802070034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7" calcext:value-type="float">
            <text:p>69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7" calcext:value-type="float">
            <text:p>3802070034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8" calcext:value-type="float">
            <text:p>69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8" calcext:value-type="float">
            <text:p>3802070034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29" calcext:value-type="float">
            <text:p>69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39" calcext:value-type="float">
            <text:p>3802070034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0" calcext:value-type="float">
            <text:p>69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0" calcext:value-type="float">
            <text:p>3802070034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1" calcext:value-type="float">
            <text:p>69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1" calcext:value-type="float">
            <text:p>3802070034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2" calcext:value-type="float">
            <text:p>69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2" calcext:value-type="float">
            <text:p>3802070034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3" calcext:value-type="float">
            <text:p>69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3" calcext:value-type="float">
            <text:p>3802070034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4" calcext:value-type="float">
            <text:p>69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4" calcext:value-type="float">
            <text:p>3802070034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5" calcext:value-type="float">
            <text:p>69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5" calcext:value-type="float">
            <text:p>3802070034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6" calcext:value-type="float">
            <text:p>69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6" calcext:value-type="float">
            <text:p>3802070034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7" calcext:value-type="float">
            <text:p>69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7" calcext:value-type="float">
            <text:p>3802070034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8" calcext:value-type="float">
            <text:p>69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8" calcext:value-type="float">
            <text:p>3802070034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39" calcext:value-type="float">
            <text:p>69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49" calcext:value-type="float">
            <text:p>3802070034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0" calcext:value-type="float">
            <text:p>69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50" calcext:value-type="float">
            <text:p>3802070034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1" calcext:value-type="float">
            <text:p>69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51" calcext:value-type="float">
            <text:p>3802070034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2" calcext:value-type="float">
            <text:p>69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52" calcext:value-type="float">
            <text:p>3802070034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3" calcext:value-type="float">
            <text:p>69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401053" calcext:value-type="float">
            <text:p>3802070034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4" calcext:value-type="float">
            <text:p>69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1" calcext:value-type="float">
            <text:p>3802070035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5" calcext:value-type="float">
            <text:p>69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2" calcext:value-type="float">
            <text:p>3802070035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6" calcext:value-type="float">
            <text:p>69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3" calcext:value-type="float">
            <text:p>3802070035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7" calcext:value-type="float">
            <text:p>69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4" calcext:value-type="float">
            <text:p>3802070035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8" calcext:value-type="float">
            <text:p>69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5" calcext:value-type="float">
            <text:p>3802070035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49" calcext:value-type="float">
            <text:p>69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6" calcext:value-type="float">
            <text:p>3802070035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0" calcext:value-type="float">
            <text:p>69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7" calcext:value-type="float">
            <text:p>3802070035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1" calcext:value-type="float">
            <text:p>69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8" calcext:value-type="float">
            <text:p>3802070035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2" calcext:value-type="float">
            <text:p>69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09" calcext:value-type="float">
            <text:p>380207003501009</text:p>
          </table:table-cell>
          <table:table-cell table:style-name="TL_20_Metadata" office:value-type="string" calcext:value-type="string">
            <text:p>3802070035010091 <text:s/>Hieronder twee welke worden opgeleid tot leeraren bij de christelijke afgescheidene gemeent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3" calcext:value-type="float">
            <text:p>69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0" calcext:value-type="float">
            <text:p>3802070035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4" calcext:value-type="float">
            <text:p>69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1" calcext:value-type="float">
            <text:p>3802070035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5" calcext:value-type="float">
            <text:p>69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2" calcext:value-type="float">
            <text:p>3802070035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6" calcext:value-type="float">
            <text:p>69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3" calcext:value-type="float">
            <text:p>3802070035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7" calcext:value-type="float">
            <text:p>69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4" calcext:value-type="float">
            <text:p>3802070035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8" calcext:value-type="float">
            <text:p>69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5" calcext:value-type="float">
            <text:p>3802070035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59" calcext:value-type="float">
            <text:p>69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6" calcext:value-type="float">
            <text:p>3802070035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0" calcext:value-type="float">
            <text:p>69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7" calcext:value-type="float">
            <text:p>3802070035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1" calcext:value-type="float">
            <text:p>69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8" calcext:value-type="float">
            <text:p>3802070035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2" calcext:value-type="float">
            <text:p>69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19" calcext:value-type="float">
            <text:p>3802070035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3" calcext:value-type="float">
            <text:p>69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0" calcext:value-type="float">
            <text:p>3802070035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4" calcext:value-type="float">
            <text:p>69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1" calcext:value-type="float">
            <text:p>3802070035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5" calcext:value-type="float">
            <text:p>69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2" calcext:value-type="float">
            <text:p>3802070035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6" calcext:value-type="float">
            <text:p>69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3" calcext:value-type="float">
            <text:p>3802070035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7" calcext:value-type="float">
            <text:p>69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4" calcext:value-type="float">
            <text:p>3802070035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8" calcext:value-type="float">
            <text:p>69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5" calcext:value-type="float">
            <text:p>3802070035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69" calcext:value-type="float">
            <text:p>69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6" calcext:value-type="float">
            <text:p>3802070035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0" calcext:value-type="float">
            <text:p>69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7" calcext:value-type="float">
            <text:p>3802070035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1" calcext:value-type="float">
            <text:p>69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8" calcext:value-type="float">
            <text:p>3802070035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2" calcext:value-type="float">
            <text:p>69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29" calcext:value-type="float">
            <text:p>3802070035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3" calcext:value-type="float">
            <text:p>69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0" calcext:value-type="float">
            <text:p>3802070035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4" calcext:value-type="float">
            <text:p>69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1" calcext:value-type="float">
            <text:p>3802070035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5" calcext:value-type="float">
            <text:p>69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2" calcext:value-type="float">
            <text:p>3802070035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6" calcext:value-type="float">
            <text:p>69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3" calcext:value-type="float">
            <text:p>3802070035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7" calcext:value-type="float">
            <text:p>69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4" calcext:value-type="float">
            <text:p>3802070035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8" calcext:value-type="float">
            <text:p>69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5" calcext:value-type="float">
            <text:p>3802070035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79" calcext:value-type="float">
            <text:p>69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6" calcext:value-type="float">
            <text:p>3802070035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0" calcext:value-type="float">
            <text:p>69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7" calcext:value-type="float">
            <text:p>3802070035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1" calcext:value-type="float">
            <text:p>69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8" calcext:value-type="float">
            <text:p>3802070035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2" calcext:value-type="float">
            <text:p>69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39" calcext:value-type="float">
            <text:p>3802070035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3" calcext:value-type="float">
            <text:p>69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0" calcext:value-type="float">
            <text:p>3802070035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4" calcext:value-type="float">
            <text:p>69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1" calcext:value-type="float">
            <text:p>3802070035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5" calcext:value-type="float">
            <text:p>69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2" calcext:value-type="float">
            <text:p>3802070035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6" calcext:value-type="float">
            <text:p>69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3" calcext:value-type="float">
            <text:p>3802070035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7" calcext:value-type="float">
            <text:p>69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4" calcext:value-type="float">
            <text:p>3802070035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8" calcext:value-type="float">
            <text:p>69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5" calcext:value-type="float">
            <text:p>3802070035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89" calcext:value-type="float">
            <text:p>69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6" calcext:value-type="float">
            <text:p>3802070035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0" calcext:value-type="float">
            <text:p>69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7" calcext:value-type="float">
            <text:p>3802070035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1" calcext:value-type="float">
            <text:p>69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8" calcext:value-type="float">
            <text:p>3802070035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2" calcext:value-type="float">
            <text:p>69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49" calcext:value-type="float">
            <text:p>3802070035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3" calcext:value-type="float">
            <text:p>69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50" calcext:value-type="float">
            <text:p>3802070035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4" calcext:value-type="float">
            <text:p>69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7003501051" calcext:value-type="float">
            <text:p>3802070035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5" calcext:value-type="float">
            <text:p>69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1" calcext:value-type="float">
            <text:p>3802080036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6" calcext:value-type="float">
            <text:p>69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2" calcext:value-type="float">
            <text:p>3802080036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7" calcext:value-type="float">
            <text:p>69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3" calcext:value-type="float">
            <text:p>3802080036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8" calcext:value-type="float">
            <text:p>69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4" calcext:value-type="float">
            <text:p>3802080036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6999" calcext:value-type="float">
            <text:p>69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5" calcext:value-type="float">
            <text:p>3802080036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0" calcext:value-type="float">
            <text:p>70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6" calcext:value-type="float">
            <text:p>380208003601006</text:p>
          </table:table-cell>
          <table:table-cell table:style-name="TL_20_Metadata" office:value-type="string" calcext:value-type="string">
            <text:p>3802080036010061 <text:s/>Hieronder een, waarvan de ouderdom onbekend is.</text:p>
          </table:table-cell>
          <table:table-cell table:style-name="ce7" office:value-type="string" calcext:value-type="string">
            <text:p>3802080036010062 <text:s/>Hieronder eene, waarvan de ouderdom onbekend is.</text:p>
          </table:table-cell>
          <table:table-cell table:number-columns-repeated="1019"/>
        </table:table-row>
        <table:table-row table:style-name="ro5">
          <table:table-cell table:style-name="ce74" office:value-type="float" office:value="7001" calcext:value-type="float">
            <text:p>70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7" calcext:value-type="float">
            <text:p>380208003601007</text:p>
          </table:table-cell>
          <table:table-cell table:style-name="TL_20_Metadata" office:value-type="string" calcext:value-type="string">
            <text:p>3802080036010073 <text:s/>Hieronder twee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2" calcext:value-type="float">
            <text:p>70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8" calcext:value-type="float">
            <text:p>3802080036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3" calcext:value-type="float">
            <text:p>70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09" calcext:value-type="float">
            <text:p>3802080036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4" calcext:value-type="float">
            <text:p>70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0" calcext:value-type="float">
            <text:p>3802080036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5" calcext:value-type="float">
            <text:p>70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1" calcext:value-type="float">
            <text:p>3802080036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6" calcext:value-type="float">
            <text:p>70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2" calcext:value-type="float">
            <text:p>3802080036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7" calcext:value-type="float">
            <text:p>70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3" calcext:value-type="float">
            <text:p>3802080036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8" calcext:value-type="float">
            <text:p>70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4" calcext:value-type="float">
            <text:p>3802080036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09" calcext:value-type="float">
            <text:p>70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5" calcext:value-type="float">
            <text:p>3802080036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0" calcext:value-type="float">
            <text:p>70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6" calcext:value-type="float">
            <text:p>3802080036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1" calcext:value-type="float">
            <text:p>70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7" calcext:value-type="float">
            <text:p>3802080036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2" calcext:value-type="float">
            <text:p>70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8" calcext:value-type="float">
            <text:p>3802080036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3" calcext:value-type="float">
            <text:p>70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19" calcext:value-type="float">
            <text:p>3802080036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4" calcext:value-type="float">
            <text:p>70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0" calcext:value-type="float">
            <text:p>3802080036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5" calcext:value-type="float">
            <text:p>70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1" calcext:value-type="float">
            <text:p>3802080036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6" calcext:value-type="float">
            <text:p>70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2" calcext:value-type="float">
            <text:p>3802080036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7" calcext:value-type="float">
            <text:p>70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3" calcext:value-type="float">
            <text:p>3802080036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8" calcext:value-type="float">
            <text:p>70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4" calcext:value-type="float">
            <text:p>3802080036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19" calcext:value-type="float">
            <text:p>70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5" calcext:value-type="float">
            <text:p>3802080036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0" calcext:value-type="float">
            <text:p>70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6" calcext:value-type="float">
            <text:p>3802080036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1" calcext:value-type="float">
            <text:p>70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7" calcext:value-type="float">
            <text:p>3802080036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2" calcext:value-type="float">
            <text:p>70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8" calcext:value-type="float">
            <text:p>3802080036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3" calcext:value-type="float">
            <text:p>70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29" calcext:value-type="float">
            <text:p>3802080036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4" calcext:value-type="float">
            <text:p>70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0" calcext:value-type="float">
            <text:p>3802080036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5" calcext:value-type="float">
            <text:p>70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1" calcext:value-type="float">
            <text:p>3802080036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6" calcext:value-type="float">
            <text:p>70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2" calcext:value-type="float">
            <text:p>3802080036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7" calcext:value-type="float">
            <text:p>70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3" calcext:value-type="float">
            <text:p>3802080036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8" calcext:value-type="float">
            <text:p>70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4" calcext:value-type="float">
            <text:p>3802080036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29" calcext:value-type="float">
            <text:p>70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5" calcext:value-type="float">
            <text:p>3802080036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0" calcext:value-type="float">
            <text:p>70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6" calcext:value-type="float">
            <text:p>3802080036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1" calcext:value-type="float">
            <text:p>70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7" calcext:value-type="float">
            <text:p>3802080036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2" calcext:value-type="float">
            <text:p>70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8" calcext:value-type="float">
            <text:p>3802080036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3" calcext:value-type="float">
            <text:p>70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39" calcext:value-type="float">
            <text:p>3802080036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4" calcext:value-type="float">
            <text:p>70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0" calcext:value-type="float">
            <text:p>3802080036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5" calcext:value-type="float">
            <text:p>70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1" calcext:value-type="float">
            <text:p>3802080036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6" calcext:value-type="float">
            <text:p>70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2" calcext:value-type="float">
            <text:p>3802080036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7" calcext:value-type="float">
            <text:p>70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3" calcext:value-type="float">
            <text:p>3802080036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8" calcext:value-type="float">
            <text:p>70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4" calcext:value-type="float">
            <text:p>3802080036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39" calcext:value-type="float">
            <text:p>70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5" calcext:value-type="float">
            <text:p>3802080036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0" calcext:value-type="float">
            <text:p>70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6" calcext:value-type="float">
            <text:p>3802080036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1" calcext:value-type="float">
            <text:p>70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7" calcext:value-type="float">
            <text:p>3802080036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2" calcext:value-type="float">
            <text:p>70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8" calcext:value-type="float">
            <text:p>3802080036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3" calcext:value-type="float">
            <text:p>70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49" calcext:value-type="float">
            <text:p>3802080036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4" calcext:value-type="float">
            <text:p>70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50" calcext:value-type="float">
            <text:p>3802080036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5" calcext:value-type="float">
            <text:p>70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51" calcext:value-type="float">
            <text:p>3802080036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6" calcext:value-type="float">
            <text:p>70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52" calcext:value-type="float">
            <text:p>3802080036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7" calcext:value-type="float">
            <text:p>70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601053" calcext:value-type="float">
            <text:p>3802080036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8" calcext:value-type="float">
            <text:p>70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1" calcext:value-type="float">
            <text:p>380208003701001</text:p>
          </table:table-cell>
          <table:table-cell table:style-name="TL_20_Metadata" office:value-type="string" calcext:value-type="string">
            <text:p>380208003701001* <text:s/>Hieronder begrepen de fabrijkanten van katoen, hennip, vlas, wol en zijd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49" calcext:value-type="float">
            <text:p>70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2" calcext:value-type="float">
            <text:p>3802080037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0" calcext:value-type="float">
            <text:p>70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3" calcext:value-type="float">
            <text:p>3802080037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1" calcext:value-type="float">
            <text:p>70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4" calcext:value-type="float">
            <text:p>3802080037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2" calcext:value-type="float">
            <text:p>70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5" calcext:value-type="float">
            <text:p>3802080037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3" calcext:value-type="float">
            <text:p>70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6" calcext:value-type="float">
            <text:p>3802080037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4" calcext:value-type="float">
            <text:p>70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7" calcext:value-type="float">
            <text:p>3802080037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5" calcext:value-type="float">
            <text:p>70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8" calcext:value-type="float">
            <text:p>3802080037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6" calcext:value-type="float">
            <text:p>70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09" calcext:value-type="float">
            <text:p>3802080037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7" calcext:value-type="float">
            <text:p>70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0" calcext:value-type="float">
            <text:p>3802080037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8" calcext:value-type="float">
            <text:p>70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1" calcext:value-type="float">
            <text:p>3802080037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59" calcext:value-type="float">
            <text:p>70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2" calcext:value-type="float">
            <text:p>3802080037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0" calcext:value-type="float">
            <text:p>70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3" calcext:value-type="float">
            <text:p>3802080037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1" calcext:value-type="float">
            <text:p>70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4" calcext:value-type="float">
            <text:p>3802080037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2" calcext:value-type="float">
            <text:p>70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5" calcext:value-type="float">
            <text:p>3802080037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3" calcext:value-type="float">
            <text:p>70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6" calcext:value-type="float">
            <text:p>3802080037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4" calcext:value-type="float">
            <text:p>70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7" calcext:value-type="float">
            <text:p>3802080037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5" calcext:value-type="float">
            <text:p>70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8" calcext:value-type="float">
            <text:p>3802080037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6" calcext:value-type="float">
            <text:p>70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19" calcext:value-type="float">
            <text:p>3802080037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7" calcext:value-type="float">
            <text:p>70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0" calcext:value-type="float">
            <text:p>3802080037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8" calcext:value-type="float">
            <text:p>70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1" calcext:value-type="float">
            <text:p>3802080037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69" calcext:value-type="float">
            <text:p>70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2" calcext:value-type="float">
            <text:p>3802080037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0" calcext:value-type="float">
            <text:p>70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3" calcext:value-type="float">
            <text:p>3802080037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1" calcext:value-type="float">
            <text:p>70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4" calcext:value-type="float">
            <text:p>380208003701024</text:p>
          </table:table-cell>
          <table:table-cell table:style-name="TL_20_Metadata" office:value-type="string" calcext:value-type="string">
            <text:p>3802080037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2" calcext:value-type="float">
            <text:p>70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5" calcext:value-type="float">
            <text:p>3802080037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3" calcext:value-type="float">
            <text:p>70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6" calcext:value-type="float">
            <text:p>380208003701026</text:p>
          </table:table-cell>
          <table:table-cell table:style-name="TL_20_Metadata" office:value-type="string" calcext:value-type="string">
            <text:p>3802080037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4" calcext:value-type="float">
            <text:p>70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7" calcext:value-type="float">
            <text:p>3802080037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5" calcext:value-type="float">
            <text:p>70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8" calcext:value-type="float">
            <text:p>3802080037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6" calcext:value-type="float">
            <text:p>70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29" calcext:value-type="float">
            <text:p>3802080037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7" calcext:value-type="float">
            <text:p>70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0" calcext:value-type="float">
            <text:p>3802080037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8" calcext:value-type="float">
            <text:p>70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1" calcext:value-type="float">
            <text:p>3802080037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79" calcext:value-type="float">
            <text:p>70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2" calcext:value-type="float">
            <text:p>3802080037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0" calcext:value-type="float">
            <text:p>70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3" calcext:value-type="float">
            <text:p>3802080037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1" calcext:value-type="float">
            <text:p>70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4" calcext:value-type="float">
            <text:p>3802080037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2" calcext:value-type="float">
            <text:p>70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5" calcext:value-type="float">
            <text:p>3802080037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3" calcext:value-type="float">
            <text:p>70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6" calcext:value-type="float">
            <text:p>3802080037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4" calcext:value-type="float">
            <text:p>70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7" calcext:value-type="float">
            <text:p>3802080037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5" calcext:value-type="float">
            <text:p>70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8" calcext:value-type="float">
            <text:p>3802080037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6" calcext:value-type="float">
            <text:p>70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39" calcext:value-type="float">
            <text:p>3802080037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7" calcext:value-type="float">
            <text:p>70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0" calcext:value-type="float">
            <text:p>3802080037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8" calcext:value-type="float">
            <text:p>70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1" calcext:value-type="float">
            <text:p>3802080037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89" calcext:value-type="float">
            <text:p>70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2" calcext:value-type="float">
            <text:p>3802080037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0" calcext:value-type="float">
            <text:p>70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3" calcext:value-type="float">
            <text:p>3802080037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1" calcext:value-type="float">
            <text:p>70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4" calcext:value-type="float">
            <text:p>3802080037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2" calcext:value-type="float">
            <text:p>70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5" calcext:value-type="float">
            <text:p>3802080037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3" calcext:value-type="float">
            <text:p>70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6" calcext:value-type="float">
            <text:p>3802080037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4" calcext:value-type="float">
            <text:p>70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7" calcext:value-type="float">
            <text:p>3802080037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5" calcext:value-type="float">
            <text:p>70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8" calcext:value-type="float">
            <text:p>3802080037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6" calcext:value-type="float">
            <text:p>70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49" calcext:value-type="float">
            <text:p>3802080037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7" calcext:value-type="float">
            <text:p>70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8003701050" calcext:value-type="float">
            <text:p>3802080037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8" calcext:value-type="float">
            <text:p>70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1" calcext:value-type="float">
            <text:p>3802090038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099" calcext:value-type="float">
            <text:p>70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2" calcext:value-type="float">
            <text:p>3802090038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0" calcext:value-type="float">
            <text:p>71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3" calcext:value-type="float">
            <text:p>3802090038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1" calcext:value-type="float">
            <text:p>71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4" calcext:value-type="float">
            <text:p>3802090038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2" calcext:value-type="float">
            <text:p>71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5" calcext:value-type="float">
            <text:p>3802090038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3" calcext:value-type="float">
            <text:p>71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6" calcext:value-type="float">
            <text:p>3802090038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4" calcext:value-type="float">
            <text:p>71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7" calcext:value-type="float">
            <text:p>3802090038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5" calcext:value-type="float">
            <text:p>71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8" calcext:value-type="float">
            <text:p>3802090038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6" calcext:value-type="float">
            <text:p>71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09" calcext:value-type="float">
            <text:p>3802090038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7" calcext:value-type="float">
            <text:p>71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0" calcext:value-type="float">
            <text:p>3802090038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8" calcext:value-type="float">
            <text:p>71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1" calcext:value-type="float">
            <text:p>3802090038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09" calcext:value-type="float">
            <text:p>71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2" calcext:value-type="float">
            <text:p>3802090038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0" calcext:value-type="float">
            <text:p>71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3" calcext:value-type="float">
            <text:p>3802090038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1" calcext:value-type="float">
            <text:p>71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4" calcext:value-type="float">
            <text:p>3802090038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2" calcext:value-type="float">
            <text:p>71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5" calcext:value-type="float">
            <text:p>3802090038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3" calcext:value-type="float">
            <text:p>71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6" calcext:value-type="float">
            <text:p>3802090038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4" calcext:value-type="float">
            <text:p>71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7" calcext:value-type="float">
            <text:p>3802090038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5" calcext:value-type="float">
            <text:p>71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8" calcext:value-type="float">
            <text:p>3802090038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6" calcext:value-type="float">
            <text:p>71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19" calcext:value-type="float">
            <text:p>3802090038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7" calcext:value-type="float">
            <text:p>71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0" calcext:value-type="float">
            <text:p>3802090038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8" calcext:value-type="float">
            <text:p>71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1" calcext:value-type="float">
            <text:p>3802090038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19" calcext:value-type="float">
            <text:p>71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2" calcext:value-type="float">
            <text:p>3802090038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0" calcext:value-type="float">
            <text:p>71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3" calcext:value-type="float">
            <text:p>3802090038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1" calcext:value-type="float">
            <text:p>71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4" calcext:value-type="float">
            <text:p>3802090038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2" calcext:value-type="float">
            <text:p>71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5" calcext:value-type="float">
            <text:p>3802090038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3" calcext:value-type="float">
            <text:p>71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6" calcext:value-type="float">
            <text:p>3802090038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4" calcext:value-type="float">
            <text:p>71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7" calcext:value-type="float">
            <text:p>3802090038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5" calcext:value-type="float">
            <text:p>71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8" calcext:value-type="float">
            <text:p>3802090038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6" calcext:value-type="float">
            <text:p>71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29" calcext:value-type="float">
            <text:p>3802090038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7" calcext:value-type="float">
            <text:p>71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0" calcext:value-type="float">
            <text:p>3802090038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8" calcext:value-type="float">
            <text:p>71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1" calcext:value-type="float">
            <text:p>3802090038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29" calcext:value-type="float">
            <text:p>71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2" calcext:value-type="float">
            <text:p>3802090038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0" calcext:value-type="float">
            <text:p>71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3" calcext:value-type="float">
            <text:p>3802090038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1" calcext:value-type="float">
            <text:p>71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4" calcext:value-type="float">
            <text:p>3802090038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2" calcext:value-type="float">
            <text:p>71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5" calcext:value-type="float">
            <text:p>3802090038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3" calcext:value-type="float">
            <text:p>71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6" calcext:value-type="float">
            <text:p>3802090038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4" calcext:value-type="float">
            <text:p>71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7" calcext:value-type="float">
            <text:p>3802090038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5" calcext:value-type="float">
            <text:p>71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8" calcext:value-type="float">
            <text:p>3802090038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6" calcext:value-type="float">
            <text:p>71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39" calcext:value-type="float">
            <text:p>3802090038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7" calcext:value-type="float">
            <text:p>71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0" calcext:value-type="float">
            <text:p>3802090038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8" calcext:value-type="float">
            <text:p>71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1" calcext:value-type="float">
            <text:p>3802090038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39" calcext:value-type="float">
            <text:p>71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2" calcext:value-type="float">
            <text:p>3802090038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0" calcext:value-type="float">
            <text:p>71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3" calcext:value-type="float">
            <text:p>3802090038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1" calcext:value-type="float">
            <text:p>71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4" calcext:value-type="float">
            <text:p>3802090038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2" calcext:value-type="float">
            <text:p>71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5" calcext:value-type="float">
            <text:p>3802090038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3" calcext:value-type="float">
            <text:p>71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6" calcext:value-type="float">
            <text:p>3802090038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4" calcext:value-type="float">
            <text:p>71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7" calcext:value-type="float">
            <text:p>3802090038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5" calcext:value-type="float">
            <text:p>71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8" calcext:value-type="float">
            <text:p>3802090038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6" calcext:value-type="float">
            <text:p>71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49" calcext:value-type="float">
            <text:p>3802090038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7" calcext:value-type="float">
            <text:p>71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50" calcext:value-type="float">
            <text:p>3802090038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8" calcext:value-type="float">
            <text:p>71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51" calcext:value-type="float">
            <text:p>3802090038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49" calcext:value-type="float">
            <text:p>71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52" calcext:value-type="float">
            <text:p>3802090038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0" calcext:value-type="float">
            <text:p>71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801053" calcext:value-type="float">
            <text:p>3802090038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1" calcext:value-type="float">
            <text:p>71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1" calcext:value-type="float">
            <text:p>3802090039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2" calcext:value-type="float">
            <text:p>71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2" calcext:value-type="float">
            <text:p>3802090039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3" calcext:value-type="float">
            <text:p>71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3" calcext:value-type="float">
            <text:p>3802090039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4" calcext:value-type="float">
            <text:p>71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4" calcext:value-type="float">
            <text:p>3802090039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5" calcext:value-type="float">
            <text:p>71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5" calcext:value-type="float">
            <text:p>3802090039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6" calcext:value-type="float">
            <text:p>71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6" calcext:value-type="float">
            <text:p>3802090039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7" calcext:value-type="float">
            <text:p>71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7" calcext:value-type="float">
            <text:p>3802090039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8" calcext:value-type="float">
            <text:p>71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8" calcext:value-type="float">
            <text:p>3802090039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59" calcext:value-type="float">
            <text:p>71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09" calcext:value-type="float">
            <text:p>3802090039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0" calcext:value-type="float">
            <text:p>71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0" calcext:value-type="float">
            <text:p>3802090039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1" calcext:value-type="float">
            <text:p>71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1" calcext:value-type="float">
            <text:p>3802090039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2" calcext:value-type="float">
            <text:p>71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2" calcext:value-type="float">
            <text:p>3802090039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3" calcext:value-type="float">
            <text:p>71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3" calcext:value-type="float">
            <text:p>3802090039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4" calcext:value-type="float">
            <text:p>71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4" calcext:value-type="float">
            <text:p>3802090039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5" calcext:value-type="float">
            <text:p>71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5" calcext:value-type="float">
            <text:p>3802090039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6" calcext:value-type="float">
            <text:p>71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6" calcext:value-type="float">
            <text:p>3802090039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7" calcext:value-type="float">
            <text:p>71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7" calcext:value-type="float">
            <text:p>3802090039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8" calcext:value-type="float">
            <text:p>71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8" calcext:value-type="float">
            <text:p>3802090039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69" calcext:value-type="float">
            <text:p>71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19" calcext:value-type="float">
            <text:p>3802090039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0" calcext:value-type="float">
            <text:p>71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0" calcext:value-type="float">
            <text:p>3802090039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1" calcext:value-type="float">
            <text:p>71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1" calcext:value-type="float">
            <text:p>3802090039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2" calcext:value-type="float">
            <text:p>71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2" calcext:value-type="float">
            <text:p>3802090039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3" calcext:value-type="float">
            <text:p>71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3" calcext:value-type="float">
            <text:p>3802090039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4" calcext:value-type="float">
            <text:p>71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4" calcext:value-type="float">
            <text:p>3802090039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5" calcext:value-type="float">
            <text:p>71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5" calcext:value-type="float">
            <text:p>3802090039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6" calcext:value-type="float">
            <text:p>71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6" calcext:value-type="float">
            <text:p>3802090039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7" calcext:value-type="float">
            <text:p>71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7" calcext:value-type="float">
            <text:p>3802090039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8" calcext:value-type="float">
            <text:p>71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8" calcext:value-type="float">
            <text:p>3802090039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79" calcext:value-type="float">
            <text:p>71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29" calcext:value-type="float">
            <text:p>3802090039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0" calcext:value-type="float">
            <text:p>71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0" calcext:value-type="float">
            <text:p>3802090039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1" calcext:value-type="float">
            <text:p>71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1" calcext:value-type="float">
            <text:p>3802090039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2" calcext:value-type="float">
            <text:p>71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2" calcext:value-type="float">
            <text:p>3802090039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3" calcext:value-type="float">
            <text:p>71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3" calcext:value-type="float">
            <text:p>3802090039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4" calcext:value-type="float">
            <text:p>71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4" calcext:value-type="float">
            <text:p>3802090039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5" calcext:value-type="float">
            <text:p>71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5" calcext:value-type="float">
            <text:p>3802090039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6" calcext:value-type="float">
            <text:p>71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6" calcext:value-type="float">
            <text:p>3802090039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7" calcext:value-type="float">
            <text:p>71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7" calcext:value-type="float">
            <text:p>3802090039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8" calcext:value-type="float">
            <text:p>71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8" calcext:value-type="float">
            <text:p>380209003901038</text:p>
          </table:table-cell>
          <table:table-cell table:style-name="TL_20_Metadata" office:value-type="string" calcext:value-type="string">
            <text:p>3802090039010381 <text:s/>Hieronder een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89" calcext:value-type="float">
            <text:p>71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39" calcext:value-type="float">
            <text:p>3802090039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0" calcext:value-type="float">
            <text:p>71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09003901040" calcext:value-type="float">
            <text:p>3802090039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1" calcext:value-type="float">
            <text:p>71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1" calcext:value-type="float">
            <text:p>3802100040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2" calcext:value-type="float">
            <text:p>71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2" calcext:value-type="float">
            <text:p>3802100040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3" calcext:value-type="float">
            <text:p>71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3" calcext:value-type="float">
            <text:p>3802100040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4" calcext:value-type="float">
            <text:p>71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4" calcext:value-type="float">
            <text:p>3802100040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5" calcext:value-type="float">
            <text:p>71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5" calcext:value-type="float">
            <text:p>3802100040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6" calcext:value-type="float">
            <text:p>71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6" calcext:value-type="float">
            <text:p>3802100040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7" calcext:value-type="float">
            <text:p>71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7" calcext:value-type="float">
            <text:p>3802100040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8" calcext:value-type="float">
            <text:p>71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8" calcext:value-type="float">
            <text:p>3802100040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199" calcext:value-type="float">
            <text:p>71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09" calcext:value-type="float">
            <text:p>3802100040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0" calcext:value-type="float">
            <text:p>72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0" calcext:value-type="float">
            <text:p>3802100040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1" calcext:value-type="float">
            <text:p>72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1" calcext:value-type="float">
            <text:p>3802100040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2" calcext:value-type="float">
            <text:p>72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2" calcext:value-type="float">
            <text:p>3802100040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3" calcext:value-type="float">
            <text:p>72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3" calcext:value-type="float">
            <text:p>3802100040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4" calcext:value-type="float">
            <text:p>72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4" calcext:value-type="float">
            <text:p>3802100040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5" calcext:value-type="float">
            <text:p>72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5" calcext:value-type="float">
            <text:p>3802100040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6" calcext:value-type="float">
            <text:p>72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6" calcext:value-type="float">
            <text:p>3802100040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7" calcext:value-type="float">
            <text:p>72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7" calcext:value-type="float">
            <text:p>3802100040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8" calcext:value-type="float">
            <text:p>72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8" calcext:value-type="float">
            <text:p>3802100040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09" calcext:value-type="float">
            <text:p>72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19" calcext:value-type="float">
            <text:p>3802100040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0" calcext:value-type="float">
            <text:p>72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0" calcext:value-type="float">
            <text:p>3802100040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1" calcext:value-type="float">
            <text:p>72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1" calcext:value-type="float">
            <text:p>3802100040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2" calcext:value-type="float">
            <text:p>72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2" calcext:value-type="float">
            <text:p>3802100040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3" calcext:value-type="float">
            <text:p>72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3" calcext:value-type="float">
            <text:p>3802100040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4" calcext:value-type="float">
            <text:p>72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4" calcext:value-type="float">
            <text:p>3802100040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5" calcext:value-type="float">
            <text:p>72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5" calcext:value-type="float">
            <text:p>3802100040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6" calcext:value-type="float">
            <text:p>72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6" calcext:value-type="float">
            <text:p>3802100040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7" calcext:value-type="float">
            <text:p>72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7" calcext:value-type="float">
            <text:p>3802100040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8" calcext:value-type="float">
            <text:p>72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8" calcext:value-type="float">
            <text:p>3802100040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19" calcext:value-type="float">
            <text:p>72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29" calcext:value-type="float">
            <text:p>3802100040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0" calcext:value-type="float">
            <text:p>72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0" calcext:value-type="float">
            <text:p>3802100040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1" calcext:value-type="float">
            <text:p>72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1" calcext:value-type="float">
            <text:p>3802100040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2" calcext:value-type="float">
            <text:p>72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2" calcext:value-type="float">
            <text:p>3802100040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3" calcext:value-type="float">
            <text:p>72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3" calcext:value-type="float">
            <text:p>3802100040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4" calcext:value-type="float">
            <text:p>72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4" calcext:value-type="float">
            <text:p>3802100040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5" calcext:value-type="float">
            <text:p>72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5" calcext:value-type="float">
            <text:p>3802100040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6" calcext:value-type="float">
            <text:p>72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6" calcext:value-type="float">
            <text:p>3802100040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7" calcext:value-type="float">
            <text:p>72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7" calcext:value-type="float">
            <text:p>3802100040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8" calcext:value-type="float">
            <text:p>72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8" calcext:value-type="float">
            <text:p>3802100040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29" calcext:value-type="float">
            <text:p>72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39" calcext:value-type="float">
            <text:p>3802100040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0" calcext:value-type="float">
            <text:p>72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0" calcext:value-type="float">
            <text:p>3802100040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1" calcext:value-type="float">
            <text:p>72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1" calcext:value-type="float">
            <text:p>3802100040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2" calcext:value-type="float">
            <text:p>72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2" calcext:value-type="float">
            <text:p>3802100040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3" calcext:value-type="float">
            <text:p>72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3" calcext:value-type="float">
            <text:p>3802100040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4" calcext:value-type="float">
            <text:p>72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4" calcext:value-type="float">
            <text:p>3802100040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5" calcext:value-type="float">
            <text:p>72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5" calcext:value-type="float">
            <text:p>3802100040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6" calcext:value-type="float">
            <text:p>72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6" calcext:value-type="float">
            <text:p>3802100040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7" calcext:value-type="float">
            <text:p>72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7" calcext:value-type="float">
            <text:p>3802100040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8" calcext:value-type="float">
            <text:p>72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8" calcext:value-type="float">
            <text:p>3802100040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39" calcext:value-type="float">
            <text:p>72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49" calcext:value-type="float">
            <text:p>3802100040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0" calcext:value-type="float">
            <text:p>72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50" calcext:value-type="float">
            <text:p>3802100040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1" calcext:value-type="float">
            <text:p>72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51" calcext:value-type="float">
            <text:p>3802100040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2" calcext:value-type="float">
            <text:p>72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52" calcext:value-type="float">
            <text:p>3802100040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3" calcext:value-type="float">
            <text:p>72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001053" calcext:value-type="float">
            <text:p>3802100040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4" calcext:value-type="float">
            <text:p>72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1" calcext:value-type="float">
            <text:p>3802100041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5" calcext:value-type="float">
            <text:p>72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2" calcext:value-type="float">
            <text:p>3802100041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6" calcext:value-type="float">
            <text:p>72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3" calcext:value-type="float">
            <text:p>3802100041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7" calcext:value-type="float">
            <text:p>72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4" calcext:value-type="float">
            <text:p>3802100041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8" calcext:value-type="float">
            <text:p>72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5" calcext:value-type="float">
            <text:p>3802100041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49" calcext:value-type="float">
            <text:p>72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6" calcext:value-type="float">
            <text:p>3802100041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0" calcext:value-type="float">
            <text:p>72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7" calcext:value-type="float">
            <text:p>3802100041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1" calcext:value-type="float">
            <text:p>72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8" calcext:value-type="float">
            <text:p>3802100041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2" calcext:value-type="float">
            <text:p>72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09" calcext:value-type="float">
            <text:p>380210004101009</text:p>
          </table:table-cell>
          <table:table-cell table:style-name="TL_20_Metadata" office:value-type="string" calcext:value-type="string">
            <text:p>3802100041010091 <text:s/>Hieronder twee, welke worden opgeleid tot leeraren bij de christelijke afgescheidene gemeent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3" calcext:value-type="float">
            <text:p>72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0" calcext:value-type="float">
            <text:p>3802100041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4" calcext:value-type="float">
            <text:p>72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1" calcext:value-type="float">
            <text:p>3802100041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5" calcext:value-type="float">
            <text:p>72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2" calcext:value-type="float">
            <text:p>3802100041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6" calcext:value-type="float">
            <text:p>72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3" calcext:value-type="float">
            <text:p>3802100041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7" calcext:value-type="float">
            <text:p>72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4" calcext:value-type="float">
            <text:p>3802100041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8" calcext:value-type="float">
            <text:p>72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5" calcext:value-type="float">
            <text:p>3802100041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59" calcext:value-type="float">
            <text:p>72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6" calcext:value-type="float">
            <text:p>3802100041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0" calcext:value-type="float">
            <text:p>72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7" calcext:value-type="float">
            <text:p>3802100041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1" calcext:value-type="float">
            <text:p>72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8" calcext:value-type="float">
            <text:p>3802100041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2" calcext:value-type="float">
            <text:p>72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19" calcext:value-type="float">
            <text:p>3802100041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3" calcext:value-type="float">
            <text:p>72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0" calcext:value-type="float">
            <text:p>3802100041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4" calcext:value-type="float">
            <text:p>72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1" calcext:value-type="float">
            <text:p>3802100041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5" calcext:value-type="float">
            <text:p>72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2" calcext:value-type="float">
            <text:p>3802100041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6" calcext:value-type="float">
            <text:p>72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3" calcext:value-type="float">
            <text:p>3802100041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7" calcext:value-type="float">
            <text:p>72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4" calcext:value-type="float">
            <text:p>3802100041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8" calcext:value-type="float">
            <text:p>72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5" calcext:value-type="float">
            <text:p>3802100041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69" calcext:value-type="float">
            <text:p>72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6" calcext:value-type="float">
            <text:p>3802100041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0" calcext:value-type="float">
            <text:p>72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7" calcext:value-type="float">
            <text:p>3802100041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1" calcext:value-type="float">
            <text:p>72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8" calcext:value-type="float">
            <text:p>3802100041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2" calcext:value-type="float">
            <text:p>72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29" calcext:value-type="float">
            <text:p>3802100041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3" calcext:value-type="float">
            <text:p>72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0" calcext:value-type="float">
            <text:p>3802100041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4" calcext:value-type="float">
            <text:p>72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1" calcext:value-type="float">
            <text:p>3802100041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5" calcext:value-type="float">
            <text:p>72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2" calcext:value-type="float">
            <text:p>3802100041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6" calcext:value-type="float">
            <text:p>72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3" calcext:value-type="float">
            <text:p>3802100041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7" calcext:value-type="float">
            <text:p>72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4" calcext:value-type="float">
            <text:p>3802100041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8" calcext:value-type="float">
            <text:p>72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5" calcext:value-type="float">
            <text:p>3802100041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79" calcext:value-type="float">
            <text:p>72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6" calcext:value-type="float">
            <text:p>3802100041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0" calcext:value-type="float">
            <text:p>72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7" calcext:value-type="float">
            <text:p>3802100041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1" calcext:value-type="float">
            <text:p>72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8" calcext:value-type="float">
            <text:p>3802100041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2" calcext:value-type="float">
            <text:p>72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39" calcext:value-type="float">
            <text:p>3802100041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3" calcext:value-type="float">
            <text:p>72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0" calcext:value-type="float">
            <text:p>3802100041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4" calcext:value-type="float">
            <text:p>72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1" calcext:value-type="float">
            <text:p>3802100041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5" calcext:value-type="float">
            <text:p>72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2" calcext:value-type="float">
            <text:p>3802100041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6" calcext:value-type="float">
            <text:p>72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3" calcext:value-type="float">
            <text:p>3802100041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7" calcext:value-type="float">
            <text:p>72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4" calcext:value-type="float">
            <text:p>3802100041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8" calcext:value-type="float">
            <text:p>72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5" calcext:value-type="float">
            <text:p>3802100041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89" calcext:value-type="float">
            <text:p>72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6" calcext:value-type="float">
            <text:p>3802100041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0" calcext:value-type="float">
            <text:p>72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7" calcext:value-type="float">
            <text:p>3802100041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1" calcext:value-type="float">
            <text:p>72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8" calcext:value-type="float">
            <text:p>3802100041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2" calcext:value-type="float">
            <text:p>72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49" calcext:value-type="float">
            <text:p>3802100041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3" calcext:value-type="float">
            <text:p>72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50" calcext:value-type="float">
            <text:p>3802100041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4" calcext:value-type="float">
            <text:p>72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0004101051" calcext:value-type="float">
            <text:p>3802100041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5" calcext:value-type="float">
            <text:p>72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1" calcext:value-type="float">
            <text:p>3802110042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6" calcext:value-type="float">
            <text:p>72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2" calcext:value-type="float">
            <text:p>3802110042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7" calcext:value-type="float">
            <text:p>72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3" calcext:value-type="float">
            <text:p>3802110042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8" calcext:value-type="float">
            <text:p>72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4" calcext:value-type="float">
            <text:p>3802110042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299" calcext:value-type="float">
            <text:p>72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5" calcext:value-type="float">
            <text:p>3802110042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0" calcext:value-type="float">
            <text:p>73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6" calcext:value-type="float">
            <text:p>380211004201006</text:p>
          </table:table-cell>
          <table:table-cell table:style-name="TL_20_Metadata" office:value-type="string" calcext:value-type="string">
            <text:p>3802110042010061 <text:s/>Hieronder een, waarvan de ouderdom onbekend is.</text:p>
          </table:table-cell>
          <table:table-cell table:style-name="ce7" office:value-type="string" calcext:value-type="string">
            <text:p>3802110042010062 <text:s/>Hieronder eene, waarvan de ouderdom onbekend is.</text:p>
          </table:table-cell>
          <table:table-cell table:number-columns-repeated="1019"/>
        </table:table-row>
        <table:table-row table:style-name="ro5">
          <table:table-cell table:style-name="ce74" office:value-type="float" office:value="7301" calcext:value-type="float">
            <text:p>73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7" calcext:value-type="float">
            <text:p>380211004201007</text:p>
          </table:table-cell>
          <table:table-cell table:style-name="TL_20_Metadata" office:value-type="string" calcext:value-type="string">
            <text:p>3802110042010073 <text:s/>Hieronder twee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2" calcext:value-type="float">
            <text:p>73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8" calcext:value-type="float">
            <text:p>3802110042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3" calcext:value-type="float">
            <text:p>73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09" calcext:value-type="float">
            <text:p>3802110042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4" calcext:value-type="float">
            <text:p>73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0" calcext:value-type="float">
            <text:p>3802110042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5" calcext:value-type="float">
            <text:p>73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1" calcext:value-type="float">
            <text:p>3802110042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6" calcext:value-type="float">
            <text:p>73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2" calcext:value-type="float">
            <text:p>3802110042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7" calcext:value-type="float">
            <text:p>73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3" calcext:value-type="float">
            <text:p>3802110042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8" calcext:value-type="float">
            <text:p>73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4" calcext:value-type="float">
            <text:p>3802110042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09" calcext:value-type="float">
            <text:p>73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5" calcext:value-type="float">
            <text:p>3802110042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0" calcext:value-type="float">
            <text:p>73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6" calcext:value-type="float">
            <text:p>3802110042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1" calcext:value-type="float">
            <text:p>73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7" calcext:value-type="float">
            <text:p>3802110042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2" calcext:value-type="float">
            <text:p>73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8" calcext:value-type="float">
            <text:p>3802110042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3" calcext:value-type="float">
            <text:p>73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19" calcext:value-type="float">
            <text:p>3802110042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4" calcext:value-type="float">
            <text:p>73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0" calcext:value-type="float">
            <text:p>3802110042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5" calcext:value-type="float">
            <text:p>73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1" calcext:value-type="float">
            <text:p>3802110042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6" calcext:value-type="float">
            <text:p>73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2" calcext:value-type="float">
            <text:p>3802110042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7" calcext:value-type="float">
            <text:p>73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3" calcext:value-type="float">
            <text:p>3802110042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8" calcext:value-type="float">
            <text:p>73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4" calcext:value-type="float">
            <text:p>3802110042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19" calcext:value-type="float">
            <text:p>73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5" calcext:value-type="float">
            <text:p>3802110042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0" calcext:value-type="float">
            <text:p>73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6" calcext:value-type="float">
            <text:p>3802110042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1" calcext:value-type="float">
            <text:p>73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7" calcext:value-type="float">
            <text:p>3802110042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2" calcext:value-type="float">
            <text:p>73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8" calcext:value-type="float">
            <text:p>3802110042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3" calcext:value-type="float">
            <text:p>73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29" calcext:value-type="float">
            <text:p>3802110042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4" calcext:value-type="float">
            <text:p>73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0" calcext:value-type="float">
            <text:p>3802110042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5" calcext:value-type="float">
            <text:p>73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1" calcext:value-type="float">
            <text:p>3802110042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6" calcext:value-type="float">
            <text:p>73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2" calcext:value-type="float">
            <text:p>3802110042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7" calcext:value-type="float">
            <text:p>73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3" calcext:value-type="float">
            <text:p>3802110042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8" calcext:value-type="float">
            <text:p>73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4" calcext:value-type="float">
            <text:p>3802110042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29" calcext:value-type="float">
            <text:p>73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5" calcext:value-type="float">
            <text:p>3802110042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0" calcext:value-type="float">
            <text:p>73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6" calcext:value-type="float">
            <text:p>3802110042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1" calcext:value-type="float">
            <text:p>73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7" calcext:value-type="float">
            <text:p>3802110042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2" calcext:value-type="float">
            <text:p>73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8" calcext:value-type="float">
            <text:p>3802110042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3" calcext:value-type="float">
            <text:p>73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39" calcext:value-type="float">
            <text:p>3802110042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4" calcext:value-type="float">
            <text:p>73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0" calcext:value-type="float">
            <text:p>3802110042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5" calcext:value-type="float">
            <text:p>73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1" calcext:value-type="float">
            <text:p>3802110042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6" calcext:value-type="float">
            <text:p>73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2" calcext:value-type="float">
            <text:p>3802110042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7" calcext:value-type="float">
            <text:p>73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3" calcext:value-type="float">
            <text:p>3802110042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8" calcext:value-type="float">
            <text:p>73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4" calcext:value-type="float">
            <text:p>3802110042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39" calcext:value-type="float">
            <text:p>73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5" calcext:value-type="float">
            <text:p>3802110042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0" calcext:value-type="float">
            <text:p>73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6" calcext:value-type="float">
            <text:p>3802110042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1" calcext:value-type="float">
            <text:p>73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7" calcext:value-type="float">
            <text:p>3802110042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2" calcext:value-type="float">
            <text:p>73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8" calcext:value-type="float">
            <text:p>3802110042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3" calcext:value-type="float">
            <text:p>73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49" calcext:value-type="float">
            <text:p>3802110042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4" calcext:value-type="float">
            <text:p>73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50" calcext:value-type="float">
            <text:p>3802110042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5" calcext:value-type="float">
            <text:p>73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51" calcext:value-type="float">
            <text:p>3802110042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6" calcext:value-type="float">
            <text:p>73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52" calcext:value-type="float">
            <text:p>3802110042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7" calcext:value-type="float">
            <text:p>73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201053" calcext:value-type="float">
            <text:p>3802110042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8" calcext:value-type="float">
            <text:p>73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1" calcext:value-type="float">
            <text:p>3802110043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49" calcext:value-type="float">
            <text:p>73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2" calcext:value-type="float">
            <text:p>3802110043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0" calcext:value-type="float">
            <text:p>73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3" calcext:value-type="float">
            <text:p>3802110043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1" calcext:value-type="float">
            <text:p>73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4" calcext:value-type="float">
            <text:p>3802110043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2" calcext:value-type="float">
            <text:p>73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5" calcext:value-type="float">
            <text:p>3802110043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3" calcext:value-type="float">
            <text:p>73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6" calcext:value-type="float">
            <text:p>3802110043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4" calcext:value-type="float">
            <text:p>73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7" calcext:value-type="float">
            <text:p>3802110043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5" calcext:value-type="float">
            <text:p>73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8" calcext:value-type="float">
            <text:p>3802110043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6" calcext:value-type="float">
            <text:p>73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09" calcext:value-type="float">
            <text:p>3802110043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7" calcext:value-type="float">
            <text:p>73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0" calcext:value-type="float">
            <text:p>3802110043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8" calcext:value-type="float">
            <text:p>73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1" calcext:value-type="float">
            <text:p>3802110043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59" calcext:value-type="float">
            <text:p>73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2" calcext:value-type="float">
            <text:p>3802110043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0" calcext:value-type="float">
            <text:p>73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3" calcext:value-type="float">
            <text:p>3802110043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1" calcext:value-type="float">
            <text:p>73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4" calcext:value-type="float">
            <text:p>3802110043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2" calcext:value-type="float">
            <text:p>73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5" calcext:value-type="float">
            <text:p>3802110043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3" calcext:value-type="float">
            <text:p>73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6" calcext:value-type="float">
            <text:p>3802110043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4" calcext:value-type="float">
            <text:p>73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7" calcext:value-type="float">
            <text:p>3802110043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5" calcext:value-type="float">
            <text:p>73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8" calcext:value-type="float">
            <text:p>3802110043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6" calcext:value-type="float">
            <text:p>73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19" calcext:value-type="float">
            <text:p>3802110043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7" calcext:value-type="float">
            <text:p>73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0" calcext:value-type="float">
            <text:p>3802110043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8" calcext:value-type="float">
            <text:p>73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1" calcext:value-type="float">
            <text:p>3802110043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69" calcext:value-type="float">
            <text:p>73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2" calcext:value-type="float">
            <text:p>3802110043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0" calcext:value-type="float">
            <text:p>73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3" calcext:value-type="float">
            <text:p>3802110043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1" calcext:value-type="float">
            <text:p>73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4" calcext:value-type="float">
            <text:p>380211004301024</text:p>
          </table:table-cell>
          <table:table-cell table:style-name="TL_20_Metadata" office:value-type="string" calcext:value-type="string">
            <text:p>3802110043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2" calcext:value-type="float">
            <text:p>73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5" calcext:value-type="float">
            <text:p>3802110043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3" calcext:value-type="float">
            <text:p>73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6" calcext:value-type="float">
            <text:p>380211004301026</text:p>
          </table:table-cell>
          <table:table-cell table:style-name="TL_20_Metadata" office:value-type="string" calcext:value-type="string">
            <text:p>3802110043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4" calcext:value-type="float">
            <text:p>73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7" calcext:value-type="float">
            <text:p>3802110043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5" calcext:value-type="float">
            <text:p>73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8" calcext:value-type="float">
            <text:p>3802110043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6" calcext:value-type="float">
            <text:p>73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29" calcext:value-type="float">
            <text:p>3802110043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7" calcext:value-type="float">
            <text:p>73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0" calcext:value-type="float">
            <text:p>3802110043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8" calcext:value-type="float">
            <text:p>73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1" calcext:value-type="float">
            <text:p>3802110043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79" calcext:value-type="float">
            <text:p>73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2" calcext:value-type="float">
            <text:p>3802110043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0" calcext:value-type="float">
            <text:p>73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3" calcext:value-type="float">
            <text:p>3802110043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1" calcext:value-type="float">
            <text:p>73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4" calcext:value-type="float">
            <text:p>3802110043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2" calcext:value-type="float">
            <text:p>73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5" calcext:value-type="float">
            <text:p>3802110043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3" calcext:value-type="float">
            <text:p>73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6" calcext:value-type="float">
            <text:p>3802110043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4" calcext:value-type="float">
            <text:p>73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7" calcext:value-type="float">
            <text:p>3802110043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5" calcext:value-type="float">
            <text:p>73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8" calcext:value-type="float">
            <text:p>3802110043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6" calcext:value-type="float">
            <text:p>73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39" calcext:value-type="float">
            <text:p>3802110043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7" calcext:value-type="float">
            <text:p>73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0" calcext:value-type="float">
            <text:p>3802110043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8" calcext:value-type="float">
            <text:p>73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1" calcext:value-type="float">
            <text:p>3802110043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89" calcext:value-type="float">
            <text:p>73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2" calcext:value-type="float">
            <text:p>3802110043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0" calcext:value-type="float">
            <text:p>73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3" calcext:value-type="float">
            <text:p>3802110043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1" calcext:value-type="float">
            <text:p>739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4" calcext:value-type="float">
            <text:p>3802110043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2" calcext:value-type="float">
            <text:p>739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5" calcext:value-type="float">
            <text:p>3802110043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3" calcext:value-type="float">
            <text:p>739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6" calcext:value-type="float">
            <text:p>3802110043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4" calcext:value-type="float">
            <text:p>739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7" calcext:value-type="float">
            <text:p>3802110043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5" calcext:value-type="float">
            <text:p>739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8" calcext:value-type="float">
            <text:p>3802110043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6" calcext:value-type="float">
            <text:p>739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49" calcext:value-type="float">
            <text:p>3802110043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7" calcext:value-type="float">
            <text:p>739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1004301050" calcext:value-type="float">
            <text:p>3802110043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8" calcext:value-type="float">
            <text:p>739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1" calcext:value-type="float">
            <text:p>3802120044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399" calcext:value-type="float">
            <text:p>739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2" calcext:value-type="float">
            <text:p>3802120044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0" calcext:value-type="float">
            <text:p>740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3" calcext:value-type="float">
            <text:p>3802120044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1" calcext:value-type="float">
            <text:p>740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4" calcext:value-type="float">
            <text:p>3802120044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2" calcext:value-type="float">
            <text:p>740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5" calcext:value-type="float">
            <text:p>3802120044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3" calcext:value-type="float">
            <text:p>740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6" calcext:value-type="float">
            <text:p>3802120044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4" calcext:value-type="float">
            <text:p>740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7" calcext:value-type="float">
            <text:p>3802120044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5" calcext:value-type="float">
            <text:p>740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8" calcext:value-type="float">
            <text:p>3802120044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6" calcext:value-type="float">
            <text:p>740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09" calcext:value-type="float">
            <text:p>3802120044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7" calcext:value-type="float">
            <text:p>740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0" calcext:value-type="float">
            <text:p>3802120044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8" calcext:value-type="float">
            <text:p>740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1" calcext:value-type="float">
            <text:p>3802120044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09" calcext:value-type="float">
            <text:p>740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2" calcext:value-type="float">
            <text:p>3802120044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0" calcext:value-type="float">
            <text:p>741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3" calcext:value-type="float">
            <text:p>3802120044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1" calcext:value-type="float">
            <text:p>741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4" calcext:value-type="float">
            <text:p>3802120044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2" calcext:value-type="float">
            <text:p>741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5" calcext:value-type="float">
            <text:p>3802120044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3" calcext:value-type="float">
            <text:p>741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6" calcext:value-type="float">
            <text:p>3802120044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4" calcext:value-type="float">
            <text:p>741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7" calcext:value-type="float">
            <text:p>3802120044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5" calcext:value-type="float">
            <text:p>741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8" calcext:value-type="float">
            <text:p>3802120044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6" calcext:value-type="float">
            <text:p>741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19" calcext:value-type="float">
            <text:p>3802120044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7" calcext:value-type="float">
            <text:p>741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0" calcext:value-type="float">
            <text:p>3802120044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8" calcext:value-type="float">
            <text:p>741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1" calcext:value-type="float">
            <text:p>3802120044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19" calcext:value-type="float">
            <text:p>741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2" calcext:value-type="float">
            <text:p>3802120044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0" calcext:value-type="float">
            <text:p>742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3" calcext:value-type="float">
            <text:p>3802120044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1" calcext:value-type="float">
            <text:p>742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4" calcext:value-type="float">
            <text:p>3802120044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2" calcext:value-type="float">
            <text:p>742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5" calcext:value-type="float">
            <text:p>3802120044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3" calcext:value-type="float">
            <text:p>742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6" calcext:value-type="float">
            <text:p>3802120044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4" calcext:value-type="float">
            <text:p>742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7" calcext:value-type="float">
            <text:p>3802120044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5" calcext:value-type="float">
            <text:p>742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8" calcext:value-type="float">
            <text:p>3802120044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6" calcext:value-type="float">
            <text:p>742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29" calcext:value-type="float">
            <text:p>3802120044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7" calcext:value-type="float">
            <text:p>742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0" calcext:value-type="float">
            <text:p>3802120044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8" calcext:value-type="float">
            <text:p>742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1" calcext:value-type="float">
            <text:p>3802120044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29" calcext:value-type="float">
            <text:p>742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2" calcext:value-type="float">
            <text:p>3802120044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0" calcext:value-type="float">
            <text:p>743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3" calcext:value-type="float">
            <text:p>3802120044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1" calcext:value-type="float">
            <text:p>743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4" calcext:value-type="float">
            <text:p>3802120044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2" calcext:value-type="float">
            <text:p>743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5" calcext:value-type="float">
            <text:p>3802120044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3" calcext:value-type="float">
            <text:p>743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6" calcext:value-type="float">
            <text:p>3802120044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4" calcext:value-type="float">
            <text:p>743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7" calcext:value-type="float">
            <text:p>3802120044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5" calcext:value-type="float">
            <text:p>743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8" calcext:value-type="float">
            <text:p>38021200440103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6" calcext:value-type="float">
            <text:p>743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39" calcext:value-type="float">
            <text:p>3802120044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7" calcext:value-type="float">
            <text:p>743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0" calcext:value-type="float">
            <text:p>3802120044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8" calcext:value-type="float">
            <text:p>743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1" calcext:value-type="float">
            <text:p>38021200440104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39" calcext:value-type="float">
            <text:p>743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2" calcext:value-type="float">
            <text:p>38021200440104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0" calcext:value-type="float">
            <text:p>744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3" calcext:value-type="float">
            <text:p>38021200440104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1" calcext:value-type="float">
            <text:p>744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4" calcext:value-type="float">
            <text:p>38021200440104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2" calcext:value-type="float">
            <text:p>744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5" calcext:value-type="float">
            <text:p>38021200440104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3" calcext:value-type="float">
            <text:p>744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6" calcext:value-type="float">
            <text:p>38021200440104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4" calcext:value-type="float">
            <text:p>744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7" calcext:value-type="float">
            <text:p>38021200440104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5" calcext:value-type="float">
            <text:p>744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8" calcext:value-type="float">
            <text:p>38021200440104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6" calcext:value-type="float">
            <text:p>744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49" calcext:value-type="float">
            <text:p>38021200440104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7" calcext:value-type="float">
            <text:p>744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50" calcext:value-type="float">
            <text:p>38021200440105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8" calcext:value-type="float">
            <text:p>744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51" calcext:value-type="float">
            <text:p>38021200440105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49" calcext:value-type="float">
            <text:p>744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52" calcext:value-type="float">
            <text:p>38021200440105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0" calcext:value-type="float">
            <text:p>745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401053" calcext:value-type="float">
            <text:p>38021200440105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1" calcext:value-type="float">
            <text:p>745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1" calcext:value-type="float">
            <text:p>38021200450100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2" calcext:value-type="float">
            <text:p>745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2" calcext:value-type="float">
            <text:p>38021200450100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3" calcext:value-type="float">
            <text:p>745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3" calcext:value-type="float">
            <text:p>38021200450100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4" calcext:value-type="float">
            <text:p>745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4" calcext:value-type="float">
            <text:p>38021200450100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5" calcext:value-type="float">
            <text:p>745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5" calcext:value-type="float">
            <text:p>38021200450100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6" calcext:value-type="float">
            <text:p>745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6" calcext:value-type="float">
            <text:p>38021200450100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7" calcext:value-type="float">
            <text:p>745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7" calcext:value-type="float">
            <text:p>38021200450100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8" calcext:value-type="float">
            <text:p>745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8" calcext:value-type="float">
            <text:p>38021200450100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59" calcext:value-type="float">
            <text:p>745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09" calcext:value-type="float">
            <text:p>38021200450100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0" calcext:value-type="float">
            <text:p>746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0" calcext:value-type="float">
            <text:p>38021200450101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1" calcext:value-type="float">
            <text:p>746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1" calcext:value-type="float">
            <text:p>38021200450101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2" calcext:value-type="float">
            <text:p>746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2" calcext:value-type="float">
            <text:p>38021200450101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3" calcext:value-type="float">
            <text:p>746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3" calcext:value-type="float">
            <text:p>38021200450101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4" calcext:value-type="float">
            <text:p>746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4" calcext:value-type="float">
            <text:p>38021200450101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5" calcext:value-type="float">
            <text:p>746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5" calcext:value-type="float">
            <text:p>38021200450101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6" calcext:value-type="float">
            <text:p>746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6" calcext:value-type="float">
            <text:p>38021200450101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7" calcext:value-type="float">
            <text:p>746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7" calcext:value-type="float">
            <text:p>38021200450101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8" calcext:value-type="float">
            <text:p>746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8" calcext:value-type="float">
            <text:p>38021200450101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69" calcext:value-type="float">
            <text:p>746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19" calcext:value-type="float">
            <text:p>38021200450101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0" calcext:value-type="float">
            <text:p>747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0" calcext:value-type="float">
            <text:p>38021200450102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1" calcext:value-type="float">
            <text:p>747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1" calcext:value-type="float">
            <text:p>38021200450102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2" calcext:value-type="float">
            <text:p>747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2" calcext:value-type="float">
            <text:p>38021200450102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3" calcext:value-type="float">
            <text:p>747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3" calcext:value-type="float">
            <text:p>38021200450102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4" calcext:value-type="float">
            <text:p>747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4" calcext:value-type="float">
            <text:p>38021200450102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5" calcext:value-type="float">
            <text:p>747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5" calcext:value-type="float">
            <text:p>38021200450102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6" calcext:value-type="float">
            <text:p>747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6" calcext:value-type="float">
            <text:p>38021200450102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7" calcext:value-type="float">
            <text:p>747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7" calcext:value-type="float">
            <text:p>38021200450102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8" calcext:value-type="float">
            <text:p>747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8" calcext:value-type="float">
            <text:p>380212004501028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79" calcext:value-type="float">
            <text:p>747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29" calcext:value-type="float">
            <text:p>38021200450102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0" calcext:value-type="float">
            <text:p>748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0" calcext:value-type="float">
            <text:p>38021200450103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1" calcext:value-type="float">
            <text:p>7481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1" calcext:value-type="float">
            <text:p>380212004501031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2" calcext:value-type="float">
            <text:p>7482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2" calcext:value-type="float">
            <text:p>380212004501032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3" calcext:value-type="float">
            <text:p>7483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3" calcext:value-type="float">
            <text:p>380212004501033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4" calcext:value-type="float">
            <text:p>7484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4" calcext:value-type="float">
            <text:p>380212004501034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5" calcext:value-type="float">
            <text:p>7485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5" calcext:value-type="float">
            <text:p>380212004501035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6" calcext:value-type="float">
            <text:p>7486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6" calcext:value-type="float">
            <text:p>380212004501036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7" calcext:value-type="float">
            <text:p>7487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7" calcext:value-type="float">
            <text:p>380212004501037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8" calcext:value-type="float">
            <text:p>7488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8" calcext:value-type="float">
            <text:p>380212004501038</text:p>
          </table:table-cell>
          <table:table-cell table:style-name="TL_20_Metadata" office:value-type="string" calcext:value-type="string">
            <text:p>3802120045010381 <text:s/>Hieronder een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89" calcext:value-type="float">
            <text:p>7489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39" calcext:value-type="float">
            <text:p>380212004501039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4" office:value-type="float" office:value="7490" calcext:value-type="float">
            <text:p>7490</text:p>
          </table:table-cell>
          <table:table-cell table:style-name="ce7" office:value-type="string" calcext:value-type="string">
            <text:p>Dr-4edl</text:p>
          </table:table-cell>
          <table:table-cell table:style-name="ce75" office:value-type="float" office:value="380212004501040" calcext:value-type="float">
            <text:p>380212004501040</text:p>
          </table:table-cell>
          <table:table-cell table:style-name="TL_20_Metadata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76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18.983056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2-25T13:12:04</meta:creation-date>
    <dc:creator>Helpdesk</dc:creator>
    <dc:date>2004-12-20T18:11:36</dc:date>
    <meta:generator>LibreOffice/4.2.8.2$Linux_X86_64 LibreOffice_project/420m0$Build-2</meta:generator>
    <meta:document-statistic meta:table-count="2" meta:cell-count="6534" meta:object-count="0"/>
  </office:meta>
</office:document-meta>
</file>